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3.svm" manifest:media-type=""/>
  <manifest:file-entry manifest:full-path="Pictures/1000020100000368000002DAF4AA6AD5D3F8F90C.png" manifest:media-type="image/png"/>
  <manifest:file-entry manifest:full-path="Pictures/1000020100000286000002DB006FE96CC255A04D.png" manifest:media-type="image/png"/>
  <manifest:file-entry manifest:full-path="Pictures/10000201000001960000028BF2854A52539C7A77.png" manifest:media-type="image/png"/>
  <manifest:file-entry manifest:full-path="Pictures/1000020100000326000002FE87BDC5A06CA30E23.png" manifest:media-type="image/png"/>
  <manifest:file-entry manifest:full-path="Pictures/100002010000020E0000028B282B4EAE14E40B81.png" manifest:media-type="image/png"/>
  <manifest:file-entry manifest:full-path="Pictures/10000201000002D6000003256A6F794B22EE91F7.png" manifest:media-type="image/png"/>
  <manifest:file-entry manifest:full-path="Pictures/10000201000002860000025DF7179B31CF53FBF3.png" manifest:media-type="image/png"/>
  <manifest:file-entry manifest:full-path="Pictures/1000020100000236000002FEF7C99333D310C112.png" manifest:media-type="image/png"/>
  <manifest:file-entry manifest:full-path="Pictures/10000201000002D60000020E0886908710A574AA.png" manifest:media-type="image/png"/>
  <manifest:file-entry manifest:full-path="Pictures/1000020100000286000002D8C7C1FB26104AB3C3.png" manifest:media-type="image/png"/>
  <manifest:file-entry manifest:full-path="Pictures/1000020100000286000002AE7A87B30D30A5798C.png" manifest:media-type="image/png"/>
  <manifest:file-entry manifest:full-path="Pictures/10000201000001E800000283EABBB1743731B77F.png" manifest:media-type="image/png"/>
  <manifest:file-entry manifest:full-path="Pictures/100002010000021200000284B2A344D1158C3409.png" manifest:media-type="image/png"/>
  <manifest:file-entry manifest:full-path="Pictures/10000201000001E60000020E7AD0EDF2473AB598.png" manifest:media-type="image/png"/>
  <manifest:file-entry manifest:full-path="Pictures/1000020100000286000002D6DD1898668520D350.png" manifest:media-type="image/png"/>
  <manifest:file-entry manifest:full-path="Pictures/1000020100000236000002FEB2EF668745A9BF98.png" manifest:media-type="image/png"/>
  <manifest:file-entry manifest:full-path="Pictures/TablePreview1.svm" manifest:media-type=""/>
  <manifest:file-entry manifest:full-path="Pictures/10000201000002D6000001E6B00519EB2489679B.png" manifest:media-type="image/png"/>
  <manifest:file-entry manifest:full-path="Pictures/1000020100000326000002FE0DAE6B2061CB99DD.png" manifest:media-type="image/png"/>
  <manifest:file-entry manifest:full-path="Pictures/10000201000002D60000028611BD762F46DEC009.png" manifest:media-type="image/png"/>
  <manifest:file-entry manifest:full-path="Pictures/10000201000001E6000001E68CF3133A61E65386.png" manifest:media-type="image/png"/>
  <manifest:file-entry manifest:full-path="Pictures/10000201000001BE000002D60A1F1EC18742D5C9.png" manifest:media-type="image/png"/>
  <manifest:file-entry manifest:full-path="Pictures/1000020100000286000002DBA431B40CD9002085.png" manifest:media-type="image/png"/>
  <manifest:file-entry manifest:full-path="Pictures/10000201000005560000034BF747893BDCD98BE1.png" manifest:media-type="image/png"/>
  <manifest:file-entry manifest:full-path="Pictures/100002010000037600000286F73345B74E114F6A.png" manifest:media-type="image/png"/>
  <manifest:file-entry manifest:full-path="Pictures/10000201000002D600000236B5132C55C988699C.png" manifest:media-type="image/png"/>
  <manifest:file-entry manifest:full-path="Pictures/10000201000002D60000020E17E62A621DBB91AC.png" manifest:media-type="image/png"/>
  <manifest:file-entry manifest:full-path="Pictures/10000201000002860000030368AB4CFBA1636267.png" manifest:media-type="image/png"/>
  <manifest:file-entry manifest:full-path="Pictures/10000201000004160000043B0D7141A9A9C7ECE4.png" manifest:media-type="image/png"/>
  <manifest:file-entry manifest:full-path="Pictures/10000201000001E2000001E48E1493D927CD561A.png" manifest:media-type="image/png"/>
  <manifest:file-entry manifest:full-path="Pictures/10000201000002D6000002D3AF11F62307113F71.png" manifest:media-type="image/png"/>
  <manifest:file-entry manifest:full-path="Pictures/100002010000019E000002D6EDB312541DACBDFF.png" manifest:media-type="image/png"/>
  <manifest:file-entry manifest:full-path="Pictures/10000201000002AD000002D7B0B6CE5FC5F9E3FA.png" manifest:media-type="image/png"/>
  <manifest:file-entry manifest:full-path="Pictures/10000201000002D0000003EDCB41014C4A317F66.png" manifest:media-type="image/png"/>
  <manifest:file-entry manifest:full-path="Pictures/100002010000043E000005562E76FABA39D96249.png" manifest:media-type="image/png"/>
  <manifest:file-entry manifest:full-path="Pictures/10000201000001960000034EA9227B3A932B2237.png" manifest:media-type="image/png"/>
  <manifest:file-entry manifest:full-path="Pictures/10000201000002AD000002D79C7D9F910D74F023.png" manifest:media-type="image/png"/>
  <manifest:file-entry manifest:full-path="Pictures/10000201000001960000034E1B359B7B562C192F.png" manifest:media-type="image/png"/>
  <manifest:file-entry manifest:full-path="Pictures/TablePreview2.svm" manifest:media-type=""/>
  <manifest:file-entry manifest:full-path="Pictures/10000201000003760000043E0537519F0F10BD4B.png" manifest:media-type="image/png"/>
  <manifest:file-entry manifest:full-path="Pictures/10000201000004660000034D4C075FD8C65091EB.png" manifest:media-type="image/png"/>
  <manifest:file-entry manifest:full-path="Pictures/1000020100000286000002B3FF7AF2709087763B.png" manifest:media-type="image/png"/>
  <manifest:file-entry manifest:full-path="Pictures/10000201000001E60000034E21D2F043EE22AF6C.png" manifest:media-type="image/png"/>
  <manifest:file-entry manifest:full-path="Pictures/10000201000001E80000020B12CD47FCC112927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middle" draw:auto-grow-height="false" draw:fit-to-size="shrink-to-fit" style:shrink-to-fit="true" fo:min-height="8.036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9" style:family="presentation" style:parent-style-name="SECTION_5f_HEADER-subtitle">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10"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TWO_5f_COLUMNS-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4" style:family="presentation" style:parent-style-name="TITLE_5f_AND_5f_TWO_5f_COLUMNS-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TWO_5f_COLUMNS-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TWO_5f_COLUMNS-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TWO_5f_COLUMNS-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TWO_5f_COLUMNS-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TWO_5f_COLUMNS-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TWO_5f_COLUMNS-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TWO_5f_COLUMNS-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6.82cm" style:use-optimal-column-width="false"/>
    </style:style>
    <style:style style:name="co2" style:family="table-column">
      <style:table-column-properties style:column-width="11.921cm" style:use-optimal-column-width="false"/>
    </style:style>
    <style:style style:name="co3" style:family="table-column">
      <style:table-column-properties style:column-width="5.915cm" style:use-optimal-column-width="false"/>
    </style:style>
    <style:style style:name="co4" style:family="table-column">
      <style:table-column-properties style:column-width="5.917cm" style:use-optimal-column-width="false"/>
    </style:style>
    <style:style style:name="co5" style:family="table-column">
      <style:table-column-properties style:column-width="4.496cm" style:use-optimal-column-width="false"/>
    </style:style>
    <style:style style:name="ro1" style:family="table-row">
      <style:table-row-properties style:row-height="1.218cm"/>
    </style:style>
    <style:style style:name="ro2" style:family="table-row">
      <style:table-row-properties style:row-height="1.929cm"/>
    </style:style>
    <style:style style:name="ro3" style:family="table-row">
      <style:table-row-properties style:row-height="5.859cm"/>
    </style:style>
    <style:style style:name="ro4" style:family="table-row">
      <style:table-row-properties style:row-height="1.368cm"/>
    </style:style>
    <style:style style:name="ro5" style:family="table-row">
      <style:table-row-properties style:row-height="2.141cm"/>
    </style:style>
    <style:style style:name="ro6" style:family="table-row">
      <style:table-row-properties style:row-height="4.896cm"/>
    </style:style>
    <style:style style:name="ro7" style:family="table-row">
      <style:table-row-properties style:row-height="1.767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ce2" style:family="table-cell">
      <loext:graphic-properties draw:fill="none" draw:textarea-vertical-align="top" fo:padding-top="0.253cm" fo:padding-bottom="0.253cm" fo:padding-left="0.253cm" fo:padding-right="0.253cm"/>
      <style:paragraph-properties fo:border="0.37pt solid #adadad"/>
    </style:style>
    <style:style style:name="ce3" style:family="table-cell">
      <loext:graphic-properties draw:fill="none" draw:textarea-vertical-align="top" fo:padding-top="0.253cm" fo:padding-bottom="0.253cm" fo:padding-left="0.253cm" fo:padding-right="0.253cm"/>
      <style:paragraph-properties fo:border-left="0.37pt solid #adadad" fo:border-right="0.37pt solid #adadad" fo:border-top="0.37pt solid #adadad" fo:border-bottom="0.37pt solid #9e9e9e"/>
    </style:style>
    <style:style style:name="ce4" style:family="table-cell">
      <loext:graphic-properties draw:fill="none" draw:textarea-vertical-align="top" fo:padding-top="0.253cm" fo:padding-bottom="0.253cm" fo:padding-left="0.253cm" fo:padding-right="0.253cm"/>
      <style:paragraph-properties fo:border-left="0.37pt solid #adadad" fo:border-right="0.37pt solid #adadad" fo:border-top="0.37pt solid #9e9e9e" fo:border-bottom="0.37pt solid #adadad"/>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353cm" fo:margin-bottom="0cm" fo:line-height="105%" fo:text-align="start" fo:text-indent="0cm" style:writing-mode="lr-tb">
        <style:tab-stops>
          <style:tab-stop style:position="0cm"/>
        </style:tab-stops>
      </style:paragraph-properties>
    </style:style>
    <style:style style:name="P6" style:family="paragraph">
      <style:paragraph-properties fo:margin-left="0cm" fo:margin-right="0cm" fo:margin-top="0.353cm" fo:margin-bottom="0.353cm" fo:line-height="105%"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cm" fo:margin-bottom="0cm" fo:line-height="105%" fo:text-align="start" fo:text-indent="0cm" style:writing-mode="lr-tb">
        <style:tab-stops>
          <style:tab-stop style:position="0cm"/>
        </style:tab-stops>
      </style:paragraph-properties>
    </style:style>
    <style:style style:name="P10" style:family="paragraph">
      <style:paragraph-properties fo:margin-left="0cm" fo:margin-right="0cm" fo:margin-top="0.423cm" fo:margin-bottom="0.423cm" fo:line-height="105%"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423cm" fo:line-height="115%" fo:text-align="center" fo:text-indent="0cm" style:writing-mode="lr-tb">
        <style:tab-stops>
          <style:tab-stop style:position="0cm"/>
        </style:tab-stops>
      </style:paragraph-properties>
    </style:style>
    <style:style style:name="P12" style:family="paragraph">
      <loext:graphic-properties draw:fill="none"/>
      <style:paragraph-properties fo:text-align="start"/>
      <style:text-properties fo:font-size="18pt"/>
    </style:style>
    <style:style style:name="P13" style:family="paragraph">
      <loext:graphic-properties draw:fill="none"/>
      <style:paragraph-properties fo:text-align="start" style:font-independent-line-spacing="true"/>
      <style:text-properties fo:font-size="36pt"/>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8" style:family="paragraph">
      <style:paragraph-properties fo:margin-left="0cm" fo:margin-right="0cm" fo:margin-top="0.423cm" fo:margin-bottom="0.423cm" fo:line-height="115%" fo:text-align="center" fo:text-indent="0cm" style:writing-mode="lr-tb">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14pt"/>
    </style:style>
    <style:style style:name="P20"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353cm" fo:margin-bottom="0.423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23" style:family="paragraph">
      <style:paragraph-properties fo:margin-left="0cm" fo:margin-right="0cm" fo:margin-top="0.353cm" fo:margin-bottom="0cm" fo:line-height="100%" fo:text-align="center" fo:text-indent="0cm" style:writing-mode="lr-tb">
        <style:tab-stops>
          <style:tab-stop style:position="0cm"/>
        </style:tab-stops>
      </style:paragraph-properties>
    </style:style>
    <style:style style:name="P24"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2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6" style:family="paragraph">
      <loext:graphic-properties draw:fill="none" draw:fill-color="#ffffff"/>
      <style:paragraph-properties fo:text-align="start" style:font-independent-line-spacing="true"/>
      <style:text-properties fo:font-size="11pt"/>
    </style:style>
    <style:style style:name="P27"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eeeeee"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eeeeee"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4" style:family="text">
      <style:text-properties fo:font-variant="normal" fo:text-transform="none" fo:color="#eeeeee" style:text-line-through-style="none" style:text-line-through-type="none" style:text-position="0% 100%" style:font-name="Arial" fo:font-size="24pt" fo:letter-spacing="normal" fo:font-style="italic" style:text-underline-style="none" fo:font-weight="normal" style:font-name-asian="Arial" style:font-size-asian="24pt" style:font-style-asian="italic" style:font-weight-asian="normal" style:font-name-complex="Arial" style:font-size-complex="24pt" style:font-style-complex="italic" style:font-weight-complex="normal"/>
    </style:style>
    <style:style style:name="T5"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6" style:family="text">
      <style:text-properties fo:font-variant="normal" fo:text-transform="none" fo:color="#eeeeee"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7" style:family="text">
      <style:text-properties fo:font-variant="normal" fo:text-transform="none" fo:color="#eeeeee" style:text-line-through-style="none" style:text-line-through-type="none" style:text-position="0% 100%" style:font-name="Arial" fo:font-size="22pt" fo:letter-spacing="normal" fo:font-style="italic" style:text-underline-style="none" fo:font-weight="normal" style:font-name-asian="Arial" style:font-size-asian="22pt" style:font-style-asian="italic" style:font-weight-asian="normal" style:font-name-complex="Arial" style:font-size-complex="22pt" style:font-style-complex="italic" style:font-weight-complex="normal"/>
    </style:style>
    <style:style style:name="T8" style:family="text">
      <style:text-properties fo:font-variant="normal" fo:text-transform="none" fo:color="#eedd00" style:text-line-through-style="none" style:text-line-through-type="none" style:text-position="0% 100%" style:font-name="Arial" fo:font-size="24pt" fo:letter-spacing="normal" fo:font-style="italic" style:text-underline-style="none" fo:font-weight="normal" style:font-name-asian="Arial" style:font-size-asian="24pt" style:font-style-asian="italic" style:font-weight-asian="normal" style:font-name-complex="Arial" style:font-size-complex="24pt" style:font-style-complex="italic" style:font-weight-complex="normal"/>
    </style:style>
    <style:style style:name="T9" style:family="text">
      <style:text-properties fo:font-variant="normal" fo:text-transform="none" fo:color="#ffffff" style:text-line-through-style="none" style:text-line-through-type="none" style:text-position="0% 100%" style:font-name="Arial" fo:font-size="48pt" fo:letter-spacing="normal" fo:font-style="normal" style:text-underline-style="none" fo:font-weight="normal" style:font-name-asian="Arial" style:font-size-asian="48pt" style:font-style-asian="normal" style:font-weight-asian="normal" style:font-name-complex="Arial" style:font-size-complex="48pt" style:font-style-complex="normal" style:font-weight-complex="normal"/>
    </style:style>
    <style:style style:name="T10" style:family="text">
      <style:text-properties fo:font-variant="normal" fo:text-transform="none" fo:color="#eeeeee"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1" style:family="text">
      <style:text-properties fo:font-variant="normal" fo:text-transform="none" fo:color="#eeeeee"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2" style:family="text">
      <style:text-properties fo:font-variant="normal" fo:text-transform="none" fo:color="#eeeeee"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13" style:family="text">
      <style:text-properties fo:font-variant="normal" fo:text-transform="none" fo:color="#11dd11" style:text-line-through-style="none" style:text-line-through-type="none" style:text-position="0% 100%" style:font-name="Arial" fo:font-size="22pt" fo:letter-spacing="normal" fo:font-style="italic" style:text-underline-style="none" fo:font-weight="normal" style:font-name-asian="Arial" style:font-size-asian="22pt" style:font-style-asian="italic" style:font-weight-asian="normal" style:font-name-complex="Arial" style:font-size-complex="22pt" style:font-style-complex="italic" style:font-weight-complex="normal"/>
    </style:style>
    <style:style style:name="T14" style:family="text">
      <style:text-properties fo:font-variant="normal" fo:text-transform="none" fo:color="#11dd11"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15" style:family="text">
      <style:text-properties fo:font-variant="normal" fo:text-transform="none" fo:color="#ff4455"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16" style:family="text">
      <style:text-properties fo:font-variant="normal" fo:text-transform="none" fo:color="#eedd00"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17" style:family="text">
      <style:text-properties fo:font-variant="normal" fo:text-transform="none" fo:color="#11dd11"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8" style:family="text">
      <style:text-properties fo:font-variant="normal" fo:text-transform="none" fo:color="#ff4455"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9" style:family="text">
      <style:text-properties fo:font-variant="normal" fo:text-transform="none" fo:color="#eedd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0" style:family="text">
      <style:text-properties fo:font-variant="normal" fo:text-transform="none" fo:color="#ff4455"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21"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22" style:family="text">
      <style:text-properties fo:font-variant="normal" fo:text-transform="none" fo:color="#eeeeee"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23" style:family="text">
      <style:text-properties fo:font-variant="normal" fo:text-transform="none" fo:color="#eeeeee" style:text-line-through-style="none" style:text-line-through-type="none" style:text-position="0% 100%" style:font-name="Arial" fo:font-size="20pt" fo:letter-spacing="normal" fo:font-style="italic" style:text-underline-style="none" fo:font-weight="normal" style:font-name-asian="Arial" style:font-size-asian="20pt" style:font-style-asian="italic" style:font-weight-asian="normal" style:font-name-complex="Arial" style:font-size-complex="20pt" style:font-style-complex="italic" style:font-weight-complex="normal"/>
    </style:style>
    <style:style style:name="T24" style:family="text">
      <style:text-properties fo:font-variant="normal" fo:text-transform="none" fo:color="#eedd00" style:text-line-through-style="none" style:text-line-through-type="none" style:text-position="0% 100%" style:font-name="Arial" fo:font-size="16pt" fo:letter-spacing="normal" fo:font-style="italic" style:text-underline-style="none" fo:font-weight="normal" style:font-name-asian="Arial" style:font-size-asian="16pt" style:font-style-asian="italic" style:font-weight-asian="normal" style:font-name-complex="Arial" style:font-size-complex="16pt" style:font-style-complex="italic" style:font-weight-complex="normal"/>
    </style:style>
    <style:style style:name="T25" style:family="text">
      <style:text-properties fo:font-variant="normal" fo:text-transform="none" fo:color="#4dd0e1"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26" style:family="text">
      <style:text-properties fo:font-variant="normal" fo:text-transform="none" fo:color="#11dd11"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213cm" text:min-label-width="1.057cm"/>
        <style:text-properties style:font-name="Arial" fo:color="#eeeee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Arial" fo:color="#eeeee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283cm" text:min-label-width="0.987cm"/>
        <style:text-properties style:font-name="Arial" fo:color="#eeeee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283cm" text:min-label-width="0.987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Architectural Extensions</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Making use of specialized components</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4" draw:layer="layout" svg:width="15.239cm" svg:height="11.429cm" svg:x="1.905cm" svg:y="12.065cm" presentation:class="notes" presentation:placeholder="true" presentation:user-transformed="true">
            <draw:text-box/>
          </draw:frame>
        </presentation:notes>
      </draw:page>
      <draw:page draw:name="Contents" draw:style-name="dp1" draw:master-page-name="TITLE_5f_AND_5f_BODY" presentation:presentation-page-layout-name="AL2T1">
        <draw:frame draw:name="Google Shape;60;p14" presentation:style-name="pr4" draw:text-style-name="P7" draw:layer="layout" svg:width="22.144cm" svg:height="9.507cm" svg:x="1.628cm" svg:y="3.402cm" presentation:class="outline" presentation:user-transformed="true">
          <draw:text-box>
            <text:p text:style-name="P5"><text:span text:style-name="T3">The extension layers take care of various aspects:</text:span></text:p>
            <text:list text:style-name="L4">
              <text:list-item>
                <text:p text:style-name="P5"><text:span text:style-name="T4">Middleware</text:span><text:span text:style-name="T3"> – communication and deployment.</text:span></text:p>
              </text:list-item>
              <text:list-item>
                <text:p text:style-name="P5"><text:span text:style-name="T4">Shared Repository</text:span><text:span text:style-name="T3"> – persistence and synchronization.</text:span></text:p>
              </text:list-item>
              <text:list-item>
                <text:p text:style-name="P5"><text:span text:style-name="T4">Proxy</text:span><text:span text:style-name="T3"> – protocols, routing, and security.</text:span></text:p>
              </text:list-item>
              <text:list-item>
                <text:p text:style-name="P5"><text:span text:style-name="T4">Orchestrator</text:span><text:span text:style-name="T3"> – integration and use cases.</text:span></text:p>
              </text:list-item>
              <text:list-item>
                <text:p text:style-name="P6"><text:span text:style-name="T4">Combined Component</text:span><text:span text:style-name="T3"> – multiple aspects.</text:span></text:p>
              </text:list-item>
            </text:list>
          </draw:text-box>
        </draw:frame>
        <draw:frame draw:name="Google Shape;61;p14" presentation:style-name="pr5" draw:text-style-name="P8" draw:layer="layout" svg:width="23.667cm" svg:height="1.59cm" svg:x="0.866cm" svg:y="1.236cm" presentation:class="title" presentation:user-transformed="true">
          <draw:text-box>
            <text:p text:style-name="P1"><text:span text:style-name="T5">Contents</text:span></text:p>
          </draw:text-box>
        </draw:frame>
        <presentation:notes draw:style-name="dp2">
          <draw:page-thumbnail draw:name="Google Shape;57;g36fa2bd9aed_0_190:notes" draw:style-name="gr1" draw:layer="layout" svg:width="16.932cm" svg:height="9.524cm" svg:x="1.059cm" svg:y="1.905cm" draw:page-number="2" presentation:class="page"/>
          <draw:frame draw:name="Google Shape;58;g36fa2bd9aed_0_190:notes" presentation:style-name="pr6" draw:text-style-name="P4" draw:layer="layout" svg:width="15.239cm" svg:height="11.429cm" svg:x="1.905cm" svg:y="12.065cm" presentation:class="notes" presentation:placeholder="true" presentation:user-transformed="true">
            <draw:text-box/>
          </draw:frame>
        </presentation:notes>
      </draw:page>
      <draw:page draw:name="Schema" draw:style-name="dp1" draw:master-page-name="TITLE_5f_AND_5f_BODY" presentation:presentation-page-layout-name="AL2T1">
        <draw:frame draw:name="Google Shape;66;p15" presentation:style-name="pr4" draw:text-style-name="P7" draw:layer="layout" svg:width="12.992cm" svg:height="8.331cm" svg:x="1.975cm" svg:y="3.233cm" presentation:class="outline" presentation:user-transformed="true">
          <draw:text-box>
            <text:p text:style-name="P9"><text:span text:style-name="T6">In most cases we’ll be adding layers to a system of subdomain </text:span><text:span text:style-name="T7">Services</text:span><text:span text:style-name="T6">. </text:span></text:p>
            <text:p text:style-name="P10"><text:span text:style-name="T6">However, the same techniques tend to work with </text:span><text:span text:style-name="T7">Shards</text:span><text:span text:style-name="T6"> or even </text:span><text:span text:style-name="T7">Layers</text:span><text:span text:style-name="T6">.</text:span></text:p>
          </draw:text-box>
        </draw:frame>
        <draw:frame draw:name="Google Shape;67;p15" presentation:style-name="pr4" draw:text-style-name="P7" draw:layer="layout" svg:width="23.225cm" svg:height="2.687cm" svg:x="0.866cm" svg:y="10.886cm" presentation:class="outline" presentation:user-transformed="true">
          <draw:text-box>
            <text:p text:style-name="P11"><text:span text:style-name="T8">The components are color-coded </text:span></text:p>
          </draw:text-box>
        </draw:frame>
        <draw:frame draw:name="Google Shape;68;p15" presentation:style-name="pr5" draw:text-style-name="P8" draw:layer="layout" svg:width="23.667cm" svg:height="1.59cm" svg:x="0.866cm" svg:y="1.236cm" presentation:class="title" presentation:user-transformed="true">
          <draw:text-box>
            <text:p text:style-name="P1"><text:span text:style-name="T5">Schema</text:span></text:p>
          </draw:text-box>
        </draw:frame>
        <draw:frame draw:name="Google Shape;69;p15" draw:style-name="gr2" draw:text-style-name="P12" draw:layer="layout" svg:width="6.298cm" svg:height="6.324cm" svg:x="17.275cm" svg:y="4.236cm">
          <draw:image xlink:href="Pictures/10000201000001E2000001E48E1493D927CD561A.png" xlink:type="simple" xlink:show="embed" xlink:actuate="onLoad">
            <text:p/>
          </draw:image>
        </draw:frame>
        <presentation:notes draw:style-name="dp2">
          <draw:page-thumbnail draw:name="Google Shape;63;g39ecdd5df51_0_0:notes" draw:style-name="gr1" draw:layer="layout" svg:width="16.932cm" svg:height="9.524cm" svg:x="1.059cm" svg:y="1.905cm" draw:page-number="3" presentation:class="page"/>
          <draw:frame draw:name="Google Shape;64;g39ecdd5df51_0_0:notes" presentation:style-name="pr7" draw:text-style-name="P4" draw:layer="layout" svg:width="15.239cm" svg:height="11.429cm" svg:x="1.905cm" svg:y="12.065cm" presentation:class="notes" presentation:placeholder="true" presentation:user-transformed="true">
            <draw:text-box/>
          </draw:frame>
        </presentation:notes>
      </draw:page>
      <draw:page draw:name="Middleware" draw:style-name="dp1" draw:master-page-name="SECTION_5f_HEADER">
        <draw:frame draw:name="Google Shape;74;p16" presentation:style-name="pr8" draw:text-style-name="P13" draw:layer="layout" svg:width="23.667cm" svg:height="2.337cm" svg:x="0.866cm" svg:y="4.805cm" presentation:class="title" presentation:user-transformed="true">
          <draw:text-box>
            <text:p text:style-name="P1"><text:span text:style-name="T9">Middleware</text:span></text:p>
          </draw:text-box>
        </draw:frame>
        <draw:frame draw:name="Google Shape;75;p16" presentation:style-name="pr9" draw:text-style-name="P14" draw:layer="layout" svg:width="23.667cm" svg:height="2.201cm" svg:x="0.866cm" svg:y="7.144cm" presentation:class="subtitle" presentation:user-transformed="true">
          <draw:text-box>
            <text:p text:style-name="P11"><text:span text:style-name="T10">A communication layer</text:span></text:p>
          </draw:text-box>
        </draw:frame>
        <presentation:notes draw:style-name="dp2">
          <draw:page-thumbnail draw:name="Google Shape;71;g3ace7d219c8_0_0:notes" draw:style-name="gr1" draw:layer="layout" svg:width="16.932cm" svg:height="9.524cm" svg:x="1.059cm" svg:y="1.905cm" draw:page-number="4" presentation:class="page"/>
          <draw:frame draw:name="Google Shape;72;g3ace7d219c8_0_0:notes" presentation:style-name="pr10" draw:text-style-name="P4" draw:layer="layout" svg:width="15.239cm" svg:height="11.429cm" svg:x="1.905cm" svg:y="12.065cm" presentation:class="notes" presentation:placeholder="true" presentation:user-transformed="true">
            <draw:text-box/>
          </draw:frame>
        </presentation:notes>
      </draw:page>
      <draw:page draw:name="Middleware – overview" draw:style-name="dp1" draw:master-page-name="TITLE_5f_AND_5f_BODY" presentation:presentation-page-layout-name="AL2T1">
        <draw:frame draw:name="Google Shape;80;p17" presentation:style-name="pr5" draw:text-style-name="P8" draw:layer="layout" svg:width="23.667cm" svg:height="1.59cm" svg:x="0.866cm" svg:y="1.236cm" presentation:class="title" presentation:user-transformed="true">
          <draw:text-box>
            <text:p text:style-name="P1"><text:span text:style-name="T5">Middleware – overview</text:span></text:p>
          </draw:text-box>
        </draw:frame>
        <draw:frame draw:name="Google Shape;81;p17" presentation:style-name="pr11" draw:text-style-name="P7" draw:layer="layout" svg:width="16.635cm" svg:height="7.37cm" svg:x="7.899cm" svg:y="3.201cm" presentation:class="outline" presentation:user-transformed="true">
          <draw:text-box>
            <text:p text:style-name="P15"><text:span text:style-name="T11">A </text:span><text:span text:style-name="T12">Middleware</text:span><text:span text:style-name="T11"> is a system-wide layer which provides other system components with means of communication.</text:span></text:p>
            <text:p text:style-name="P16"><text:span text:style-name="T11">A </text:span><text:span text:style-name="T12">Middleware</text:span><text:span text:style-name="T11"> may function as:</text:span></text:p>
            <text:list text:style-name="L9">
              <text:list-item>
                <text:p text:style-name="P16"><text:span text:style-name="T11">A </text:span><text:span text:style-name="T12">Message Broker</text:span><text:span text:style-name="T11"> – it lets its users message or call each other in a uniform manner.</text:span></text:p>
              </text:list-item>
              <text:list-item>
                <text:p text:style-name="P15"><text:span text:style-name="T11">A </text:span><text:span text:style-name="T12">Deployment Manager</text:span><text:span text:style-name="T11"> – it supervises scaling and error recovery of the services it hosts.</text:span></text:p>
              </text:list-item>
            </text:list>
          </draw:text-box>
        </draw:frame>
        <draw:frame draw:name="Google Shape;82;p17" presentation:style-name="pr4" draw:text-style-name="P7" draw:layer="layout" svg:width="23.667cm" svg:height="3.001cm" svg:x="0.866cm" svg:y="10.572cm" presentation:class="outline" presentation:user-transformed="true">
          <draw:text-box>
            <text:p text:style-name="P17"><text:span text:style-name="T13">Middleware</text:span><text:span text:style-name="T14"> helps communication and scaling in complex systems.</text:span></text:p>
            <text:p text:style-name="P18"><text:span text:style-name="T15">But it may be overly generic for high-load or low latency cases.</text:span></text:p>
          </draw:text-box>
        </draw:frame>
        <draw:custom-shape draw:name="Google Shape;83;p17" draw:style-name="gr3" draw:text-style-name="P19" draw:layer="layout" svg:width="5.82cm" svg:height="1.271cm" svg:x="1.317cm" svg:y="8.636cm">
          <text:p text:style-name="P1"><text:span text:style-name="T16">Middle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4;p17" draw:style-name="gr2" draw:text-style-name="P12" draw:layer="layout" svg:width="6.026cm" svg:height="4.365cm" svg:x="1.214cm" svg:y="3.898cm">
          <draw:image xlink:href="Pictures/10000201000002D60000020E17E62A621DBB91AC.png" xlink:type="simple" xlink:show="embed" xlink:actuate="onLoad">
            <text:p/>
          </draw:image>
        </draw:frame>
        <presentation:notes draw:style-name="dp2">
          <draw:page-thumbnail draw:name="Google Shape;77;g3aac8fdbe74_0_51:notes" draw:style-name="gr1" draw:layer="layout" svg:width="16.932cm" svg:height="9.524cm" svg:x="1.059cm" svg:y="1.905cm" draw:page-number="5" presentation:class="page"/>
          <draw:frame draw:name="Google Shape;78;g3aac8fdbe74_0_51:notes" presentation:style-name="pr12" draw:text-style-name="P4" draw:layer="layout" svg:width="15.239cm" svg:height="11.429cm" svg:x="1.905cm" svg:y="12.065cm" presentation:class="notes" presentation:placeholder="true" presentation:user-transformed="true">
            <draw:text-box/>
          </draw:frame>
        </presentation:notes>
      </draw:page>
      <draw:page draw:name="Middleware – trade-offs" draw:style-name="dp1" draw:master-page-name="TITLE_5f_AND_5f_TWO_5f_COLUMNS" presentation:presentation-page-layout-name="AL3T3">
        <draw:frame draw:name="Google Shape;89;p18" presentation:style-name="pr13" draw:text-style-name="P8" draw:layer="layout" svg:width="23.667cm" svg:height="1.59cm" svg:x="0.866cm" svg:y="1.236cm" presentation:class="title" presentation:user-transformed="true">
          <draw:text-box>
            <text:p text:style-name="P1"><text:span text:style-name="T5">Middleware – trade-offs</text:span></text:p>
          </draw:text-box>
        </draw:frame>
        <draw:frame draw:name="Google Shape;90;p18" presentation:style-name="pr14" draw:text-style-name="P19" draw:layer="layout" svg:width="11.11cm" svg:height="9.061cm" svg:x="0.866cm" svg:y="3.201cm" presentation:class="outline" presentation:user-transformed="true">
          <draw:text-box>
            <text:p text:style-name="P20"><text:span text:style-name="T17">Encapsulates connectivity concerns</text:span></text:p>
            <text:p text:style-name="P16"><text:span text:style-name="T17">Takes care of scaling of components</text:span></text:p>
            <text:p text:style-name="P21"><text:span text:style-name="T17">Is available off the shelf</text:span></text:p>
          </draw:text-box>
        </draw:frame>
        <draw:frame draw:name="Google Shape;91;p18" presentation:style-name="pr15" draw:text-style-name="P19" draw:layer="layout" svg:width="11.607cm" svg:height="9.061cm" svg:x="12.927cm" svg:y="3.201cm" presentation:class="outline" presentation:user-transformed="true">
          <draw:text-box>
            <text:p text:style-name="P20"><text:span text:style-name="T18">May increase latency</text:span></text:p>
            <text:p text:style-name="P16"><text:span text:style-name="T18">May not support specialized transports</text:span></text:p>
            <text:p text:style-name="P21"><text:span text:style-name="T18">May become a single point of failure</text:span></text:p>
          </draw:text-box>
        </draw:frame>
        <presentation:notes draw:style-name="dp2">
          <draw:page-thumbnail draw:name="Google Shape;86;g3aac8fdbe74_0_56:notes" draw:style-name="gr1" draw:layer="layout" svg:width="16.932cm" svg:height="9.524cm" svg:x="1.059cm" svg:y="1.905cm" draw:page-number="6" presentation:class="page"/>
          <draw:frame draw:name="Google Shape;87;g3aac8fdbe74_0_56:notes" presentation:style-name="pr16" draw:text-style-name="P4" draw:layer="layout" svg:width="15.239cm" svg:height="11.429cm" svg:x="1.905cm" svg:y="12.065cm" presentation:class="notes" presentation:placeholder="true" presentation:user-transformed="true">
            <draw:text-box/>
          </draw:frame>
        </presentation:notes>
      </draw:page>
      <draw:page draw:name="Middleware – addressing" draw:style-name="dp1" draw:master-page-name="TITLE_5f_AND_5f_BODY" presentation:presentation-page-layout-name="AL2T1">
        <draw:frame draw:name="Google Shape;96;p19" presentation:style-name="pr17" draw:text-style-name="P7" draw:layer="layout" svg:width="23.667cm" svg:height="10.04cm" svg:x="0.866cm" svg:y="3.201cm" presentation:class="outline" presentation:user-transformed="true">
          <draw:text-box>
            <text:p text:style-name="P20"><text:span text:style-name="T11">A </text:span><text:span text:style-name="T12">Middleware</text:span><text:span text:style-name="T11"> works in one of the following addressing modes:</text:span></text:p>
            <text:list text:style-name="L9">
              <text:list-item>
                <text:p text:style-name="P16"><text:span text:style-name="T12">Channels</text:span><text:span text:style-name="T11"> (one to one) – two components establish a communication channel. Anything pushed to one end of the channel pops out of its other end.</text:span></text:p>
              </text:list-item>
              <text:list-item>
                <text:p text:style-name="P15"><text:span text:style-name="T12">Actors</text:span><text:span text:style-name="T11"> (many to one) – every component has a public mailbox. Any component that knows its name or address can post there a message.</text:span></text:p>
              </text:list-item>
              <text:list-item>
                <text:p text:style-name="P15"><text:span text:style-name="T12">Publish / subscribe</text:span><text:span text:style-name="T11"> (one to many) – a component published updates to a topic. Other components that subscribe to the topic are notified of the updates.</text:span></text:p>
              </text:list-item>
              <text:list-item>
                <text:p text:style-name="P15"><text:span text:style-name="T12">Gossip</text:span><text:span text:style-name="T11"> (many to many) – every replica of a component periodically synchronizes its state with other random replica.</text:span></text:p>
              </text:list-item>
            </text:list>
          </draw:text-box>
        </draw:frame>
        <draw:frame draw:name="Google Shape;97;p19" presentation:style-name="pr5" draw:text-style-name="P8" draw:layer="layout" svg:width="23.667cm" svg:height="1.59cm" svg:x="0.866cm" svg:y="1.236cm" presentation:class="title" presentation:user-transformed="true">
          <draw:text-box>
            <text:p text:style-name="P1"><text:span text:style-name="T5">Middleware – addressing</text:span></text:p>
          </draw:text-box>
        </draw:frame>
        <presentation:notes draw:style-name="dp2">
          <draw:page-thumbnail draw:name="Google Shape;93;g3918c41e8cd_0_0:notes" draw:style-name="gr1" draw:layer="layout" svg:width="16.932cm" svg:height="9.524cm" svg:x="1.059cm" svg:y="1.905cm" draw:page-number="7" presentation:class="page"/>
          <draw:frame draw:name="Google Shape;94;g3918c41e8cd_0_0:notes" presentation:style-name="pr18" draw:text-style-name="P4" draw:layer="layout" svg:width="15.239cm" svg:height="11.429cm" svg:x="1.905cm" svg:y="12.065cm" presentation:class="notes" presentation:placeholder="true" presentation:user-transformed="true">
            <draw:text-box/>
          </draw:frame>
        </presentation:notes>
      </draw:page>
      <draw:page draw:name="Middleware – flow" draw:style-name="dp1" draw:master-page-name="TITLE_5f_AND_5f_BODY" presentation:presentation-page-layout-name="AL2T1">
        <draw:frame draw:name="Google Shape;102;p20" presentation:style-name="pr17" draw:text-style-name="P7" draw:layer="layout" svg:width="23.667cm" svg:height="10.04cm" svg:x="0.866cm" svg:y="3.201cm" presentation:class="outline" presentation:user-transformed="true">
          <draw:text-box>
            <text:p text:style-name="P20"><text:span text:style-name="T11">A </text:span><text:span text:style-name="T12">Middleware</text:span><text:span text:style-name="T11"> can be used in the following ways:</text:span></text:p>
            <text:list text:style-name="L9">
              <text:list-item>
                <text:p text:style-name="P16"><text:span text:style-name="T12">Notifications</text:span><text:span text:style-name="T11"> – a component sends a message that indicates that an event has happened and continues its tasks. It is up to other components to subscribe to the message and continue the use case (</text:span><text:span text:style-name="T12">choreography</text:span><text:span text:style-name="T11">).</text:span></text:p>
              </text:list-item>
              <text:list-item>
                <text:p text:style-name="P15"><text:span text:style-name="T12">Request / confirm</text:span><text:span text:style-name="T11"> – a component sends a request to another component (</text:span><text:span text:style-name="T12">orchestration</text:span><text:span text:style-name="T11">) and proceeds to its other tasks (</text:span><text:span text:style-name="T12">Proactor</text:span><text:span text:style-name="T11">). As soon as it receives the confirmation for its original request, it returns to its original task.</text:span></text:p>
              </text:list-item>
              <text:list-item>
                <text:p text:style-name="P15"><text:span text:style-name="T12">Remote procedure call</text:span><text:span text:style-name="T11"> (</text:span><text:span text:style-name="T12">RPC</text:span><text:span text:style-name="T11">) – a component sends a request (</text:span><text:span text:style-name="T12">orchestration</text:span><text:span text:style-name="T11">) and blocks (</text:span><text:span text:style-name="T12">Reactor</text:span><text:span text:style-name="T11">) on the </text:span><text:span text:style-name="T12">Middleware</text:span><text:span text:style-name="T11"> till it receives the corresponding confirmation. Then in continues its task.</text:span></text:p>
              </text:list-item>
            </text:list>
          </draw:text-box>
        </draw:frame>
        <draw:frame draw:name="Google Shape;103;p20" presentation:style-name="pr5" draw:text-style-name="P8" draw:layer="layout" svg:width="23.667cm" svg:height="1.59cm" svg:x="0.866cm" svg:y="1.236cm" presentation:class="title" presentation:user-transformed="true">
          <draw:text-box>
            <text:p text:style-name="P1"><text:span text:style-name="T5">Middleware – flow</text:span></text:p>
          </draw:text-box>
        </draw:frame>
        <presentation:notes draw:style-name="dp2">
          <draw:page-thumbnail draw:name="Google Shape;99;g3918c41e8cd_0_14:notes" draw:style-name="gr1" draw:layer="layout" svg:width="16.932cm" svg:height="9.524cm" svg:x="1.059cm" svg:y="1.905cm" draw:page-number="8" presentation:class="page"/>
          <draw:frame draw:name="Google Shape;100;g3918c41e8cd_0_14:notes" presentation:style-name="pr19" draw:text-style-name="P4" draw:layer="layout" svg:width="15.239cm" svg:height="11.429cm" svg:x="1.905cm" svg:y="12.065cm" presentation:class="notes" presentation:placeholder="true" presentation:user-transformed="true">
            <draw:text-box/>
          </draw:frame>
        </presentation:notes>
      </draw:page>
      <draw:page draw:name="Middleware – delivery guarantee" draw:style-name="dp1" draw:master-page-name="TITLE_5f_AND_5f_BODY" presentation:presentation-page-layout-name="AL2T1">
        <draw:frame draw:name="Google Shape;108;p21" presentation:style-name="pr17" draw:text-style-name="P7" draw:layer="layout" svg:width="23.667cm" svg:height="10.04cm" svg:x="0.866cm" svg:y="3.201cm" presentation:class="outline" presentation:user-transformed="true">
          <draw:text-box>
            <text:p text:style-name="P20"><text:span text:style-name="T11">As networks and components tend to fail, messages may be lost or duplicated:</text:span></text:p>
            <text:list text:style-name="L9">
              <text:list-item>
                <text:p text:style-name="P16"><text:span text:style-name="T12">Exactly once</text:span><text:span text:style-name="T11"> – the slowest mode of communication, often implemented with distributed transactions. Fits financial applications.</text:span></text:p>
              </text:list-item>
              <text:list-item>
                <text:p text:style-name="P15"><text:span text:style-name="T12">At least once</text:span><text:span text:style-name="T11"> – messages are re-delivered on failure, risking a duplication. Therefore message processing should be </text:span><text:span text:style-name="T12">idempotent</text:span><text:span text:style-name="T11">.</text:span></text:p>
              </text:list-item>
              <text:list-item>
                <text:p text:style-name="P15"><text:span text:style-name="T12">At most once</text:span><text:span text:style-name="T11"> – a message is lost on any failure. This is acceptable when the data that comes in messages is aggregated, as with weather sensors.</text:span></text:p>
              </text:list-item>
              <text:list-item>
                <text:p text:style-name="P15"><text:span text:style-name="T12">At will</text:span><text:span text:style-name="T11"> (no guarantee) – raw UDP traffic that allows for message loss, duplication, and reordering. It is fast, simple, and stupid, but now the application itself must ensure message order and validity.</text:span></text:p>
              </text:list-item>
            </text:list>
          </draw:text-box>
        </draw:frame>
        <draw:frame draw:name="Google Shape;109;p21" presentation:style-name="pr5" draw:text-style-name="P8" draw:layer="layout" svg:width="23.667cm" svg:height="1.59cm" svg:x="0.866cm" svg:y="1.236cm" presentation:class="title" presentation:user-transformed="true">
          <draw:text-box>
            <text:p text:style-name="P1"><text:span text:style-name="T5">Middleware – delivery guarantee</text:span></text:p>
          </draw:text-box>
        </draw:frame>
        <presentation:notes draw:style-name="dp2">
          <draw:page-thumbnail draw:name="Google Shape;105;g3918c41e8cd_0_21:notes" draw:style-name="gr1" draw:layer="layout" svg:width="16.932cm" svg:height="9.524cm" svg:x="1.059cm" svg:y="1.905cm" draw:page-number="9" presentation:class="page"/>
          <draw:frame draw:name="Google Shape;106;g3918c41e8cd_0_21:notes" presentation:style-name="pr20" draw:text-style-name="P4" draw:layer="layout" svg:width="15.239cm" svg:height="11.429cm" svg:x="1.905cm" svg:y="12.065cm" presentation:class="notes" presentation:placeholder="true" presentation:user-transformed="true">
            <draw:text-box/>
          </draw:frame>
        </presentation:notes>
      </draw:page>
      <draw:page draw:name="Middleware – composites" draw:style-name="dp1" draw:master-page-name="TITLE_5f_AND_5f_BODY" presentation:presentation-page-layout-name="AL2T1">
        <draw:frame draw:name="Google Shape;114;p22" presentation:style-name="pr5" draw:text-style-name="P8" draw:layer="layout" svg:width="23.667cm" svg:height="1.59cm" svg:x="0.866cm" svg:y="1.236cm" presentation:class="title" presentation:user-transformed="true">
          <draw:text-box>
            <text:p text:style-name="P1"><text:span text:style-name="T5">Middleware – composites</text:span></text:p>
          </draw:text-box>
        </draw:frame>
        <draw:frame draw:name="Google Shape;115;p22" presentation:style-name="pr11" draw:text-style-name="P7" draw:layer="layout" svg:width="16.005cm" svg:height="6.903cm" svg:x="8.529cm" svg:y="3.201cm" presentation:class="outline" presentation:user-transformed="true">
          <draw:text-box>
            <text:p text:style-name="P15"><text:span text:style-name="T12">Service Mesh</text:span><text:span text:style-name="T11"> is a </text:span><text:span text:style-name="T12">Mesh</text:span><text:span text:style-name="T11">-based </text:span><text:span text:style-name="T12">Middleware</text:span><text:span text:style-name="T11"> with a </text:span><text:span text:style-name="T12">Proxy</text:span><text:span text:style-name="T11"> per instance of client service.</text:span></text:p>
            <text:p text:style-name="P16"><text:span text:style-name="T11">The </text:span><text:span text:style-name="T12">Proxies</text:span><text:span text:style-name="T11"> contain shared libraries and interface to the </text:span><text:span text:style-name="T12">Mesh</text:span><text:span text:style-name="T11"> and are co-located (</text:span><text:span text:style-name="T12">Sidecar</text:span><text:span text:style-name="T11">) with the clients.</text:span></text:p>
            <text:p text:style-name="P22"><text:span text:style-name="T12">Service Mesh</text:span><text:span text:style-name="T11"> is elastic – it spawns new instances of services under heavy load and deletes them when idle.</text:span></text:p>
          </draw:text-box>
        </draw:frame>
        <draw:frame draw:name="Google Shape;116;p22" presentation:style-name="pr4" draw:text-style-name="P7" draw:layer="layout" svg:width="23.667cm" svg:height="3.001cm" svg:x="0.866cm" svg:y="10.572cm" presentation:class="outline" presentation:user-transformed="true">
          <draw:text-box>
            <text:p text:style-name="P17"><text:span text:style-name="T13">Service Mesh</text:span><text:span text:style-name="T14"> brings in elasticity and shared libraries.</text:span></text:p>
            <text:p text:style-name="P18"><text:span text:style-name="T15">Its implementation is complex, and you will be locked to its vendor.</text:span></text:p>
          </draw:text-box>
        </draw:frame>
        <draw:custom-shape draw:name="Google Shape;117;p22" draw:style-name="gr3" draw:text-style-name="P19" draw:layer="layout" svg:width="5.82cm" svg:height="1.271cm" svg:x="1.719cm" svg:y="8.628cm">
          <text:p text:style-name="P1"><text:span text:style-name="T16">Service Me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8;p22" draw:style-name="gr2" draw:text-style-name="P12" draw:layer="layout" svg:width="6.836cm" svg:height="4.218cm" svg:x="1.211cm" svg:y="4.178cm">
          <draw:image xlink:href="Pictures/10000201000005560000034BF747893BDCD98BE1.png" xlink:type="simple" xlink:show="embed" xlink:actuate="onLoad">
            <text:p/>
          </draw:image>
        </draw:frame>
        <presentation:notes draw:style-name="dp2">
          <draw:page-thumbnail draw:name="Google Shape;111;g3acc1a533ae_0_0:notes" draw:style-name="gr1" draw:layer="layout" svg:width="16.932cm" svg:height="9.524cm" svg:x="1.059cm" svg:y="1.905cm" draw:page-number="10" presentation:class="page"/>
          <draw:frame draw:name="Google Shape;112;g3acc1a533ae_0_0:notes" presentation:style-name="pr21" draw:text-style-name="P4" draw:layer="layout" svg:width="15.239cm" svg:height="11.429cm" svg:x="1.905cm" svg:y="12.065cm" presentation:class="notes" presentation:placeholder="true" presentation:user-transformed="true">
            <draw:text-box/>
          </draw:frame>
        </presentation:notes>
      </draw:page>
      <draw:page draw:name="Middleware – composites" draw:style-name="dp1" draw:master-page-name="TITLE_5f_AND_5f_BODY" presentation:presentation-page-layout-name="AL2T1">
        <draw:frame draw:name="Google Shape;123;p23" presentation:style-name="pr5" draw:text-style-name="P8" draw:layer="layout" svg:width="23.667cm" svg:height="1.59cm" svg:x="0.866cm" svg:y="1.236cm" presentation:class="title" presentation:user-transformed="true">
          <draw:text-box>
            <text:p text:style-name="P1"><text:span text:style-name="T5">Middleware – composites</text:span></text:p>
          </draw:text-box>
        </draw:frame>
        <draw:frame draw:name="Google Shape;124;p23" presentation:style-name="pr11" draw:text-style-name="P7" draw:layer="layout" svg:width="16.486cm" svg:height="6.903cm" svg:x="8.048cm" svg:y="3.201cm" presentation:class="outline" presentation:user-transformed="true">
          <draw:text-box>
            <text:p text:style-name="P15"><text:span text:style-name="T12">Event Mediator</text:span><text:span text:style-name="T11"> is </text:span><text:span text:style-name="T12">Middleware</text:span><text:span text:style-name="T11"> + </text:span><text:span text:style-name="T12">Orchestrator</text:span><text:span text:style-name="T11">. </text:span></text:p>
            <text:p text:style-name="P16"><text:span text:style-name="T11">As an </text:span><text:span text:style-name="T12">Orchestrator</text:span><text:span text:style-name="T11">, it decides which message goes to which service, thereby implementing use cases.</text:span></text:p>
            <text:p text:style-name="P22"><text:span text:style-name="T11">As a </text:span><text:span text:style-name="T12">Middleware</text:span><text:span text:style-name="T11">, it provides communication, scaling, and fault recovery.</text:span></text:p>
          </draw:text-box>
        </draw:frame>
        <draw:frame draw:name="Google Shape;125;p23" presentation:style-name="pr4" draw:text-style-name="P7" draw:layer="layout" svg:width="23.667cm" svg:height="3.001cm" svg:x="0.866cm" svg:y="10.572cm" presentation:class="outline" presentation:user-transformed="true">
          <draw:text-box>
            <text:p text:style-name="P17"><text:span text:style-name="T13">Event Mediator</text:span><text:span text:style-name="T14"> is a framework for </text:span><text:span text:style-name="T13">Event-Driven Architecture</text:span><text:span text:style-name="T14">.</text:span></text:p>
            <text:p text:style-name="P18"><text:span text:style-name="T15">It may grow too complex if there are many use cases.</text:span></text:p>
          </draw:text-box>
        </draw:frame>
        <draw:custom-shape draw:name="Google Shape;126;p23" draw:style-name="gr3" draw:text-style-name="P19" draw:layer="layout" svg:width="5.82cm" svg:height="1.271cm" svg:x="1.452cm" svg:y="9.19cm">
          <text:p text:style-name="P1"><text:span text:style-name="T16">Event Medi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7;p23" draw:style-name="gr2" draw:text-style-name="P12" draw:layer="layout" svg:width="4.621cm" svg:height="5.515cm" svg:x="2.052cm" svg:y="3.574cm">
          <draw:image xlink:href="Pictures/10000201000002860000030368AB4CFBA1636267.png" xlink:type="simple" xlink:show="embed" xlink:actuate="onLoad">
            <text:p/>
          </draw:image>
        </draw:frame>
        <presentation:notes draw:style-name="dp2">
          <draw:page-thumbnail draw:name="Google Shape;120;g3af6095df7f_0_10:notes" draw:style-name="gr1" draw:layer="layout" svg:width="16.932cm" svg:height="9.524cm" svg:x="1.059cm" svg:y="1.905cm" draw:page-number="11" presentation:class="page"/>
          <draw:frame draw:name="Google Shape;121;g3af6095df7f_0_10:notes" presentation:style-name="pr22" draw:text-style-name="P4" draw:layer="layout" svg:width="15.239cm" svg:height="11.429cm" svg:x="1.905cm" svg:y="12.065cm" presentation:class="notes" presentation:placeholder="true" presentation:user-transformed="true">
            <draw:text-box/>
          </draw:frame>
        </presentation:notes>
      </draw:page>
      <draw:page draw:name="Middleware – composites" draw:style-name="dp1" draw:master-page-name="TITLE_5f_AND_5f_BODY" presentation:presentation-page-layout-name="AL2T1">
        <draw:frame draw:name="Google Shape;132;p24" presentation:style-name="pr5" draw:text-style-name="P8" draw:layer="layout" svg:width="23.667cm" svg:height="1.59cm" svg:x="0.866cm" svg:y="1.236cm" presentation:class="title" presentation:user-transformed="true">
          <draw:text-box>
            <text:p text:style-name="P1"><text:span text:style-name="T5">Middleware – composites</text:span></text:p>
          </draw:text-box>
        </draw:frame>
        <draw:frame draw:name="Google Shape;133;p24" presentation:style-name="pr11" draw:text-style-name="P7" draw:layer="layout" svg:width="16.486cm" svg:height="6.903cm" svg:x="8.048cm" svg:y="3.201cm" presentation:class="outline" presentation:user-transformed="true">
          <draw:text-box>
            <text:p text:style-name="P15"><text:span text:style-name="T12">Message Bus</text:span><text:span text:style-name="T11"> is a </text:span><text:span text:style-name="T12">Middleware</text:span><text:span text:style-name="T11"> with an </text:span><text:span text:style-name="T12">Adapter</text:span><text:span text:style-name="T11"> per client component.</text:span></text:p>
            <text:p text:style-name="P16"><text:span text:style-name="T11">The </text:span><text:span text:style-name="T12">Adapters</text:span><text:span text:style-name="T11"> translate between the components’ protocols and the protocol used inside the </text:span><text:span text:style-name="T12">Message Bus</text:span><text:span text:style-name="T11">.</text:span></text:p>
            <text:p text:style-name="P22"><text:span text:style-name="T11">That enables the integration of legacy subsystems without making them communicate in a uniform manner.</text:span></text:p>
          </draw:text-box>
        </draw:frame>
        <draw:frame draw:name="Google Shape;134;p24" presentation:style-name="pr4" draw:text-style-name="P7" draw:layer="layout" svg:width="23.667cm" svg:height="3.001cm" svg:x="0.866cm" svg:y="10.572cm" presentation:class="outline" presentation:user-transformed="true">
          <draw:text-box>
            <text:p text:style-name="P17"><text:span text:style-name="T13">Message Bus</text:span><text:span text:style-name="T14"> allows for integrating legacy services.</text:span></text:p>
            <text:p text:style-name="P18"><text:span text:style-name="T15">However, protocol translation slows down the communication.</text:span></text:p>
          </draw:text-box>
        </draw:frame>
        <draw:custom-shape draw:name="Google Shape;135;p24" draw:style-name="gr3" draw:text-style-name="P19" draw:layer="layout" svg:width="5.82cm" svg:height="1.271cm" svg:x="1.322cm" svg:y="8.823cm">
          <text:p text:style-name="P1"><text:span text:style-name="T16">Message B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6;p24" draw:style-name="gr2" draw:text-style-name="P12" draw:layer="layout" svg:width="6.068cm" svg:height="4.73cm" svg:x="1.198cm" svg:y="3.898cm">
          <draw:image xlink:href="Pictures/10000201000002D600000236B5132C55C988699C.png" xlink:type="simple" xlink:show="embed" xlink:actuate="onLoad">
            <text:p/>
          </draw:image>
        </draw:frame>
        <presentation:notes draw:style-name="dp2">
          <draw:page-thumbnail draw:name="Google Shape;129;g3af6095df7f_0_3:notes" draw:style-name="gr1" draw:layer="layout" svg:width="16.932cm" svg:height="9.524cm" svg:x="1.059cm" svg:y="1.905cm" draw:page-number="12" presentation:class="page"/>
          <draw:frame draw:name="Google Shape;130;g3af6095df7f_0_3:notes" presentation:style-name="pr23" draw:text-style-name="P4" draw:layer="layout" svg:width="15.239cm" svg:height="11.429cm" svg:x="1.905cm" svg:y="12.065cm" presentation:class="notes" presentation:placeholder="true" presentation:user-transformed="true">
            <draw:text-box/>
          </draw:frame>
        </presentation:notes>
      </draw:page>
      <draw:page draw:name="Middleware – composites" draw:style-name="dp1" draw:master-page-name="TITLE_5f_AND_5f_BODY" presentation:presentation-page-layout-name="AL2T1">
        <draw:frame draw:name="Google Shape;141;p25" presentation:style-name="pr5" draw:text-style-name="P8" draw:layer="layout" svg:width="23.667cm" svg:height="1.59cm" svg:x="0.866cm" svg:y="1.236cm" presentation:class="title" presentation:user-transformed="true">
          <draw:text-box>
            <text:p text:style-name="P1"><text:span text:style-name="T5">Middleware – composites</text:span></text:p>
          </draw:text-box>
        </draw:frame>
        <draw:frame draw:name="Google Shape;142;p25" presentation:style-name="pr11" draw:text-style-name="P7" draw:layer="layout" svg:width="16.42cm" svg:height="6.903cm" svg:x="8.115cm" svg:y="3.201cm" presentation:class="outline" presentation:user-transformed="true">
          <draw:text-box>
            <text:p text:style-name="P15"><text:span text:style-name="T12">Enterprise Service Bus</text:span><text:span text:style-name="T11"> (</text:span><text:span text:style-name="T12">ESB</text:span><text:span text:style-name="T11">) is </text:span><text:span text:style-name="T12">Event Mediator</text:span><text:span text:style-name="T11"> + </text:span><text:span text:style-name="T12">Message Bus</text:span><text:span text:style-name="T11">.</text:span></text:p>
            <text:p text:style-name="P16"><text:span text:style-name="T11">It orchestrates the system by knowing the destination for every kind of message, just like an </text:span><text:span text:style-name="T12">Event Mediator</text:span><text:span text:style-name="T11">.</text:span></text:p>
            <text:p text:style-name="P22"><text:span text:style-name="T11">It translates between protocols like a </text:span><text:span text:style-name="T12">Message Bus</text:span><text:span text:style-name="T11">.</text:span></text:p>
          </draw:text-box>
        </draw:frame>
        <draw:frame draw:name="Google Shape;143;p25" presentation:style-name="pr4" draw:text-style-name="P7" draw:layer="layout" svg:width="23.667cm" svg:height="3.001cm" svg:x="0.866cm" svg:y="10.572cm" presentation:class="outline" presentation:user-transformed="true">
          <draw:text-box>
            <text:p text:style-name="P17"><text:span text:style-name="T13">ESB</text:span><text:span text:style-name="T14">s integrate legacy subsystems in enterprise networks.</text:span></text:p>
            <text:p text:style-name="P18"><text:span text:style-name="T15">They tend to become very complicated, undermining development.</text:span></text:p>
          </draw:text-box>
        </draw:frame>
        <draw:custom-shape draw:name="Google Shape;144;p25" draw:style-name="gr3" draw:text-style-name="P19" draw:layer="layout" svg:width="7.065cm" svg:height="1.271cm" svg:x="0.932cm" svg:y="9.289cm">
          <text:p text:style-name="P1"><text:span text:style-name="T16">Enterprise Service B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5;p25" draw:style-name="gr2" draw:text-style-name="P12" draw:layer="layout" svg:width="5.647cm" svg:height="5.847cm" svg:x="1.575cm" svg:y="3.441cm">
          <draw:image xlink:href="Pictures/10000201000004160000043B0D7141A9A9C7ECE4.png" xlink:type="simple" xlink:show="embed" xlink:actuate="onLoad">
            <text:p/>
          </draw:image>
        </draw:frame>
        <presentation:notes draw:style-name="dp2">
          <draw:page-thumbnail draw:name="Google Shape;138;g3af6095df7f_0_17:notes" draw:style-name="gr1" draw:layer="layout" svg:width="16.932cm" svg:height="9.524cm" svg:x="1.059cm" svg:y="1.905cm" draw:page-number="13" presentation:class="page"/>
          <draw:frame draw:name="Google Shape;139;g3af6095df7f_0_17:notes" presentation:style-name="pr24" draw:text-style-name="P4" draw:layer="layout" svg:width="15.239cm" svg:height="11.429cm" svg:x="1.905cm" svg:y="12.065cm" presentation:class="notes" presentation:placeholder="true" presentation:user-transformed="true">
            <draw:text-box/>
          </draw:frame>
        </presentation:notes>
      </draw:page>
      <draw:page draw:name="Shared Repository" draw:style-name="dp1" draw:master-page-name="SECTION_5f_HEADER">
        <draw:frame draw:name="Google Shape;150;p26" presentation:style-name="pr8" draw:text-style-name="P13" draw:layer="layout" svg:width="23.667cm" svg:height="2.337cm" svg:x="0.866cm" svg:y="4.805cm" presentation:class="title" presentation:user-transformed="true">
          <draw:text-box>
            <text:p text:style-name="P1"><text:span text:style-name="T9">Shared Repository</text:span></text:p>
          </draw:text-box>
        </draw:frame>
        <draw:frame draw:name="Google Shape;151;p26" presentation:style-name="pr9" draw:text-style-name="P14" draw:layer="layout" svg:width="23.667cm" svg:height="2.201cm" svg:x="0.866cm" svg:y="7.144cm" presentation:class="subtitle" presentation:user-transformed="true">
          <draw:text-box>
            <text:p text:style-name="P11"><text:span text:style-name="T10">A data layer</text:span></text:p>
          </draw:text-box>
        </draw:frame>
        <presentation:notes draw:style-name="dp2">
          <draw:page-thumbnail draw:name="Google Shape;147;g3ace7d219c8_0_8:notes" draw:style-name="gr1" draw:layer="layout" svg:width="16.932cm" svg:height="9.524cm" svg:x="1.059cm" svg:y="1.905cm" draw:page-number="14" presentation:class="page"/>
          <draw:frame draw:name="Google Shape;148;g3ace7d219c8_0_8:notes" presentation:style-name="pr25" draw:text-style-name="P4" draw:layer="layout" svg:width="15.239cm" svg:height="11.429cm" svg:x="1.905cm" svg:y="12.065cm" presentation:class="notes" presentation:placeholder="true" presentation:user-transformed="true">
            <draw:text-box/>
          </draw:frame>
        </presentation:notes>
      </draw:page>
      <draw:page draw:name="Shared Repository – overview" draw:style-name="dp1" draw:master-page-name="TITLE_5f_AND_5f_BODY" presentation:presentation-page-layout-name="AL2T1">
        <draw:frame draw:name="Google Shape;156;p27" presentation:style-name="pr5" draw:text-style-name="P8" draw:layer="layout" svg:width="23.667cm" svg:height="1.59cm" svg:x="0.866cm" svg:y="1.236cm" presentation:class="title" presentation:user-transformed="true">
          <draw:text-box>
            <text:p text:style-name="P1"><text:span text:style-name="T5">Shared Repository – overview</text:span></text:p>
          </draw:text-box>
        </draw:frame>
        <draw:frame draw:name="Google Shape;157;p27" presentation:style-name="pr11" draw:text-style-name="P7" draw:layer="layout" svg:width="15.39cm" svg:height="6.903cm" svg:x="9.143cm" svg:y="3.201cm" presentation:class="outline" presentation:user-transformed="true">
          <draw:text-box>
            <text:p text:style-name="P15"><text:span text:style-name="T12">A Shared Repository</text:span><text:span text:style-name="T11"> is a data layer shared by other system components. Its functions include:</text:span></text:p>
            <text:list text:style-name="L9">
              <text:list-item>
                <text:p text:style-name="P16"><text:span text:style-name="T12">Persistence</text:span><text:span text:style-name="T11"> – storing the data.</text:span></text:p>
              </text:list-item>
              <text:list-item>
                <text:p text:style-name="P15"><text:span text:style-name="T12">Consistency</text:span><text:span text:style-name="T11"> – providing atomic transactions.</text:span></text:p>
              </text:list-item>
              <text:list-item>
                <text:p text:style-name="P15"><text:span text:style-name="T12">Notifications</text:span><text:span text:style-name="T11"> – letting a component know when data changes.</text:span></text:p>
              </text:list-item>
            </text:list>
          </draw:text-box>
        </draw:frame>
        <draw:frame draw:name="Google Shape;158;p27" presentation:style-name="pr4" draw:text-style-name="P7" draw:layer="layout" svg:width="23.667cm" svg:height="3.001cm" svg:x="0.866cm" svg:y="10.572cm" presentation:class="outline" presentation:user-transformed="true">
          <draw:text-box>
            <text:p text:style-name="P17"><text:span text:style-name="T13">Shared Repository</text:span><text:span text:style-name="T14"> enables data-centric or simple projects.</text:span></text:p>
            <text:p text:style-name="P18"><text:span text:style-name="T15">It may not be flexible enough for high-load or evolving domains.</text:span></text:p>
          </draw:text-box>
        </draw:frame>
        <draw:custom-shape draw:name="Google Shape;159;p27" draw:style-name="gr3" draw:text-style-name="P19" draw:layer="layout" svg:width="5.82cm" svg:height="1.271cm" svg:x="2.066cm" svg:y="8.477cm">
          <text:p text:style-name="P1"><text:span text:style-name="T16">Shared Reposi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0;p27" draw:style-name="gr2" draw:text-style-name="P12" draw:layer="layout" svg:width="6.599cm" svg:height="4.417cm" svg:x="1.676cm" svg:y="3.934cm">
          <draw:image xlink:href="Pictures/10000201000002D6000001E6B00519EB2489679B.png" xlink:type="simple" xlink:show="embed" xlink:actuate="onLoad">
            <text:p/>
          </draw:image>
        </draw:frame>
        <presentation:notes draw:style-name="dp2">
          <draw:page-thumbnail draw:name="Google Shape;153;g3acdfc7e991_0_20:notes" draw:style-name="gr1" draw:layer="layout" svg:width="16.932cm" svg:height="9.524cm" svg:x="1.059cm" svg:y="1.905cm" draw:page-number="15" presentation:class="page"/>
          <draw:frame draw:name="Google Shape;154;g3acdfc7e991_0_20:notes" presentation:style-name="pr26" draw:text-style-name="P4" draw:layer="layout" svg:width="15.239cm" svg:height="11.429cm" svg:x="1.905cm" svg:y="12.065cm" presentation:class="notes" presentation:placeholder="true" presentation:user-transformed="true">
            <draw:text-box/>
          </draw:frame>
        </presentation:notes>
      </draw:page>
      <draw:page draw:name="Shared Repository – trade-offs" draw:style-name="dp1" draw:master-page-name="TITLE_5f_AND_5f_TWO_5f_COLUMNS" presentation:presentation-page-layout-name="AL3T3">
        <draw:frame draw:name="Google Shape;165;p28" presentation:style-name="pr13" draw:text-style-name="P8" draw:layer="layout" svg:width="23.667cm" svg:height="1.59cm" svg:x="0.866cm" svg:y="1.236cm" presentation:class="title" presentation:user-transformed="true">
          <draw:text-box>
            <text:p text:style-name="P1"><text:span text:style-name="T5">Shared Repository – trade-offs</text:span></text:p>
          </draw:text-box>
        </draw:frame>
        <draw:frame draw:name="Google Shape;166;p28" presentation:style-name="pr14" draw:text-style-name="P19" draw:layer="layout" svg:width="11.11cm" svg:height="9.061cm" svg:x="0.866cm" svg:y="3.201cm" presentation:class="outline" presentation:user-transformed="true">
          <draw:text-box>
            <text:p text:style-name="P20"><text:span text:style-name="T17">Supports coupled data</text:span></text:p>
            <text:p text:style-name="P16"><text:span text:style-name="T17">Grants data consistency</text:span></text:p>
            <text:p text:style-name="P16"><text:span text:style-name="T17">Helps saving on hardware and administration</text:span></text:p>
            <text:p text:style-name="P22"><text:span text:style-name="T17">Allows for a quick start of a project</text:span></text:p>
          </draw:text-box>
        </draw:frame>
        <draw:frame draw:name="Google Shape;167;p28" presentation:style-name="pr15" draw:text-style-name="P19" draw:layer="layout" svg:width="11.457cm" svg:height="9.061cm" svg:x="13.076cm" svg:y="3.201cm" presentation:class="outline" presentation:user-transformed="true">
          <draw:text-box>
            <text:p text:style-name="P20"><text:span text:style-name="T18">Couples its clients to a shared schema</text:span></text:p>
            <text:p text:style-name="P16"><text:span text:style-name="T18">Has a limited scalability</text:span></text:p>
            <text:p text:style-name="P16"><text:span text:style-name="T18">May not fit the needs of its clients equally well</text:span></text:p>
            <text:p text:style-name="P22"><text:span text:style-name="T18">May be a single point of failure</text:span></text:p>
          </draw:text-box>
        </draw:frame>
        <presentation:notes draw:style-name="dp2">
          <draw:page-thumbnail draw:name="Google Shape;162;g3acdfc7e991_0_28:notes" draw:style-name="gr1" draw:layer="layout" svg:width="16.932cm" svg:height="9.524cm" svg:x="1.059cm" svg:y="1.905cm" draw:page-number="16" presentation:class="page"/>
          <draw:frame draw:name="Google Shape;163;g3acdfc7e991_0_28:notes" presentation:style-name="pr27" draw:text-style-name="P4" draw:layer="layout" svg:width="15.239cm" svg:height="11.429cm" svg:x="1.905cm" svg:y="12.065cm" presentation:class="notes" presentation:placeholder="true" presentation:user-transformed="true">
            <draw:text-box/>
          </draw:frame>
        </presentation:notes>
      </draw:page>
      <draw:page draw:name="Shared Repository – variants" draw:style-name="dp1" draw:master-page-name="TITLE_5f_AND_5f_TWO_5f_COLUMNS" presentation:presentation-page-layout-name="AL3T3">
        <draw:frame draw:name="Google Shape;172;p29" presentation:style-name="pr13" draw:text-style-name="P8" draw:layer="layout" svg:width="23.667cm" svg:height="1.59cm" svg:x="0.866cm" svg:y="1.236cm" presentation:class="title" presentation:user-transformed="true">
          <draw:text-box>
            <text:p text:style-name="P1"><text:span text:style-name="T5">Shared Repository – variants</text:span></text:p>
          </draw:text-box>
        </draw:frame>
        <draw:frame draw:name="Google Shape;173;p29" draw:style-name="standard" draw:layer="layout" svg:width="18.74cm" svg:height="5.582cm" svg:x="3.329cm" svg:y="4.771cm">
          <table:table>
            <table:table-column table:style-name="co1"/>
            <table:table-column table:style-name="co2"/>
            <table:table-row table:style-name="ro1" table:default-cell-style-name="ce1">
              <table:table-cell>
                <text:p text:style-name="P23"><text:span text:style-name="T11">Pattern</text:span></text:p>
              </table:table-cell>
              <table:table-cell>
                <text:p text:style-name="P23"><text:span text:style-name="T11">Usage example</text:span></text:p>
              </table:table-cell>
            </table:table-row>
            <table:table-row table:style-name="ro1" table:default-cell-style-name="ce1">
              <table:table-cell>
                <text:p text:style-name="P24"><text:span text:style-name="T19">Shared memory</text:span></text:p>
              </table:table-cell>
              <table:table-cell>
                <text:p text:style-name="P24"><text:span text:style-name="T11">Instant communication in HFT</text:span></text:p>
              </table:table-cell>
            </table:table-row>
            <table:table-row table:style-name="ro1" table:default-cell-style-name="ce1">
              <table:table-cell>
                <text:p text:style-name="P24"><text:span text:style-name="T19">Shared file system</text:span></text:p>
              </table:table-cell>
              <table:table-cell>
                <text:p text:style-name="P24"><text:span text:style-name="T11">ETL pipelines</text:span></text:p>
              </table:table-cell>
            </table:table-row>
            <table:table-row table:style-name="ro2" table:default-cell-style-name="ce1">
              <table:table-cell>
                <text:p text:style-name="P24"><text:span text:style-name="T19">Shared database, integration database</text:span></text:p>
              </table:table-cell>
              <table:table-cell>
                <text:p text:style-name="P24"><text:span text:style-name="T11">Data-centric domains (seat reservation), quick start of service-based projects</text:span></text:p>
              </table:table-cell>
            </table:table-row>
          </table:table>
          <draw:image xlink:href="Pictures/TablePreview1.svm" xlink:type="simple" xlink:show="embed" xlink:actuate="onLoad"/>
        </draw:frame>
        <presentation:notes draw:style-name="dp2">
          <draw:page-thumbnail draw:name="Google Shape;169;g3ad2927f46e_0_0:notes" draw:style-name="gr1" draw:layer="layout" svg:width="16.932cm" svg:height="9.524cm" svg:x="1.059cm" svg:y="1.905cm" draw:page-number="17" presentation:class="page"/>
          <draw:frame draw:name="Google Shape;170;g3ad2927f46e_0_0:notes" presentation:style-name="pr28" draw:text-style-name="P4" draw:layer="layout" svg:width="15.239cm" svg:height="11.429cm" svg:x="1.905cm" svg:y="12.065cm" presentation:class="notes" presentation:placeholder="true" presentation:user-transformed="true">
            <draw:text-box/>
          </draw:frame>
        </presentation:notes>
      </draw:page>
      <draw:page draw:name="Shared Repository – examples" draw:style-name="dp1" draw:master-page-name="TITLE_5f_AND_5f_BODY" presentation:presentation-page-layout-name="AL2T1">
        <draw:frame draw:name="Google Shape;178;p30" presentation:style-name="pr5" draw:text-style-name="P8" draw:layer="layout" svg:width="23.667cm" svg:height="1.59cm" svg:x="0.866cm" svg:y="1.236cm" presentation:class="title" presentation:user-transformed="true">
          <draw:text-box>
            <text:p text:style-name="P1"><text:span text:style-name="T5">Shared Repository – examples</text:span></text:p>
          </draw:text-box>
        </draw:frame>
        <draw:frame draw:name="Google Shape;179;p30" presentation:style-name="pr11" draw:text-style-name="P7" draw:layer="layout" svg:width="15.988cm" svg:height="8.612cm" svg:x="8.546cm" svg:y="3.201cm" presentation:class="outline" presentation:user-transformed="true">
          <draw:text-box>
            <text:p text:style-name="P15"><text:span text:style-name="T12">Blackboard</text:span><text:span text:style-name="T11"> was used for non-deterministic calculations.</text:span></text:p>
            <text:p text:style-name="P16"><text:span text:style-name="T11">An individual algorithm (</text:span><text:span text:style-name="T12">knowledge source</text:span><text:span text:style-name="T11">) reads whatever inputs it needs from the blackboard and adds its output to the blackboard.</text:span></text:p>
            <text:p text:style-name="P16"><text:span text:style-name="T11">The scheduler (</text:span><text:span text:style-name="T12">control</text:span><text:span text:style-name="T11">) chooses the best algorithm to run next based on the data currently available on the blackboard.</text:span></text:p>
            <text:p text:style-name="P22"><text:span text:style-name="T11"/></text:p>
          </draw:text-box>
        </draw:frame>
        <draw:custom-shape draw:name="Google Shape;180;p30" draw:style-name="gr3" draw:text-style-name="P19" draw:layer="layout" svg:width="5.82cm" svg:height="1.271cm" svg:x="1.836cm" svg:y="9.686cm">
          <text:p text:style-name="P1"><text:span text:style-name="T16">Black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1;p30" draw:style-name="gr2" draw:text-style-name="P12" draw:layer="layout" svg:width="6.296cm" svg:height="5.602cm" svg:x="1.598cm" svg:y="4cm">
          <draw:image xlink:href="Pictures/10000201000002D60000028611BD762F46DEC009.png" xlink:type="simple" xlink:show="embed" xlink:actuate="onLoad">
            <text:p/>
          </draw:image>
        </draw:frame>
        <presentation:notes draw:style-name="dp2">
          <draw:page-thumbnail draw:name="Google Shape;175;g3ad2927f46e_0_7:notes" draw:style-name="gr1" draw:layer="layout" svg:width="16.932cm" svg:height="9.524cm" svg:x="1.059cm" svg:y="1.905cm" draw:page-number="18" presentation:class="page"/>
          <draw:frame draw:name="Google Shape;176;g3ad2927f46e_0_7:notes" presentation:style-name="pr29" draw:text-style-name="P4" draw:layer="layout" svg:width="15.239cm" svg:height="11.429cm" svg:x="1.905cm" svg:y="12.065cm" presentation:class="notes" presentation:placeholder="true" presentation:user-transformed="true">
            <draw:text-box/>
          </draw:frame>
        </presentation:notes>
      </draw:page>
      <draw:page draw:name="Shared Repository – examples" draw:style-name="dp1" draw:master-page-name="TITLE_5f_AND_5f_BODY" presentation:presentation-page-layout-name="AL2T1">
        <draw:frame draw:name="Google Shape;186;p31" presentation:style-name="pr5" draw:text-style-name="P8" draw:layer="layout" svg:width="23.667cm" svg:height="1.59cm" svg:x="0.866cm" svg:y="1.236cm" presentation:class="title" presentation:user-transformed="true">
          <draw:text-box>
            <text:p text:style-name="P1"><text:span text:style-name="T5">Shared Repository – examples</text:span></text:p>
          </draw:text-box>
        </draw:frame>
        <draw:frame draw:name="Google Shape;187;p31" presentation:style-name="pr11" draw:text-style-name="P7" draw:layer="layout" svg:width="16.121cm" svg:height="7.988cm" svg:x="8.413cm" svg:y="3.201cm" presentation:class="outline" presentation:user-transformed="true">
          <draw:text-box>
            <text:p text:style-name="P15"><text:span text:style-name="T12">Data Grid</text:span><text:span text:style-name="T11"> is a virtual shared dictionary that runs in a </text:span><text:span text:style-name="T12">Mesh</text:span><text:span text:style-name="T11">. It is the foundation of </text:span><text:span text:style-name="T12">Space-Based Architecture</text:span><text:span text:style-name="T11">.</text:span></text:p>
            <text:p text:style-name="P16"><text:span text:style-name="T11">Every instance of every service in the system has a </text:span><text:span text:style-name="T12">replica</text:span><text:span text:style-name="T11"> of the entire system’s dataset. When a service ()writes to its </text:span><text:span text:style-name="T12">replica</text:span><text:span text:style-name="T11">, the </text:span><text:span text:style-name="T12">Data Replication Engine</text:span><text:span text:style-name="T11"> copies the changes to every other system component.</text:span></text:p>
            <text:p text:style-name="P22"><text:span text:style-name="T11">The changes are also persisted to a database.</text:span></text:p>
          </draw:text-box>
        </draw:frame>
        <draw:custom-shape draw:name="Google Shape;188;p31" draw:style-name="gr3" draw:text-style-name="P19" draw:layer="layout" svg:width="5.82cm" svg:height="1.271cm" svg:x="1.667cm" svg:y="9.588cm">
          <text:p text:style-name="P1"><text:span text:style-name="T16">Data Gr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9;p31" presentation:style-name="pr4" draw:text-style-name="P7" draw:layer="layout" svg:width="23.667cm" svg:height="3.001cm" svg:x="0.866cm" svg:y="10.572cm" presentation:class="outline" presentation:user-transformed="true">
          <draw:text-box>
            <text:p text:style-name="P17"><text:span text:style-name="T13">Data Grid</text:span><text:span text:style-name="T14"> is extremely scalable and elastic...</text:span></text:p>
            <text:p text:style-name="P18"><text:span text:style-name="T15">…</text:span><text:span text:style-name="T15">but frequent writes may result in conflicts.</text:span></text:p>
          </draw:text-box>
        </draw:frame>
        <draw:frame draw:name="Google Shape;190;p31" draw:style-name="gr2" draw:text-style-name="P12" draw:layer="layout" svg:width="5.137cm" svg:height="6.461cm" svg:x="2.008cm" svg:y="3.126cm">
          <draw:image xlink:href="Pictures/100002010000043E000005562E76FABA39D96249.png" xlink:type="simple" xlink:show="embed" xlink:actuate="onLoad">
            <text:p/>
          </draw:image>
        </draw:frame>
        <presentation:notes draw:style-name="dp2">
          <draw:page-thumbnail draw:name="Google Shape;183;g3af6ef1896f_0_0:notes" draw:style-name="gr1" draw:layer="layout" svg:width="16.932cm" svg:height="9.524cm" svg:x="1.059cm" svg:y="1.905cm" draw:page-number="19" presentation:class="page"/>
          <draw:frame draw:name="Google Shape;184;g3af6ef1896f_0_0:notes" presentation:style-name="pr30" draw:text-style-name="P4" draw:layer="layout" svg:width="15.239cm" svg:height="11.429cm" svg:x="1.905cm" svg:y="12.065cm" presentation:class="notes" presentation:placeholder="true" presentation:user-transformed="true">
            <draw:text-box/>
          </draw:frame>
        </presentation:notes>
      </draw:page>
      <draw:page draw:name="Proxy" draw:style-name="dp1" draw:master-page-name="SECTION_5f_HEADER">
        <draw:frame draw:name="Google Shape;195;p32" presentation:style-name="pr8" draw:text-style-name="P13" draw:layer="layout" svg:width="23.667cm" svg:height="2.337cm" svg:x="0.866cm" svg:y="4.805cm" presentation:class="title" presentation:user-transformed="true">
          <draw:text-box>
            <text:p text:style-name="P1"><text:span text:style-name="T9">Proxy</text:span></text:p>
          </draw:text-box>
        </draw:frame>
        <draw:frame draw:name="Google Shape;196;p32" presentation:style-name="pr9" draw:text-style-name="P14" draw:layer="layout" svg:width="23.667cm" svg:height="2.201cm" svg:x="0.866cm" svg:y="7.144cm" presentation:class="subtitle" presentation:user-transformed="true">
          <draw:text-box>
            <text:p text:style-name="P11"><text:span text:style-name="T10">Indirection between a system and its clients</text:span></text:p>
          </draw:text-box>
        </draw:frame>
        <presentation:notes draw:style-name="dp2">
          <draw:page-thumbnail draw:name="Google Shape;192;g3ad3d35e571_0_0:notes" draw:style-name="gr1" draw:layer="layout" svg:width="16.932cm" svg:height="9.524cm" svg:x="1.059cm" svg:y="1.905cm" draw:page-number="20" presentation:class="page"/>
          <draw:frame draw:name="Google Shape;193;g3ad3d35e571_0_0:notes" presentation:style-name="pr31" draw:text-style-name="P4" draw:layer="layout" svg:width="15.239cm" svg:height="11.429cm" svg:x="1.905cm" svg:y="12.065cm" presentation:class="notes" presentation:placeholder="true" presentation:user-transformed="true">
            <draw:text-box/>
          </draw:frame>
        </presentation:notes>
      </draw:page>
      <draw:page draw:name="Proxy – overview" draw:style-name="dp1" draw:master-page-name="TITLE_5f_AND_5f_BODY" presentation:presentation-page-layout-name="AL2T1">
        <draw:frame draw:name="Google Shape;201;p33" presentation:style-name="pr5" draw:text-style-name="P8" draw:layer="layout" svg:width="23.667cm" svg:height="1.59cm" svg:x="0.866cm" svg:y="1.236cm" presentation:class="title" presentation:user-transformed="true">
          <draw:text-box>
            <text:p text:style-name="P1"><text:span text:style-name="T5">Proxy – overview</text:span></text:p>
          </draw:text-box>
        </draw:frame>
        <draw:frame draw:name="Google Shape;202;p33" presentation:style-name="pr11" draw:text-style-name="P7" draw:layer="layout" svg:width="15.988cm" svg:height="6.903cm" svg:x="8.546cm" svg:y="3.201cm" presentation:class="outline" presentation:user-transformed="true">
          <draw:text-box>
            <text:p text:style-name="P15"><text:span text:style-name="T11">A </text:span><text:span text:style-name="T12">Proxy</text:span><text:span text:style-name="T11"> stands between a system and its clients. Its aspects include:</text:span></text:p>
            <text:list text:style-name="L9">
              <text:list-item>
                <text:p text:style-name="P16"><text:span text:style-name="T12">Routing</text:span><text:span text:style-name="T11"> – connecting a client to a component best suited to serve its needs.</text:span></text:p>
              </text:list-item>
              <text:list-item>
                <text:p text:style-name="P15"><text:span text:style-name="T12">Offloading</text:span><text:span text:style-name="T11"> – implementing shared generic aspects such as protocols, logging, authentication, etc.</text:span></text:p>
              </text:list-item>
            </text:list>
          </draw:text-box>
        </draw:frame>
        <draw:frame draw:name="Google Shape;203;p33" presentation:style-name="pr4" draw:text-style-name="P7" draw:layer="layout" svg:width="23.667cm" svg:height="3.001cm" svg:x="0.866cm" svg:y="10.572cm" presentation:class="outline" presentation:user-transformed="true">
          <draw:text-box>
            <text:p text:style-name="P17"><text:span text:style-name="T13">Proxies</text:span><text:span text:style-name="T14"> help with system security, scaling and protocol support…</text:span></text:p>
            <text:p text:style-name="P18"><text:span text:style-name="T15">…</text:span><text:span text:style-name="T15">at the cost of slightly increased latency.</text:span></text:p>
          </draw:text-box>
        </draw:frame>
        <draw:custom-shape draw:name="Google Shape;204;p33" draw:style-name="gr3" draw:text-style-name="P19" draw:layer="layout" svg:width="4.418cm" svg:height="1.271cm" svg:x="2.767cm" svg:y="9.183cm">
          <text:p text:style-name="P1"><text:span text:style-name="T16">Prox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5;p33" draw:style-name="gr2" draw:text-style-name="P12" draw:layer="layout" svg:width="5.633cm" svg:height="5.61cm" svg:x="2.159cm" svg:y="3.466cm">
          <draw:image xlink:href="Pictures/10000201000002D6000002D3AF11F62307113F71.png" xlink:type="simple" xlink:show="embed" xlink:actuate="onLoad">
            <text:p/>
          </draw:image>
        </draw:frame>
        <presentation:notes draw:style-name="dp2">
          <draw:page-thumbnail draw:name="Google Shape;198;g3ad3d35e571_0_5:notes" draw:style-name="gr1" draw:layer="layout" svg:width="16.932cm" svg:height="9.524cm" svg:x="1.059cm" svg:y="1.905cm" draw:page-number="21" presentation:class="page"/>
          <draw:frame draw:name="Google Shape;199;g3ad3d35e571_0_5:notes" presentation:style-name="pr32" draw:text-style-name="P4" draw:layer="layout" svg:width="15.239cm" svg:height="11.429cm" svg:x="1.905cm" svg:y="12.065cm" presentation:class="notes" presentation:placeholder="true" presentation:user-transformed="true">
            <draw:text-box/>
          </draw:frame>
        </presentation:notes>
      </draw:page>
      <draw:page draw:name="Proxy – trade-offs" draw:style-name="dp1" draw:master-page-name="TITLE_5f_AND_5f_TWO_5f_COLUMNS" presentation:presentation-page-layout-name="AL3T3">
        <draw:frame draw:name="Google Shape;210;p34" presentation:style-name="pr13" draw:text-style-name="P8" draw:layer="layout" svg:width="23.667cm" svg:height="1.59cm" svg:x="0.866cm" svg:y="1.236cm" presentation:class="title" presentation:user-transformed="true">
          <draw:text-box>
            <text:p text:style-name="P1"><text:span text:style-name="T5">Proxy – trade-offs</text:span></text:p>
          </draw:text-box>
        </draw:frame>
        <draw:frame draw:name="Google Shape;211;p34" presentation:style-name="pr14" draw:text-style-name="P19" draw:layer="layout" svg:width="11.11cm" svg:height="9.061cm" svg:x="0.866cm" svg:y="3.201cm" presentation:class="outline" presentation:user-transformed="true">
          <draw:text-box>
            <text:p text:style-name="P20"><text:span text:style-name="T17">Implements cross-cutting concerns</text:span></text:p>
            <text:p text:style-name="P16"><text:span text:style-name="T17">Decouples the system from its clients</text:span></text:p>
            <text:p text:style-name="P16"><text:span text:style-name="T17">Acts as a secure perimeter</text:span></text:p>
            <text:p text:style-name="P22"><text:span text:style-name="T17">Is available off the shelf</text:span></text:p>
          </draw:text-box>
        </draw:frame>
        <draw:frame draw:name="Google Shape;212;p34" presentation:style-name="pr15" draw:text-style-name="P19" draw:layer="layout" svg:width="11.341cm" svg:height="9.061cm" svg:x="13.192cm" svg:y="3.201cm" presentation:class="outline" presentation:user-transformed="true">
          <draw:text-box>
            <text:p text:style-name="P20"><text:span text:style-name="T18">Most kinds of </text:span><text:span text:style-name="T20">Proxies</text:span><text:span text:style-name="T18"> degrade latency</text:span></text:p>
            <text:p text:style-name="P22"><text:span text:style-name="T18">May be a single point of failure</text:span></text:p>
          </draw:text-box>
        </draw:frame>
        <presentation:notes draw:style-name="dp2">
          <draw:page-thumbnail draw:name="Google Shape;207;g3ad3d35e571_0_13:notes" draw:style-name="gr1" draw:layer="layout" svg:width="16.932cm" svg:height="9.524cm" svg:x="1.059cm" svg:y="1.905cm" draw:page-number="22" presentation:class="page"/>
          <draw:frame draw:name="Google Shape;208;g3ad3d35e571_0_13:notes" presentation:style-name="pr33" draw:text-style-name="P4" draw:layer="layout" svg:width="15.239cm" svg:height="11.429cm" svg:x="1.905cm" svg:y="12.065cm" presentation:class="notes" presentation:placeholder="true" presentation:user-transformed="true">
            <draw:text-box/>
          </draw:frame>
        </presentation:notes>
      </draw:page>
      <draw:page draw:name="Proxy – transparency" draw:style-name="dp1" draw:master-page-name="TITLE_5f_AND_5f_BODY" presentation:presentation-page-layout-name="AL2T1">
        <draw:frame draw:name="Google Shape;217;p35" draw:style-name="gr2" draw:text-style-name="P12" draw:layer="layout" svg:width="5.998cm" svg:height="6.366cm" svg:x="19.182cm" svg:y="3.96cm">
          <draw:image xlink:href="Pictures/10000201000002AD000002D7B0B6CE5FC5F9E3FA.png" xlink:type="simple" xlink:show="embed" xlink:actuate="onLoad">
            <text:p/>
          </draw:image>
        </draw:frame>
        <draw:frame draw:name="Google Shape;218;p35" draw:style-name="gr2" draw:text-style-name="P12" draw:layer="layout" svg:width="5.998cm" svg:height="6.366cm" svg:x="0.865cm" svg:y="3.913cm">
          <draw:image xlink:href="Pictures/10000201000002AD000002D79C7D9F910D74F023.png" xlink:type="simple" xlink:show="embed" xlink:actuate="onLoad">
            <text:p/>
          </draw:image>
        </draw:frame>
        <draw:frame draw:name="Google Shape;219;p35" presentation:style-name="pr4" draw:text-style-name="P7" draw:layer="layout" svg:width="23.667cm" svg:height="3.001cm" svg:x="0.866cm" svg:y="10.572cm" presentation:class="outline" presentation:user-transformed="true">
          <draw:text-box>
            <text:p text:style-name="P17"><text:span text:style-name="T13">Full Proxies</text:span><text:span text:style-name="T14"> provide more security and control…</text:span></text:p>
            <text:p text:style-name="P18"><text:span text:style-name="T15">…</text:span><text:span text:style-name="T15">at the cost of performance.</text:span></text:p>
          </draw:text-box>
        </draw:frame>
        <draw:frame draw:name="Google Shape;220;p35" presentation:style-name="pr17" draw:text-style-name="P7" draw:layer="layout" svg:width="12.652cm" svg:height="6.949cm" svg:x="6.529cm" svg:y="3.936cm" presentation:class="outline" presentation:user-transformed="true">
          <draw:text-box>
            <text:p text:style-name="P15"><text:span text:style-name="T12">Proxies</text:span><text:span text:style-name="T11"> vary in their level of isolation:</text:span></text:p>
            <text:list text:style-name="L9">
              <text:list-item>
                <text:p text:style-name="P16"><text:span text:style-name="T11">A </text:span><text:span text:style-name="T12">Full Proxy</text:span><text:span text:style-name="T11"> intercepts every request between the client and the system.</text:span></text:p>
              </text:list-item>
              <text:list-item>
                <text:p text:style-name="P21"><text:span text:style-name="T11">A </text:span><text:span text:style-name="T12">Half-Proxy</text:span><text:span text:style-name="T11"> helps the client to establish a direct connection to a system component.</text:span></text:p>
              </text:list-item>
            </text:list>
          </draw:text-box>
        </draw:frame>
        <draw:custom-shape draw:name="Google Shape;221;p35" draw:style-name="gr3" draw:text-style-name="P19" draw:layer="layout" svg:width="4.494cm" svg:height="1.271cm" svg:x="0.865cm" svg:y="9.604cm">
          <text:p text:style-name="P1"><text:span text:style-name="T16">Full Prox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35" draw:style-name="gr3" draw:text-style-name="P19" draw:layer="layout" svg:width="4.912cm" svg:height="1.271cm" svg:x="19.182cm" svg:y="9.604cm">
          <text:p text:style-name="P1"><text:span text:style-name="T16">Half-Prox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3;p35" presentation:style-name="pr5" draw:text-style-name="P8" draw:layer="layout" svg:width="23.667cm" svg:height="1.59cm" svg:x="0.866cm" svg:y="1.236cm" presentation:class="title" presentation:user-transformed="true">
          <draw:text-box>
            <text:p text:style-name="P1"><text:span text:style-name="T5">Proxy – transparency</text:span></text:p>
          </draw:text-box>
        </draw:frame>
        <presentation:notes draw:style-name="dp2">
          <draw:page-thumbnail draw:name="Google Shape;214;g3918c41e8cd_0_26:notes" draw:style-name="gr1" draw:layer="layout" svg:width="16.932cm" svg:height="9.524cm" svg:x="1.059cm" svg:y="1.905cm" draw:page-number="23" presentation:class="page"/>
          <draw:frame draw:name="Google Shape;215;g3918c41e8cd_0_26:notes" presentation:style-name="pr34" draw:text-style-name="P26" draw:layer="layout" svg:width="15.239cm" svg:height="11.429cm" svg:x="1.905cm" svg:y="12.065cm" presentation:class="notes" presentation:user-transformed="true">
            <draw:text-box>
              <text:p text:style-name="P25"><text:span text:style-name="T21"><text:a xlink:href="https://metapatterns.io/basic-metapatterns/layers/" xlink:type="simple">https://metapatterns.io/basic-metapatterns/layers/</text:a></text:span></text:p>
            </draw:text-box>
          </draw:frame>
        </presentation:notes>
      </draw:page>
      <draw:page draw:name="Proxy – placement" draw:style-name="dp1" draw:master-page-name="TITLE_5f_AND_5f_TWO_5f_COLUMNS" presentation:presentation-page-layout-name="AL3T3">
        <draw:frame draw:name="Google Shape;228;p36" presentation:style-name="pr13" draw:text-style-name="P8" draw:layer="layout" svg:width="23.667cm" svg:height="1.59cm" svg:x="0.866cm" svg:y="1.236cm" presentation:class="title" presentation:user-transformed="true">
          <draw:text-box>
            <text:p text:style-name="P1"><text:span text:style-name="T5">Proxy – placement</text:span></text:p>
          </draw:text-box>
        </draw:frame>
        <draw:frame draw:name="Google Shape;229;p36" draw:style-name="standard" draw:layer="layout" svg:width="17.746cm" svg:height="9.367cm" svg:x="3.038cm" svg:y="3.624cm">
          <table:table>
            <table:table-column table:style-name="co3"/>
            <table:table-column table:style-name="co3"/>
            <table:table-column table:style-name="co4"/>
            <table:table-row table:style-name="ro3" table:default-cell-style-name="ce2">
              <table:table-cell/>
              <table:table-cell/>
              <table:table-cell/>
            </table:table-row>
            <table:table-row table:style-name="ro4" table:default-cell-style-name="ce2">
              <table:table-cell>
                <text:p text:style-name="P17"><text:span text:style-name="T16">Standalone</text:span></text:p>
              </table:table-cell>
              <table:table-cell>
                <text:p text:style-name="P17"><text:span text:style-name="T16">Sidecar</text:span></text:p>
              </table:table-cell>
              <table:table-cell>
                <text:p text:style-name="P17"><text:span text:style-name="T16">Ambassador</text:span></text:p>
              </table:table-cell>
            </table:table-row>
            <table:table-row table:style-name="ro5" table:default-cell-style-name="ce2">
              <table:table-cell>
                <text:p text:style-name="P17"><text:span text:style-name="T11">Separate deployment</text:span></text:p>
              </table:table-cell>
              <table:table-cell>
                <text:p text:style-name="P17"><text:span text:style-name="T11">Deployed on the system side</text:span></text:p>
              </table:table-cell>
              <table:table-cell>
                <text:p text:style-name="P17"><text:span text:style-name="T11">Deployed on the client side</text:span></text:p>
              </table:table-cell>
            </table:table-row>
          </table:table>
          <draw:image xlink:href="Pictures/TablePreview2.svm" xlink:type="simple" xlink:show="embed" xlink:actuate="onLoad"/>
        </draw:frame>
        <draw:frame draw:name="Google Shape;230;p36" draw:style-name="gr2" draw:text-style-name="P12" draw:layer="layout" svg:width="4.491cm" svg:height="4.861cm" svg:x="9.666cm" svg:y="4.265cm">
          <draw:image xlink:href="Pictures/10000201000001E60000020E7AD0EDF2473AB598.png" xlink:type="simple" xlink:show="embed" xlink:actuate="onLoad">
            <text:p/>
          </draw:image>
        </draw:frame>
        <draw:frame draw:name="Google Shape;231;p36" draw:style-name="gr2" draw:text-style-name="P12" draw:layer="layout" svg:width="4.491cm" svg:height="4.804cm" svg:x="3.758cm" svg:y="4.293cm">
          <draw:image xlink:href="Pictures/1000020100000286000002B3FF7AF2709087763B.png" xlink:type="simple" xlink:show="embed" xlink:actuate="onLoad">
            <text:p/>
          </draw:image>
        </draw:frame>
        <draw:frame draw:name="Google Shape;232;p36" draw:style-name="gr2" draw:text-style-name="P12" draw:layer="layout" svg:width="4.491cm" svg:height="4.813cm" svg:x="15.573cm" svg:y="4.289cm">
          <draw:image xlink:href="Pictures/10000201000001E80000020B12CD47FCC112927F.png" xlink:type="simple" xlink:show="embed" xlink:actuate="onLoad">
            <text:p/>
          </draw:image>
        </draw:frame>
        <presentation:notes draw:style-name="dp2">
          <draw:page-thumbnail draw:name="Google Shape;225;g3918c41e8cd_0_35:notes" draw:style-name="gr1" draw:layer="layout" svg:width="16.932cm" svg:height="9.524cm" svg:x="1.059cm" svg:y="1.905cm" draw:page-number="24" presentation:class="page"/>
          <draw:frame draw:name="Google Shape;226;g3918c41e8cd_0_35:notes" presentation:style-name="pr35" draw:text-style-name="P4" draw:layer="layout" svg:width="15.239cm" svg:height="11.429cm" svg:x="1.905cm" svg:y="12.065cm" presentation:class="notes" presentation:placeholder="true" presentation:user-transformed="true">
            <draw:text-box/>
          </draw:frame>
        </presentation:notes>
      </draw:page>
      <draw:page draw:name="Proxy – variants" draw:style-name="dp1" draw:master-page-name="TITLE_5f_AND_5f_BODY" presentation:presentation-page-layout-name="AL2T1">
        <draw:frame draw:name="Google Shape;237;p37" presentation:style-name="pr5" draw:text-style-name="P8" draw:layer="layout" svg:width="23.667cm" svg:height="1.59cm" svg:x="0.866cm" svg:y="1.236cm" presentation:class="title" presentation:user-transformed="true">
          <draw:text-box>
            <text:p text:style-name="P1"><text:span text:style-name="T5">Proxy – variants</text:span></text:p>
          </draw:text-box>
        </draw:frame>
        <draw:frame draw:name="Google Shape;238;p37" presentation:style-name="pr11" draw:text-style-name="P7" draw:layer="layout" svg:width="15.988cm" svg:height="8.513cm" svg:x="8.546cm" svg:y="3.201cm" presentation:class="outline" presentation:user-transformed="true">
          <draw:text-box>
            <text:p text:style-name="P15"><text:span text:style-name="T22">A </text:span><text:span text:style-name="T23">Firewall</text:span><text:span text:style-name="T22"> protects the system from being overloaded by client’s requests.</text:span></text:p>
            <text:p text:style-name="P16"><text:span text:style-name="T22">It should also intercept any attempts to establish a malicious connection.</text:span></text:p>
            <text:p text:style-name="P22"><text:span text:style-name="T22">A </text:span><text:span text:style-name="T23">Rate Limiter</text:span><text:span text:style-name="T22"> enforces a limit on the frequency of every client’s requests.</text:span></text:p>
          </draw:text-box>
        </draw:frame>
        <draw:custom-shape draw:name="Google Shape;239;p37" draw:style-name="gr3" draw:text-style-name="P19" draw:layer="layout" svg:width="5.82cm" svg:height="2.033cm" svg:x="1.748cm" svg:y="10.886cm">
          <text:p text:style-name="P1"><text:span text:style-name="T16">Firewall, </text:span></text:p>
          <text:p text:style-name="P1"><text:span text:style-name="T16">Rate Limi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0;p37" draw:style-name="gr2" draw:text-style-name="P12" draw:layer="layout" svg:width="4.414cm" svg:height="7.683cm" svg:x="2.451cm" svg:y="3.201cm">
          <draw:image xlink:href="Pictures/10000201000001E60000034E21D2F043EE22AF6C.png" xlink:type="simple" xlink:show="embed" xlink:actuate="onLoad">
            <text:p/>
          </draw:image>
        </draw:frame>
        <presentation:notes draw:style-name="dp2">
          <draw:page-thumbnail draw:name="Google Shape;234;g3ad3d35e571_0_100:notes" draw:style-name="gr1" draw:layer="layout" svg:width="16.932cm" svg:height="9.524cm" svg:x="1.059cm" svg:y="1.905cm" draw:page-number="25" presentation:class="page"/>
          <draw:frame draw:name="Google Shape;235;g3ad3d35e571_0_100:notes" presentation:style-name="pr36" draw:text-style-name="P4" draw:layer="layout" svg:width="15.239cm" svg:height="11.429cm" svg:x="1.905cm" svg:y="12.065cm" presentation:class="notes" presentation:placeholder="true" presentation:user-transformed="true">
            <draw:text-box/>
          </draw:frame>
        </presentation:notes>
      </draw:page>
      <draw:page draw:name="Proxy – variants" draw:style-name="dp1" draw:master-page-name="TITLE_5f_AND_5f_BODY" presentation:presentation-page-layout-name="AL2T1">
        <draw:frame draw:name="Google Shape;245;p38" presentation:style-name="pr5" draw:text-style-name="P8" draw:layer="layout" svg:width="23.667cm" svg:height="1.59cm" svg:x="0.866cm" svg:y="1.236cm" presentation:class="title" presentation:user-transformed="true">
          <draw:text-box>
            <text:p text:style-name="P1"><text:span text:style-name="T5">Proxy – variants</text:span></text:p>
          </draw:text-box>
        </draw:frame>
        <draw:frame draw:name="Google Shape;246;p38" presentation:style-name="pr11" draw:text-style-name="P7" draw:layer="layout" svg:width="12.246cm" svg:height="8.513cm" svg:x="7.053cm" svg:y="3.201cm" presentation:class="outline" presentation:user-transformed="true">
          <draw:text-box>
            <text:p text:style-name="P15"><text:span text:style-name="T22">A </text:span><text:span text:style-name="T23">Response Cache</text:span><text:span text:style-name="T22"> remembers what the system answers to clients’ requests.</text:span></text:p>
            <text:p text:style-name="P22"><text:span text:style-name="T22">If it sees a request identical to any one it has seen before, it returns the answer from its memory without consulting the underlying system.</text:span></text:p>
          </draw:text-box>
        </draw:frame>
        <draw:custom-shape draw:name="Google Shape;247;p38" draw:style-name="gr3" draw:text-style-name="P19" draw:layer="layout" svg:width="5.82cm" svg:height="2.033cm" svg:x="0.545cm" svg:y="10.889cm">
          <text:p text:style-name="P1"><text:span text:style-name="T16">Response Cache</text:span><text:span text:style-name="T19"> – not match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38" draw:style-name="gr3" draw:text-style-name="P19" draw:layer="layout" svg:width="5.82cm" svg:height="2.033cm" svg:x="19.012cm" svg:y="10.889cm">
          <text:p text:style-name="P1"><text:span text:style-name="T16">Response Cache</text:span><text:span text:style-name="T19"> – match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9;p38" draw:style-name="gr2" draw:text-style-name="P12" draw:layer="layout" svg:width="3.292cm" svg:height="6.862cm" svg:x="20.276cm" svg:y="3.712cm">
          <draw:image xlink:href="Pictures/10000201000001960000034EA9227B3A932B2237.png" xlink:type="simple" xlink:show="embed" xlink:actuate="onLoad">
            <text:p/>
          </draw:image>
        </draw:frame>
        <draw:frame draw:name="Google Shape;250;p38" draw:style-name="gr2" draw:text-style-name="P12" draw:layer="layout" svg:width="3.292cm" svg:height="6.862cm" svg:x="1.809cm" svg:y="3.712cm">
          <draw:image xlink:href="Pictures/10000201000001960000034E1B359B7B562C192F.png" xlink:type="simple" xlink:show="embed" xlink:actuate="onLoad">
            <text:p/>
          </draw:image>
        </draw:frame>
        <presentation:notes draw:style-name="dp2">
          <draw:page-thumbnail draw:name="Google Shape;242;g3af6ef1896f_0_9:notes" draw:style-name="gr1" draw:layer="layout" svg:width="16.932cm" svg:height="9.524cm" svg:x="1.059cm" svg:y="1.905cm" draw:page-number="26" presentation:class="page"/>
          <draw:frame draw:name="Google Shape;243;g3af6ef1896f_0_9:notes" presentation:style-name="pr37" draw:text-style-name="P4" draw:layer="layout" svg:width="15.239cm" svg:height="11.429cm" svg:x="1.905cm" svg:y="12.065cm" presentation:class="notes" presentation:placeholder="true" presentation:user-transformed="true">
            <draw:text-box/>
          </draw:frame>
        </presentation:notes>
      </draw:page>
      <draw:page draw:name="Proxy – variants" draw:style-name="dp1" draw:master-page-name="TITLE_5f_AND_5f_BODY" presentation:presentation-page-layout-name="AL2T1">
        <draw:frame draw:name="Google Shape;255;p39" presentation:style-name="pr5" draw:text-style-name="P8" draw:layer="layout" svg:width="23.667cm" svg:height="1.59cm" svg:x="0.866cm" svg:y="1.236cm" presentation:class="title" presentation:user-transformed="true">
          <draw:text-box>
            <text:p text:style-name="P1"><text:span text:style-name="T5">Proxy – variants</text:span></text:p>
          </draw:text-box>
        </draw:frame>
        <draw:frame draw:name="Google Shape;256;p39" presentation:style-name="pr11" draw:text-style-name="P7" draw:layer="layout" svg:width="11.167cm" svg:height="8.513cm" svg:x="7.116cm" svg:y="3.284cm" presentation:class="outline" presentation:user-transformed="true">
          <draw:text-box>
            <text:p text:style-name="P15"><text:span text:style-name="T22">A </text:span><text:span text:style-name="T23">Load Balancer</text:span><text:span text:style-name="T22"> uniformly distributes client requests among the underlying instances of a service to make sure that no instance is overloaded.</text:span></text:p>
            <text:p text:style-name="P22"><text:span text:style-name="T22">A </text:span><text:span text:style-name="T23">Sharding Proxy</text:span><text:span text:style-name="T22"> connects each client to a shard that contains the client’s data.</text:span></text:p>
          </draw:text-box>
        </draw:frame>
        <draw:custom-shape draw:name="Google Shape;257;p39" draw:style-name="gr3" draw:text-style-name="P19" draw:layer="layout" svg:width="5.82cm" svg:height="1.271cm" svg:x="0.742cm" svg:y="11.35cm">
          <text:p text:style-name="P1"><text:span text:style-name="T16">Load Balanc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39" draw:style-name="gr3" draw:text-style-name="P19" draw:layer="layout" svg:width="5.82cm" svg:height="1.271cm" svg:x="18.6cm" svg:y="11.35cm">
          <text:p text:style-name="P1"><text:span text:style-name="T16">Sharding Prox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9;p39" draw:style-name="gr2" draw:text-style-name="P12" draw:layer="layout" svg:width="4.361cm" svg:height="7.649cm" svg:x="1.472cm" svg:y="3.319cm">
          <draw:image xlink:href="Pictures/100002010000019E000002D6EDB312541DACBDFF.png" xlink:type="simple" xlink:show="embed" xlink:actuate="onLoad">
            <text:p/>
          </draw:image>
        </draw:frame>
        <draw:frame draw:name="Google Shape;260;p39" draw:style-name="gr2" draw:text-style-name="P12" draw:layer="layout" svg:width="4.699cm" svg:height="7.649cm" svg:x="19.161cm" svg:y="3.319cm">
          <draw:image xlink:href="Pictures/10000201000001BE000002D60A1F1EC18742D5C9.png" xlink:type="simple" xlink:show="embed" xlink:actuate="onLoad">
            <text:p/>
          </draw:image>
        </draw:frame>
        <presentation:notes draw:style-name="dp2">
          <draw:page-thumbnail draw:name="Google Shape;252;g3af6ef1896f_0_15:notes" draw:style-name="gr1" draw:layer="layout" svg:width="16.932cm" svg:height="9.524cm" svg:x="1.059cm" svg:y="1.905cm" draw:page-number="27" presentation:class="page"/>
          <draw:frame draw:name="Google Shape;253;g3af6ef1896f_0_15:notes" presentation:style-name="pr38" draw:text-style-name="P4" draw:layer="layout" svg:width="15.239cm" svg:height="11.429cm" svg:x="1.905cm" svg:y="12.065cm" presentation:class="notes" presentation:placeholder="true" presentation:user-transformed="true">
            <draw:text-box/>
          </draw:frame>
        </presentation:notes>
      </draw:page>
      <draw:page draw:name="Proxy – variants" draw:style-name="dp1" draw:master-page-name="TITLE_5f_AND_5f_BODY" presentation:presentation-page-layout-name="AL2T1">
        <draw:frame draw:name="Google Shape;265;p40" presentation:style-name="pr5" draw:text-style-name="P8" draw:layer="layout" svg:width="23.667cm" svg:height="1.59cm" svg:x="0.866cm" svg:y="1.236cm" presentation:class="title" presentation:user-transformed="true">
          <draw:text-box>
            <text:p text:style-name="P1"><text:span text:style-name="T5">Proxy – variants</text:span></text:p>
          </draw:text-box>
        </draw:frame>
        <draw:frame draw:name="Google Shape;266;p40" presentation:style-name="pr11" draw:text-style-name="P7" draw:layer="layout" svg:width="15.988cm" svg:height="8.513cm" svg:x="8.546cm" svg:y="3.201cm" presentation:class="outline" presentation:user-transformed="true">
          <draw:text-box>
            <text:p text:style-name="P27"><text:span text:style-name="T22">A </text:span><text:span text:style-name="T23">Reverse Proxy</text:span><text:span text:style-name="T22"> forwards a client’s request to the service which knows how to handle it.</text:span></text:p>
          </draw:text-box>
        </draw:frame>
        <draw:custom-shape draw:name="Google Shape;267;p40" draw:style-name="gr3" draw:text-style-name="P19" draw:layer="layout" svg:width="4.998cm" svg:height="2.033cm" svg:x="1.721cm" svg:y="10.64cm">
          <text:p text:style-name="P1"><text:span text:style-name="T16">Reverse Proxy, Dispatc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8;p40" draw:style-name="gr2" draw:text-style-name="P12" draw:layer="layout" svg:width="5.712cm" svg:height="6.94cm" svg:x="1.975cm" svg:y="3.566cm">
          <draw:image xlink:href="Pictures/100002010000021200000284B2A344D1158C3409.png" xlink:type="simple" xlink:show="embed" xlink:actuate="onLoad">
            <text:p/>
          </draw:image>
        </draw:frame>
        <presentation:notes draw:style-name="dp2">
          <draw:page-thumbnail draw:name="Google Shape;262;g3af6ef1896f_0_21:notes" draw:style-name="gr1" draw:layer="layout" svg:width="16.932cm" svg:height="9.524cm" svg:x="1.059cm" svg:y="1.905cm" draw:page-number="28" presentation:class="page"/>
          <draw:frame draw:name="Google Shape;263;g3af6ef1896f_0_21:notes" presentation:style-name="pr39" draw:text-style-name="P4" draw:layer="layout" svg:width="15.239cm" svg:height="11.429cm" svg:x="1.905cm" svg:y="12.065cm" presentation:class="notes" presentation:placeholder="true" presentation:user-transformed="true">
            <draw:text-box/>
          </draw:frame>
        </presentation:notes>
      </draw:page>
      <draw:page draw:name="Proxy – variants" draw:style-name="dp1" draw:master-page-name="TITLE_5f_AND_5f_BODY" presentation:presentation-page-layout-name="AL2T1">
        <draw:frame draw:name="Google Shape;273;p41" presentation:style-name="pr5" draw:text-style-name="P8" draw:layer="layout" svg:width="23.667cm" svg:height="1.59cm" svg:x="0.866cm" svg:y="1.236cm" presentation:class="title" presentation:user-transformed="true">
          <draw:text-box>
            <text:p text:style-name="P1"><text:span text:style-name="T5">Proxy – variants</text:span></text:p>
          </draw:text-box>
        </draw:frame>
        <draw:frame draw:name="Google Shape;274;p41" presentation:style-name="pr11" draw:text-style-name="P7" draw:layer="layout" svg:width="16.632cm" svg:height="9.777cm" svg:x="7.902cm" svg:y="3.002cm" presentation:class="outline" presentation:user-transformed="true">
          <draw:text-box>
            <text:p text:style-name="P15"><text:span text:style-name="T22">An </text:span><text:span text:style-name="T23">Adapter</text:span><text:span text:style-name="T22"> translates between interfaces on the client’s and on the system’s sides.</text:span></text:p>
            <text:p text:style-name="P16"><text:span text:style-name="T22">An </text:span><text:span text:style-name="T23">Abstraction Layer</text:span><text:span text:style-name="T22"> is an </text:span><text:span text:style-name="T23">Adapter</text:span><text:span text:style-name="T22"> used to protect the client from changes in the interface or contract of the underlying system:</text:span></text:p>
            <text:list text:style-name="L13">
              <text:list-item>
                <text:p text:style-name="P16"><text:span text:style-name="T22">It is called </text:span><text:span text:style-name="T23">Anticorruption Layer</text:span><text:span text:style-name="T22"> when implemented by the client.</text:span></text:p>
              </text:list-item>
              <text:list-item>
                <text:p text:style-name="P15"><text:span text:style-name="T22">It is called </text:span><text:span text:style-name="T23">Open Host Service</text:span><text:span text:style-name="T22"> when implemented by the system’s team.</text:span></text:p>
              </text:list-item>
            </text:list>
          </draw:text-box>
        </draw:frame>
        <draw:custom-shape draw:name="Google Shape;275;p41" draw:style-name="gr3" draw:text-style-name="P19" draw:layer="layout" svg:width="7.035cm" svg:height="3.557cm" svg:x="0.733cm" svg:y="9.636cm">
          <text:p text:style-name="P1"><text:span text:style-name="T16">Adapter, </text:span></text:p>
          <text:p text:style-name="P1"><text:span text:style-name="T16">Abstraction Layer, </text:span></text:p>
          <text:p text:style-name="P1"><text:span text:style-name="T16">Anticorruption Layer, Open Host 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6;p41" draw:style-name="gr2" draw:text-style-name="P12" draw:layer="layout" svg:width="4.659cm" svg:height="6.139cm" svg:x="1.921cm" svg:y="3.418cm">
          <draw:image xlink:href="Pictures/10000201000001E800000283EABBB1743731B77F.png" xlink:type="simple" xlink:show="embed" xlink:actuate="onLoad">
            <text:p/>
          </draw:image>
        </draw:frame>
        <presentation:notes draw:style-name="dp2">
          <draw:page-thumbnail draw:name="Google Shape;270;g3af6ef1896f_0_27:notes" draw:style-name="gr1" draw:layer="layout" svg:width="16.932cm" svg:height="9.524cm" svg:x="1.059cm" svg:y="1.905cm" draw:page-number="29" presentation:class="page"/>
          <draw:frame draw:name="Google Shape;271;g3af6ef1896f_0_27:notes" presentation:style-name="pr40" draw:text-style-name="P4" draw:layer="layout" svg:width="15.239cm" svg:height="11.429cm" svg:x="1.905cm" svg:y="12.065cm" presentation:class="notes" presentation:placeholder="true" presentation:user-transformed="true">
            <draw:text-box/>
          </draw:frame>
        </presentation:notes>
      </draw:page>
      <draw:page draw:name="Proxy – composites" draw:style-name="dp1" draw:master-page-name="TITLE_5f_AND_5f_BODY" presentation:presentation-page-layout-name="AL2T1">
        <draw:frame draw:name="Google Shape;281;p42" presentation:style-name="pr5" draw:text-style-name="P8" draw:layer="layout" svg:width="23.667cm" svg:height="1.59cm" svg:x="0.866cm" svg:y="1.236cm" presentation:class="title" presentation:user-transformed="true">
          <draw:text-box>
            <text:p text:style-name="P1"><text:span text:style-name="T5">Proxy – composites</text:span></text:p>
          </draw:text-box>
        </draw:frame>
        <draw:frame draw:name="Google Shape;282;p42" presentation:style-name="pr11" draw:text-style-name="P7" draw:layer="layout" svg:width="15.988cm" svg:height="8.513cm" svg:x="8.546cm" svg:y="3.201cm" presentation:class="outline" presentation:user-transformed="true">
          <draw:text-box>
            <text:p text:style-name="P15"><text:span text:style-name="T23">API Gateway</text:span><text:span text:style-name="T22"> is an </text:span><text:span text:style-name="T23">orchestrating Proxy</text:span><text:span text:style-name="T22">:</text:span></text:p>
            <text:p text:style-name="P16"><text:span text:style-name="T22">It deals with protocol translation as an </text:span><text:span text:style-name="T23">Adapter</text:span><text:span text:style-name="T22"> (</text:span><text:span text:style-name="T23">Proxy</text:span><text:span text:style-name="T22">).</text:span></text:p>
            <text:p text:style-name="P22"><text:span text:style-name="T22">It splits a single client request into multiple requests to the underlying services as an </text:span><text:span text:style-name="T23">API Composer</text:span><text:span text:style-name="T22"> (</text:span><text:span text:style-name="T23">Orchestrator</text:span><text:span text:style-name="T22">).</text:span></text:p>
          </draw:text-box>
        </draw:frame>
        <draw:custom-shape draw:name="Google Shape;283;p42" draw:style-name="gr3" draw:text-style-name="P19" draw:layer="layout" svg:width="5.82cm" svg:height="1.271cm" svg:x="1.725cm" svg:y="10.648cm">
          <text:p text:style-name="P1"><text:span text:style-name="T16">API Gate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4;p42" draw:style-name="gr2" draw:text-style-name="P12" draw:layer="layout" svg:width="5.82cm" svg:height="6.559cm" svg:x="1.725cm" svg:y="3.632cm">
          <draw:image xlink:href="Pictures/1000020100000286000002D8C7C1FB26104AB3C3.png" xlink:type="simple" xlink:show="embed" xlink:actuate="onLoad">
            <text:p/>
          </draw:image>
        </draw:frame>
        <presentation:notes draw:style-name="dp2">
          <draw:page-thumbnail draw:name="Google Shape;278;g3af6ef1896f_0_33:notes" draw:style-name="gr1" draw:layer="layout" svg:width="16.932cm" svg:height="9.524cm" svg:x="1.059cm" svg:y="1.905cm" draw:page-number="30" presentation:class="page"/>
          <draw:frame draw:name="Google Shape;279;g3af6ef1896f_0_33:notes" presentation:style-name="pr41" draw:text-style-name="P4" draw:layer="layout" svg:width="15.239cm" svg:height="11.429cm" svg:x="1.905cm" svg:y="12.065cm" presentation:class="notes" presentation:placeholder="true" presentation:user-transformed="true">
            <draw:text-box/>
          </draw:frame>
        </presentation:notes>
      </draw:page>
      <draw:page draw:name="Orchestrator" draw:style-name="dp1" draw:master-page-name="SECTION_5f_HEADER">
        <draw:frame draw:name="Google Shape;289;p43" presentation:style-name="pr8" draw:text-style-name="P13" draw:layer="layout" svg:width="23.667cm" svg:height="2.337cm" svg:x="0.866cm" svg:y="4.805cm" presentation:class="title" presentation:user-transformed="true">
          <draw:text-box>
            <text:p text:style-name="P1"><text:span text:style-name="T9">Orchestrator</text:span></text:p>
          </draw:text-box>
        </draw:frame>
        <draw:frame draw:name="Google Shape;290;p43" presentation:style-name="pr9" draw:text-style-name="P14" draw:layer="layout" svg:width="23.667cm" svg:height="2.201cm" svg:x="0.866cm" svg:y="7.144cm" presentation:class="subtitle" presentation:user-transformed="true">
          <draw:text-box>
            <text:p text:style-name="P11"><text:span text:style-name="T10">An integration layer</text:span></text:p>
          </draw:text-box>
        </draw:frame>
        <presentation:notes draw:style-name="dp2">
          <draw:page-thumbnail draw:name="Google Shape;286;g3ad72b8a13e_0_0:notes" draw:style-name="gr1" draw:layer="layout" svg:width="16.932cm" svg:height="9.524cm" svg:x="1.059cm" svg:y="1.905cm" draw:page-number="31" presentation:class="page"/>
          <draw:frame draw:name="Google Shape;287;g3ad72b8a13e_0_0:notes" presentation:style-name="pr42" draw:text-style-name="P4" draw:layer="layout" svg:width="15.239cm" svg:height="11.429cm" svg:x="1.905cm" svg:y="12.065cm" presentation:class="notes" presentation:placeholder="true" presentation:user-transformed="true">
            <draw:text-box/>
          </draw:frame>
        </presentation:notes>
      </draw:page>
      <draw:page draw:name="Orchestrator – overview" draw:style-name="dp1" draw:master-page-name="TITLE_5f_AND_5f_BODY" presentation:presentation-page-layout-name="AL2T1">
        <draw:frame draw:name="Google Shape;295;p44" presentation:style-name="pr5" draw:text-style-name="P8" draw:layer="layout" svg:width="23.667cm" svg:height="1.59cm" svg:x="0.866cm" svg:y="1.236cm" presentation:class="title" presentation:user-transformed="true">
          <draw:text-box>
            <text:p text:style-name="P1"><text:span text:style-name="T5">Orchestrator – overview</text:span></text:p>
          </draw:text-box>
        </draw:frame>
        <draw:frame draw:name="Google Shape;296;p44" presentation:style-name="pr11" draw:text-style-name="P7" draw:layer="layout" svg:width="15.374cm" svg:height="6.903cm" svg:x="9.16cm" svg:y="3.201cm" presentation:class="outline" presentation:user-transformed="true">
          <draw:text-box>
            <text:p text:style-name="P15"><text:span text:style-name="T11">An </text:span><text:span text:style-name="T12">Orchestrator</text:span><text:span text:style-name="T11"> integrates lower-level components. It acts as:</text:span></text:p>
            <text:list text:style-name="L9">
              <text:list-item>
                <text:p text:style-name="P16"><text:span text:style-name="T11">A </text:span><text:span text:style-name="T12">Mediator</text:span><text:span text:style-name="T11"> by propagating state changes among system components.</text:span></text:p>
              </text:list-item>
              <text:list-item>
                <text:p text:style-name="P15"><text:span text:style-name="T11">A </text:span><text:span text:style-name="T12">Facade</text:span><text:span text:style-name="T11"> by implementing system-wide use cases.</text:span></text:p>
              </text:list-item>
            </text:list>
          </draw:text-box>
        </draw:frame>
        <draw:frame draw:name="Google Shape;297;p44" presentation:style-name="pr4" draw:text-style-name="P7" draw:layer="layout" svg:width="23.667cm" svg:height="3.001cm" svg:x="0.866cm" svg:y="10.572cm" presentation:class="outline" presentation:user-transformed="true">
          <draw:text-box>
            <text:p text:style-name="P17"><text:span text:style-name="T13">Orchestrator</text:span><text:span text:style-name="T14"> helps projects with many complex use cases…</text:span></text:p>
            <text:p text:style-name="P18"><text:span text:style-name="T15">…</text:span><text:span text:style-name="T15">at the cost of increased latency and operational complexity.</text:span></text:p>
          </draw:text-box>
        </draw:frame>
        <draw:custom-shape draw:name="Google Shape;298;p44" draw:style-name="gr3" draw:text-style-name="P19" draw:layer="layout" svg:width="5.82cm" svg:height="2.033cm" svg:x="1.971cm" svg:y="8.519cm">
          <text:p text:style-name="P1"><text:span text:style-name="T16">Orchestrator, Application Lay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9;p44" draw:style-name="gr2" draw:text-style-name="P12" draw:layer="layout" svg:width="6.465cm" svg:height="4.684cm" svg:x="1.648cm" svg:y="3.835cm">
          <draw:image xlink:href="Pictures/10000201000002D60000020E0886908710A574AA.png" xlink:type="simple" xlink:show="embed" xlink:actuate="onLoad">
            <text:p/>
          </draw:image>
        </draw:frame>
        <presentation:notes draw:style-name="dp2">
          <draw:page-thumbnail draw:name="Google Shape;292;g3ad72b8a13e_0_5:notes" draw:style-name="gr1" draw:layer="layout" svg:width="16.932cm" svg:height="9.524cm" svg:x="1.059cm" svg:y="1.905cm" draw:page-number="32" presentation:class="page"/>
          <draw:frame draw:name="Google Shape;293;g3ad72b8a13e_0_5:notes" presentation:style-name="pr43" draw:text-style-name="P4" draw:layer="layout" svg:width="15.239cm" svg:height="11.429cm" svg:x="1.905cm" svg:y="12.065cm" presentation:class="notes" presentation:placeholder="true" presentation:user-transformed="true">
            <draw:text-box/>
          </draw:frame>
        </presentation:notes>
      </draw:page>
      <draw:page draw:name="Orchestrator – trade-offs" draw:style-name="dp1" draw:master-page-name="TITLE_5f_AND_5f_TWO_5f_COLUMNS" presentation:presentation-page-layout-name="AL3T3">
        <draw:frame draw:name="Google Shape;304;p45" presentation:style-name="pr13" draw:text-style-name="P8" draw:layer="layout" svg:width="23.667cm" svg:height="1.59cm" svg:x="0.866cm" svg:y="1.236cm" presentation:class="title" presentation:user-transformed="true">
          <draw:text-box>
            <text:p text:style-name="P1"><text:span text:style-name="T5">Orchestrator – trade-offs</text:span></text:p>
          </draw:text-box>
        </draw:frame>
        <draw:frame draw:name="Google Shape;305;p45" presentation:style-name="pr14" draw:text-style-name="P19" draw:layer="layout" svg:width="11.11cm" svg:height="9.061cm" svg:x="0.866cm" svg:y="3.201cm" presentation:class="outline" presentation:user-transformed="true">
          <draw:text-box>
            <text:p text:style-name="P20"><text:span text:style-name="T17">Encapsulates integration concerns</text:span></text:p>
            <text:p text:style-name="P16"><text:span text:style-name="T17">Simplifies making changes to use cases</text:span></text:p>
            <text:p text:style-name="P22"><text:span text:style-name="T17">Protects the teams behind lower-level components from the system’s clients</text:span></text:p>
          </draw:text-box>
        </draw:frame>
        <draw:frame draw:name="Google Shape;306;p45" presentation:style-name="pr15" draw:text-style-name="P19" draw:layer="layout" svg:width="11.11cm" svg:height="9.061cm" svg:x="13.423cm" svg:y="3.201cm" presentation:class="outline" presentation:user-transformed="true">
          <draw:text-box>
            <text:p text:style-name="P20"><text:span text:style-name="T18">May degrade the latency and fault tolerance of the system</text:span></text:p>
            <text:p text:style-name="P16"><text:span text:style-name="T18">May grow too large for comfortable development</text:span></text:p>
            <text:p text:style-name="P22"><text:span text:style-name="T18"/></text:p>
          </draw:text-box>
        </draw:frame>
        <presentation:notes draw:style-name="dp2">
          <draw:page-thumbnail draw:name="Google Shape;301;g3ad72b8a13e_0_13:notes" draw:style-name="gr1" draw:layer="layout" svg:width="16.932cm" svg:height="9.524cm" svg:x="1.059cm" svg:y="1.905cm" draw:page-number="33" presentation:class="page"/>
          <draw:frame draw:name="Google Shape;302;g3ad72b8a13e_0_13:notes" presentation:style-name="pr44" draw:text-style-name="P4" draw:layer="layout" svg:width="15.239cm" svg:height="11.429cm" svg:x="1.905cm" svg:y="12.065cm" presentation:class="notes" presentation:placeholder="true" presentation:user-transformed="true">
            <draw:text-box/>
          </draw:frame>
        </presentation:notes>
      </draw:page>
      <draw:page draw:name="Orchestrator – transparency" draw:style-name="dp1" draw:master-page-name="TITLE_5f_AND_5f_BODY" presentation:presentation-page-layout-name="AL2T1">
        <draw:frame draw:name="Google Shape;311;p46" draw:style-name="gr2" draw:text-style-name="P12" draw:layer="layout" svg:width="5.072cm" svg:height="6.864cm" svg:x="19.536cm" svg:y="3.936cm">
          <draw:image xlink:href="Pictures/1000020100000236000002FEF7C99333D310C112.png" xlink:type="simple" xlink:show="embed" xlink:actuate="onLoad">
            <text:p/>
          </draw:image>
        </draw:frame>
        <draw:frame draw:name="Google Shape;312;p46" draw:style-name="gr2" draw:text-style-name="P12" draw:layer="layout" svg:width="5.072cm" svg:height="6.864cm" svg:x="1cm" svg:y="3.936cm">
          <draw:image xlink:href="Pictures/1000020100000236000002FEB2EF668745A9BF98.png" xlink:type="simple" xlink:show="embed" xlink:actuate="onLoad">
            <text:p/>
          </draw:image>
        </draw:frame>
        <draw:frame draw:name="Google Shape;313;p46" presentation:style-name="pr17" draw:text-style-name="P7" draw:layer="layout" svg:width="12.652cm" svg:height="8.94cm" svg:x="6.529cm" svg:y="3.936cm" presentation:class="outline" presentation:user-transformed="true">
          <draw:text-box>
            <text:p text:style-name="P15"><text:span text:style-name="T11">Being a layer, an </text:span><text:span text:style-name="T12">Orchestrator</text:span><text:span text:style-name="T11"> can allow or block its clients’ access to the underlying components:</text:span></text:p>
            <text:list text:style-name="L9">
              <text:list-item>
                <text:p text:style-name="P16"><text:span text:style-name="T11">An </text:span><text:span text:style-name="T12">Open Orchestrator</text:span><text:span text:style-name="T11"> implements complex use cases but passes simple client requests to the services below it.</text:span></text:p>
              </text:list-item>
              <text:list-item>
                <text:p text:style-name="P21"><text:span text:style-name="T11">A </text:span><text:span text:style-name="T12">Closed Orchestrator</text:span><text:span text:style-name="T11"> intercepts all client requests, even those that don’t involve multiple services.</text:span></text:p>
              </text:list-item>
            </text:list>
          </draw:text-box>
        </draw:frame>
        <draw:custom-shape draw:name="Google Shape;314;p46" draw:style-name="gr3" draw:text-style-name="P19" draw:layer="layout" svg:width="4.719cm" svg:height="2.033cm" svg:x="1.177cm" svg:y="10.964cm">
          <text:p text:style-name="P1"><text:span text:style-name="T19">Open</text:span><text:span text:style-name="T16"> Orchest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p46" draw:style-name="gr3" draw:text-style-name="P19" draw:layer="layout" svg:width="5.351cm" svg:height="2.033cm" svg:x="19.396cm" svg:y="10.964cm">
          <text:p text:style-name="P1"><text:span text:style-name="T19">Closed</text:span><text:span text:style-name="T16"> Orchest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6;p46" presentation:style-name="pr5" draw:text-style-name="P8" draw:layer="layout" svg:width="23.667cm" svg:height="1.59cm" svg:x="0.866cm" svg:y="1.236cm" presentation:class="title" presentation:user-transformed="true">
          <draw:text-box>
            <text:p text:style-name="P1"><text:span text:style-name="T5">Orchestrator – transparency</text:span></text:p>
          </draw:text-box>
        </draw:frame>
        <presentation:notes draw:style-name="dp2">
          <draw:page-thumbnail draw:name="Google Shape;308;g3918c41e8cd_0_88:notes" draw:style-name="gr1" draw:layer="layout" svg:width="16.932cm" svg:height="9.524cm" svg:x="1.059cm" svg:y="1.905cm" draw:page-number="34" presentation:class="page"/>
          <draw:frame draw:name="Google Shape;309;g3918c41e8cd_0_88:notes" presentation:style-name="pr34" draw:text-style-name="P26" draw:layer="layout" svg:width="15.239cm" svg:height="11.429cm" svg:x="1.905cm" svg:y="12.065cm" presentation:class="notes" presentation:user-transformed="true">
            <draw:text-box>
              <text:p text:style-name="P25"><text:span text:style-name="T21"><text:a xlink:href="https://metapatterns.io/basic-metapatterns/layers/" xlink:type="simple">https://metapatterns.io/basic-metapatterns/layers/</text:a></text:span></text:p>
            </draw:text-box>
          </draw:frame>
        </presentation:notes>
      </draw:page>
      <draw:page draw:name="Orchestrator – internals" draw:style-name="dp1" draw:master-page-name="TITLE_5f_AND_5f_BODY" presentation:presentation-page-layout-name="AL2T1">
        <draw:frame draw:name="Google Shape;321;p47" presentation:style-name="pr5" draw:text-style-name="P8" draw:layer="layout" svg:width="23.667cm" svg:height="1.59cm" svg:x="0.866cm" svg:y="1.236cm" presentation:class="title" presentation:user-transformed="true">
          <draw:text-box>
            <text:p text:style-name="P1"><text:span text:style-name="T5">Orchestrator – internals</text:span></text:p>
          </draw:text-box>
        </draw:frame>
        <draw:frame draw:name="Google Shape;322;p47" presentation:style-name="pr11" draw:text-style-name="P7" draw:layer="layout" svg:width="15.409cm" svg:height="6.879cm" svg:x="9.124cm" svg:y="3.692cm" presentation:class="outline" presentation:user-transformed="true">
          <draw:text-box>
            <text:p text:style-name="P15"><text:span text:style-name="T22">In the simplest case an </text:span><text:span text:style-name="T23">Orchestrator</text:span><text:span text:style-name="T22"> is monolithic (or layered if it persists its state to a database for fault recovery).</text:span></text:p>
            <text:p text:style-name="P16"><text:span text:style-name="T22">The single-component structure is good for smaller projects with no stringent requirements. </text:span></text:p>
            <text:p text:style-name="P16"><text:span text:style-name="T22"/></text:p>
            <text:p text:style-name="P22"><text:span text:style-name="T22"/></text:p>
          </draw:text-box>
        </draw:frame>
        <draw:custom-shape draw:name="Google Shape;323;p47" draw:style-name="gr3" draw:text-style-name="P19" draw:layer="layout" svg:width="7.488cm" svg:height="1.271cm" svg:x="1.089cm" svg:y="9.418cm">
          <text:p text:style-name="P1"><text:span text:style-name="T16">Monolithic Orchest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4;p47" presentation:style-name="pr4" draw:text-style-name="P7" draw:layer="layout" svg:width="23.667cm" svg:height="3.001cm" svg:x="0.866cm" svg:y="10.572cm" presentation:class="outline" presentation:user-transformed="true">
          <draw:text-box>
            <text:p text:style-name="P17"><text:span text:style-name="T14">The monolithic structure is simple and its state is self-consistent…</text:span></text:p>
            <text:p text:style-name="P18"><text:span text:style-name="T15">…</text:span><text:span text:style-name="T15">but it has limited performance and may become too large.</text:span></text:p>
          </draw:text-box>
        </draw:frame>
        <draw:frame draw:name="Google Shape;325;p47" draw:style-name="gr2" draw:text-style-name="P12" draw:layer="layout" svg:width="6.132cm" svg:height="5.743cm" svg:x="1.767cm" svg:y="3.317cm">
          <draw:image xlink:href="Pictures/10000201000002860000025DF7179B31CF53FBF3.png" xlink:type="simple" xlink:show="embed" xlink:actuate="onLoad">
            <text:p/>
          </draw:image>
        </draw:frame>
        <presentation:notes draw:style-name="dp2">
          <draw:page-thumbnail draw:name="Google Shape;318;g3ad72b8a13e_0_24:notes" draw:style-name="gr1" draw:layer="layout" svg:width="16.932cm" svg:height="9.524cm" svg:x="1.059cm" svg:y="1.905cm" draw:page-number="35" presentation:class="page"/>
          <draw:frame draw:name="Google Shape;319;g3ad72b8a13e_0_24:notes" presentation:style-name="pr45" draw:text-style-name="P4" draw:layer="layout" svg:width="15.239cm" svg:height="11.429cm" svg:x="1.905cm" svg:y="12.065cm" presentation:class="notes" presentation:placeholder="true" presentation:user-transformed="true">
            <draw:text-box/>
          </draw:frame>
        </presentation:notes>
      </draw:page>
      <draw:page draw:name="Orchestrator – internals" draw:style-name="dp1" draw:master-page-name="TITLE_5f_AND_5f_BODY" presentation:presentation-page-layout-name="AL2T1">
        <draw:frame draw:name="Google Shape;330;p48" presentation:style-name="pr5" draw:text-style-name="P8" draw:layer="layout" svg:width="23.667cm" svg:height="1.59cm" svg:x="0.866cm" svg:y="1.236cm" presentation:class="title" presentation:user-transformed="true">
          <draw:text-box>
            <text:p text:style-name="P1"><text:span text:style-name="T5">Orchestrator – internals</text:span></text:p>
          </draw:text-box>
        </draw:frame>
        <draw:frame draw:name="Google Shape;331;p48" presentation:style-name="pr11" draw:text-style-name="P7" draw:layer="layout" svg:width="15.407cm" svg:height="7.227cm" svg:x="9.127cm" svg:y="3.692cm" presentation:class="outline" presentation:user-transformed="true">
          <draw:text-box>
            <text:p text:style-name="P15"><text:span text:style-name="T22">High availability or high load require multiple instances of an </text:span><text:span text:style-name="T23">Orchestrator</text:span><text:span text:style-name="T22">.</text:span></text:p>
            <text:p text:style-name="P16"><text:span text:style-name="T22">The instances rely on a </text:span><text:span text:style-name="T23">Shared Repository</text:span><text:span text:style-name="T22"> or </text:span><text:span text:style-name="T23">replication</text:span><text:span text:style-name="T22"> to synchronize their states.</text:span></text:p>
            <text:p text:style-name="P22"><text:span text:style-name="T22"/></text:p>
          </draw:text-box>
        </draw:frame>
        <draw:custom-shape draw:name="Google Shape;332;p48" draw:style-name="gr3" draw:text-style-name="P19" draw:layer="layout" svg:width="7.488cm" svg:height="1.271cm" svg:x="1.281cm" svg:y="9.517cm">
          <text:p text:style-name="P1"><text:span text:style-name="T16">Scaled Orchest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3;p48" presentation:style-name="pr4" draw:text-style-name="P7" draw:layer="layout" svg:width="23.667cm" svg:height="3.001cm" svg:x="0.866cm" svg:y="10.572cm" presentation:class="outline" presentation:user-transformed="true">
          <draw:text-box>
            <text:p text:style-name="P17"><text:span text:style-name="T14">Setting up multiple instances increases throughput and availability.</text:span></text:p>
            <text:p text:style-name="P18"><text:span text:style-name="T15">However, the instances must take care to avoid race conditions.</text:span></text:p>
          </draw:text-box>
        </draw:frame>
        <draw:frame draw:name="Google Shape;334;p48" draw:style-name="gr2" draw:text-style-name="P12" draw:layer="layout" svg:width="4.151cm" svg:height="5.795cm" svg:x="2.949cm" svg:y="3.81cm">
          <draw:image xlink:href="Pictures/10000201000002D0000003EDCB41014C4A317F66.png" xlink:type="simple" xlink:show="embed" xlink:actuate="onLoad">
            <text:p/>
          </draw:image>
        </draw:frame>
        <presentation:notes draw:style-name="dp2">
          <draw:page-thumbnail draw:name="Google Shape;327;g3af9f17ed48_0_24:notes" draw:style-name="gr1" draw:layer="layout" svg:width="16.932cm" svg:height="9.524cm" svg:x="1.059cm" svg:y="1.905cm" draw:page-number="36" presentation:class="page"/>
          <draw:frame draw:name="Google Shape;328;g3af9f17ed48_0_24:notes" presentation:style-name="pr46" draw:text-style-name="P4" draw:layer="layout" svg:width="15.239cm" svg:height="11.429cm" svg:x="1.905cm" svg:y="12.065cm" presentation:class="notes" presentation:placeholder="true" presentation:user-transformed="true">
            <draw:text-box/>
          </draw:frame>
        </presentation:notes>
      </draw:page>
      <draw:page draw:name="Orchestrator – internals" draw:style-name="dp1" draw:master-page-name="TITLE_5f_AND_5f_BODY" presentation:presentation-page-layout-name="AL2T1">
        <draw:frame draw:name="Google Shape;339;p49" presentation:style-name="pr5" draw:text-style-name="P8" draw:layer="layout" svg:width="23.667cm" svg:height="1.59cm" svg:x="0.866cm" svg:y="1.236cm" presentation:class="title" presentation:user-transformed="true">
          <draw:text-box>
            <text:p text:style-name="P1"><text:span text:style-name="T5">Orchestrator – internals</text:span></text:p>
          </draw:text-box>
        </draw:frame>
        <draw:frame draw:name="Google Shape;340;p49" presentation:style-name="pr11" draw:text-style-name="P7" draw:layer="layout" svg:width="15.409cm" svg:height="7.227cm" svg:x="9.124cm" svg:y="3.692cm" presentation:class="outline" presentation:user-transformed="true">
          <draw:text-box>
            <text:p text:style-name="P15"><text:span text:style-name="T22">It is possible to use several </text:span><text:span text:style-name="T23">Orchestrators</text:span><text:span text:style-name="T22"> of different complexity.</text:span></text:p>
            <text:p text:style-name="P22"><text:span text:style-name="T22">All user requests get to a simple </text:span><text:span text:style-name="T23">Orchestrator</text:span><text:span text:style-name="T22">. If it cannot handle a request, it forwards the latter to a more complex implementation.</text:span></text:p>
          </draw:text-box>
        </draw:frame>
        <draw:custom-shape draw:name="Google Shape;341;p49" draw:style-name="gr3" draw:text-style-name="P19" draw:layer="layout" svg:width="7.488cm" svg:height="1.271cm" svg:x="1.054cm" svg:y="9.505cm">
          <text:p text:style-name="P1"><text:span text:style-name="T16">Layered Orchest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2;p49" presentation:style-name="pr4" draw:text-style-name="P7" draw:layer="layout" svg:width="23.667cm" svg:height="3.001cm" svg:x="0.866cm" svg:y="10.572cm" presentation:class="outline" presentation:user-transformed="true">
          <draw:text-box>
            <text:p text:style-name="P17"><text:span text:style-name="T14">A </text:span><text:span text:style-name="T13">Layered Orchestrator</text:span><text:span text:style-name="T14"> reserves complex code for hard use cases.</text:span></text:p>
            <text:p text:style-name="P18"><text:span text:style-name="T15">But it requires the team to learn multiple technologies.</text:span></text:p>
          </draw:text-box>
        </draw:frame>
        <draw:frame draw:name="Google Shape;343;p49" draw:style-name="gr2" draw:text-style-name="P12" draw:layer="layout" svg:width="5.179cm" svg:height="5.743cm" svg:x="2.208cm" svg:y="3.828cm">
          <draw:image xlink:href="Pictures/10000201000002D6000003256A6F794B22EE91F7.png" xlink:type="simple" xlink:show="embed" xlink:actuate="onLoad">
            <text:p/>
          </draw:image>
        </draw:frame>
        <presentation:notes draw:style-name="dp2">
          <draw:page-thumbnail draw:name="Google Shape;336;g3af9f17ed48_0_18:notes" draw:style-name="gr1" draw:layer="layout" svg:width="16.932cm" svg:height="9.524cm" svg:x="1.059cm" svg:y="1.905cm" draw:page-number="37" presentation:class="page"/>
          <draw:frame draw:name="Google Shape;337;g3af9f17ed48_0_18:notes" presentation:style-name="pr47" draw:text-style-name="P4" draw:layer="layout" svg:width="15.239cm" svg:height="11.429cm" svg:x="1.905cm" svg:y="12.065cm" presentation:class="notes" presentation:placeholder="true" presentation:user-transformed="true">
            <draw:text-box/>
          </draw:frame>
        </presentation:notes>
      </draw:page>
      <draw:page draw:name="Orchestrator – internals" draw:style-name="dp1" draw:master-page-name="TITLE_5f_AND_5f_BODY" presentation:presentation-page-layout-name="AL2T1">
        <draw:frame draw:name="Google Shape;348;p50" presentation:style-name="pr5" draw:text-style-name="P8" draw:layer="layout" svg:width="23.667cm" svg:height="1.59cm" svg:x="0.866cm" svg:y="1.236cm" presentation:class="title" presentation:user-transformed="true">
          <draw:text-box>
            <text:p text:style-name="P1"><text:span text:style-name="T5">Orchestrator – internals</text:span></text:p>
          </draw:text-box>
        </draw:frame>
        <draw:frame draw:name="Google Shape;349;p50" presentation:style-name="pr11" draw:text-style-name="P7" draw:layer="layout" svg:width="15.409cm" svg:height="7.227cm" svg:x="9.124cm" svg:y="3.692cm" presentation:class="outline" presentation:user-transformed="true">
          <draw:text-box>
            <text:p text:style-name="P15"><text:span text:style-name="T22">The orchestration layer may dedicate one service to each kind of client, becoming </text:span><text:span text:style-name="T23">Backends for Frontends</text:span><text:span text:style-name="T22"> (</text:span><text:span text:style-name="T23">BFF</text:span><text:span text:style-name="T22">).</text:span></text:p>
            <text:p text:style-name="P22"><text:span text:style-name="T22">For example, an online store may implement buyer and seller logic with separate </text:span><text:span text:style-name="T23">Orchestrators</text:span><text:span text:style-name="T22">.</text:span></text:p>
          </draw:text-box>
        </draw:frame>
        <draw:custom-shape draw:name="Google Shape;350;p50" draw:style-name="gr3" draw:text-style-name="P19" draw:layer="layout" svg:width="7.488cm" svg:height="1.271cm" svg:x="1.105cm" svg:y="9.44cm">
          <text:p text:style-name="P1"><text:span text:style-name="T16">Backends for Fronte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1;p50" presentation:style-name="pr4" draw:text-style-name="P7" draw:layer="layout" svg:width="23.667cm" svg:height="3.001cm" svg:x="0.866cm" svg:y="10.572cm" presentation:class="outline" presentation:user-transformed="true">
          <draw:text-box>
            <text:p text:style-name="P17"><text:span text:style-name="T13">BFF</text:span><text:span text:style-name="T14"> is good when clients differ in their use cases.</text:span></text:p>
            <text:p text:style-name="P18"><text:span text:style-name="T15">On the downside, it is hard to share code between use cases.</text:span></text:p>
          </draw:text-box>
        </draw:frame>
        <draw:frame draw:name="Google Shape;352;p50" draw:style-name="gr2" draw:text-style-name="P12" draw:layer="layout" svg:width="5.765cm" svg:height="5.479cm" svg:x="1.967cm" svg:y="3.959cm">
          <draw:image xlink:href="Pictures/1000020100000326000002FE87BDC5A06CA30E23.png" xlink:type="simple" xlink:show="embed" xlink:actuate="onLoad">
            <text:p/>
          </draw:image>
        </draw:frame>
        <presentation:notes draw:style-name="dp2">
          <draw:page-thumbnail draw:name="Google Shape;345;g3af9f17ed48_0_12:notes" draw:style-name="gr1" draw:layer="layout" svg:width="16.932cm" svg:height="9.524cm" svg:x="1.059cm" svg:y="1.905cm" draw:page-number="38" presentation:class="page"/>
          <draw:frame draw:name="Google Shape;346;g3af9f17ed48_0_12:notes" presentation:style-name="pr48" draw:text-style-name="P4" draw:layer="layout" svg:width="15.239cm" svg:height="11.429cm" svg:x="1.905cm" svg:y="12.065cm" presentation:class="notes" presentation:placeholder="true" presentation:user-transformed="true">
            <draw:text-box/>
          </draw:frame>
        </presentation:notes>
      </draw:page>
      <draw:page draw:name="Orchestrator – internals" draw:style-name="dp1" draw:master-page-name="TITLE_5f_AND_5f_BODY" presentation:presentation-page-layout-name="AL2T1">
        <draw:frame draw:name="Google Shape;357;p51" presentation:style-name="pr5" draw:text-style-name="P8" draw:layer="layout" svg:width="23.667cm" svg:height="1.59cm" svg:x="0.866cm" svg:y="1.236cm" presentation:class="title" presentation:user-transformed="true">
          <draw:text-box>
            <text:p text:style-name="P1"><text:span text:style-name="T5">Orchestrator – internals</text:span></text:p>
          </draw:text-box>
        </draw:frame>
        <draw:frame draw:name="Google Shape;358;p51" presentation:style-name="pr11" draw:text-style-name="P7" draw:layer="layout" svg:width="15.409cm" svg:height="7.227cm" svg:x="9.124cm" svg:y="3.692cm" presentation:class="outline" presentation:user-transformed="true">
          <draw:text-box>
            <text:p text:style-name="P15"><text:span text:style-name="T23">Top-Down Hierarchy</text:span><text:span text:style-name="T22"> has multiple layers of </text:span><text:span text:style-name="T23">Orchestrators</text:span><text:span text:style-name="T22">.</text:span></text:p>
            <text:p text:style-name="P16"><text:span text:style-name="T22">The top-level component operates coarse-grained actions.</text:span></text:p>
            <text:p text:style-name="P16"><text:span text:style-name="T22">Each layer translates a call to its API into several calls to the APIs of the layer below it.</text:span></text:p>
            <text:p text:style-name="P22"><text:span text:style-name="T22"/></text:p>
          </draw:text-box>
        </draw:frame>
        <draw:frame draw:name="Google Shape;359;p51" presentation:style-name="pr4" draw:text-style-name="P7" draw:layer="layout" svg:width="23.667cm" svg:height="3.001cm" svg:x="0.866cm" svg:y="10.572cm" presentation:class="outline" presentation:user-transformed="true">
          <draw:text-box>
            <text:p text:style-name="P17"><text:span text:style-name="T13">Hierarchy</text:span><text:span text:style-name="T14"> distributes complexity among several layers.</text:span></text:p>
            <text:p text:style-name="P18"><text:span text:style-name="T15">However, only few domains are hierarchical.</text:span></text:p>
          </draw:text-box>
        </draw:frame>
        <draw:frame draw:name="Google Shape;360;p51" draw:style-name="gr2" draw:text-style-name="P12" draw:layer="layout" svg:width="7.653cm" svg:height="5.743cm" svg:x="0.866cm" svg:y="3.828cm">
          <draw:image xlink:href="Pictures/10000201000004660000034D4C075FD8C65091EB.png" xlink:type="simple" xlink:show="embed" xlink:actuate="onLoad">
            <text:p/>
          </draw:image>
        </draw:frame>
        <draw:custom-shape draw:name="Google Shape;361;p51" draw:style-name="gr3" draw:text-style-name="P19" draw:layer="layout" svg:width="7.488cm" svg:height="1.271cm" svg:x="0.948cm" svg:y="9.571cm">
          <text:p text:style-name="P1"><text:span text:style-name="T16">Top-Down Hierarc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4;g3af9f17ed48_0_6:notes" draw:style-name="gr1" draw:layer="layout" svg:width="16.932cm" svg:height="9.524cm" svg:x="1.059cm" svg:y="1.905cm" draw:page-number="39" presentation:class="page"/>
          <draw:frame draw:name="Google Shape;355;g3af9f17ed48_0_6:notes" presentation:style-name="pr49" draw:text-style-name="P4" draw:layer="layout" svg:width="15.239cm" svg:height="11.429cm" svg:x="1.905cm" svg:y="12.065cm" presentation:class="notes" presentation:placeholder="true" presentation:user-transformed="true">
            <draw:text-box/>
          </draw:frame>
        </presentation:notes>
      </draw:page>
      <draw:page draw:name="Orchestrator – internals" draw:style-name="dp1" draw:master-page-name="TITLE_5f_AND_5f_BODY" presentation:presentation-page-layout-name="AL2T1">
        <draw:frame draw:name="Google Shape;366;p52" presentation:style-name="pr5" draw:text-style-name="P8" draw:layer="layout" svg:width="23.667cm" svg:height="1.59cm" svg:x="0.866cm" svg:y="1.236cm" presentation:class="title" presentation:user-transformed="true">
          <draw:text-box>
            <text:p text:style-name="P1"><text:span text:style-name="T5">Orchestrator – internals</text:span></text:p>
          </draw:text-box>
        </draw:frame>
        <draw:frame draw:name="Google Shape;367;p52" presentation:style-name="pr11" draw:text-style-name="P7" draw:layer="layout" svg:width="15.409cm" svg:height="7.227cm" svg:x="9.124cm" svg:y="3.692cm" presentation:class="outline" presentation:user-transformed="true">
          <draw:text-box>
            <text:p text:style-name="P27"><text:span text:style-name="T22">The </text:span><text:span text:style-name="T23">SOA</text:span><text:span text:style-name="T22">-style orchestration relies on many small </text:span><text:span text:style-name="T23">Orchestrators</text:span><text:span text:style-name="T22">, each implementing a few closely related scenarios.</text:span></text:p>
          </draw:text-box>
        </draw:frame>
        <draw:custom-shape draw:name="Google Shape;368;p52" draw:style-name="gr3" draw:text-style-name="P19" draw:layer="layout" svg:width="7.488cm" svg:height="1.271cm" svg:x="0.805cm" svg:y="9.571cm">
          <text:p text:style-name="P1"><text:span text:style-name="T16">SOA-style orche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9;p52" presentation:style-name="pr4" draw:text-style-name="P7" draw:layer="layout" svg:width="23.667cm" svg:height="3.001cm" svg:x="0.866cm" svg:y="10.572cm" presentation:class="outline" presentation:user-transformed="true">
          <draw:text-box>
            <text:p text:style-name="P17"><text:span text:style-name="T14">Each </text:span><text:span text:style-name="T13">Orchestrator</text:span><text:span text:style-name="T14"> stays small and humble.</text:span></text:p>
            <text:p text:style-name="P18"><text:span text:style-name="T15">But there are too many of them.</text:span></text:p>
          </draw:text-box>
        </draw:frame>
        <draw:frame draw:name="Google Shape;370;p52" draw:style-name="gr2" draw:text-style-name="P12" draw:layer="layout" svg:width="6.043cm" svg:height="5.743cm" svg:x="1.528cm" svg:y="3.828cm">
          <draw:image xlink:href="Pictures/1000020100000326000002FE0DAE6B2061CB99DD.png" xlink:type="simple" xlink:show="embed" xlink:actuate="onLoad">
            <text:p/>
          </draw:image>
        </draw:frame>
        <presentation:notes draw:style-name="dp2">
          <draw:page-thumbnail draw:name="Google Shape;363;g3af9f17ed48_0_0:notes" draw:style-name="gr1" draw:layer="layout" svg:width="16.932cm" svg:height="9.524cm" svg:x="1.059cm" svg:y="1.905cm" draw:page-number="40" presentation:class="page"/>
          <draw:frame draw:name="Google Shape;364;g3af9f17ed48_0_0:notes" presentation:style-name="pr50" draw:text-style-name="P4" draw:layer="layout" svg:width="15.239cm" svg:height="11.429cm" svg:x="1.905cm" svg:y="12.065cm" presentation:class="notes" presentation:placeholder="true" presentation:user-transformed="true">
            <draw:text-box/>
          </draw:frame>
        </presentation:notes>
      </draw:page>
      <draw:page draw:name="Orchestrator – variants" draw:style-name="dp1" draw:master-page-name="TITLE_5f_AND_5f_BODY" presentation:presentation-page-layout-name="AL2T1">
        <draw:frame draw:name="Google Shape;375;p53" presentation:style-name="pr17" draw:text-style-name="P7" draw:layer="layout" svg:width="12.652cm" svg:height="8.94cm" svg:x="6.529cm" svg:y="3.936cm" presentation:class="outline" presentation:user-transformed="true">
          <draw:text-box>
            <text:p text:style-name="P20"><text:span text:style-name="T11">An </text:span><text:span text:style-name="T12">API Composer</text:span><text:span text:style-name="T11"> parses a client’s request, forwards its parts to the underlying services, and merges the results into a single response to its client.</text:span></text:p>
            <text:p text:style-name="P22"><text:span text:style-name="T11">With </text:span><text:span text:style-name="T12">Scatter/Gather</text:span><text:span text:style-name="T11"> or </text:span><text:span text:style-name="T12">MapReduce</text:span><text:span text:style-name="T11"> a copy of the incoming request is forwarded to each shard, and the results are aggregated and sent to the client as a single response. </text:span></text:p>
          </draw:text-box>
        </draw:frame>
        <draw:custom-shape draw:name="Google Shape;376;p53" draw:style-name="gr3" draw:text-style-name="P19" draw:layer="layout" svg:width="4.719cm" svg:height="1.271cm" svg:x="1.148cm" svg:y="10.274cm">
          <text:p text:style-name="P1"><text:span text:style-name="T16">API Compo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53" draw:style-name="gr3" draw:text-style-name="P19" draw:layer="layout" svg:width="5.351cm" svg:height="2.033cm" svg:x="19.411cm" svg:y="10.474cm">
          <text:p text:style-name="P1"><text:span text:style-name="T16">Scatter/Gather, MapRedu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8;p53" presentation:style-name="pr5" draw:text-style-name="P8" draw:layer="layout" svg:width="23.667cm" svg:height="1.59cm" svg:x="0.866cm" svg:y="1.236cm" presentation:class="title" presentation:user-transformed="true">
          <draw:text-box>
            <text:p text:style-name="P1"><text:span text:style-name="T5">Orchestrator – variants</text:span></text:p>
          </draw:text-box>
        </draw:frame>
        <draw:frame draw:name="Google Shape;379;p53" draw:style-name="gr2" draw:text-style-name="P12" draw:layer="layout" svg:width="4.719cm" svg:height="5.841cm" svg:x="1.148cm" svg:y="4.323cm">
          <draw:image xlink:href="Pictures/100002010000020E0000028B282B4EAE14E40B81.png" xlink:type="simple" xlink:show="embed" xlink:actuate="onLoad">
            <text:p/>
          </draw:image>
        </draw:frame>
        <draw:frame draw:name="Google Shape;380;p53" draw:style-name="gr2" draw:text-style-name="P12" draw:layer="layout" svg:width="3.711cm" svg:height="5.951cm" svg:x="20.231cm" svg:y="4.323cm">
          <draw:image xlink:href="Pictures/10000201000001960000028BF2854A52539C7A77.png" xlink:type="simple" xlink:show="embed" xlink:actuate="onLoad">
            <text:p/>
          </draw:image>
        </draw:frame>
        <presentation:notes draw:style-name="dp2">
          <draw:page-thumbnail draw:name="Google Shape;372;g3af9f17ed48_0_30:notes" draw:style-name="gr1" draw:layer="layout" svg:width="16.932cm" svg:height="9.524cm" svg:x="1.059cm" svg:y="1.905cm" draw:page-number="41" presentation:class="page"/>
          <draw:frame draw:name="Google Shape;373;g3af9f17ed48_0_30:notes" presentation:style-name="pr51" draw:text-style-name="P4" draw:layer="layout" svg:width="15.239cm" svg:height="11.429cm" svg:x="1.905cm" svg:y="12.065cm" presentation:class="notes" presentation:placeholder="true" presentation:user-transformed="true">
            <draw:text-box/>
          </draw:frame>
        </presentation:notes>
      </draw:page>
      <draw:page draw:name="Orchestrator – variants" draw:style-name="dp1" draw:master-page-name="TITLE_5f_AND_5f_BODY" presentation:presentation-page-layout-name="AL2T1">
        <draw:frame draw:name="Google Shape;385;p54" presentation:style-name="pr5" draw:text-style-name="P8" draw:layer="layout" svg:width="23.667cm" svg:height="1.59cm" svg:x="0.866cm" svg:y="1.236cm" presentation:class="title" presentation:user-transformed="true">
          <draw:text-box>
            <text:p text:style-name="P1"><text:span text:style-name="T5">Orchestrator – variants</text:span></text:p>
          </draw:text-box>
        </draw:frame>
        <draw:frame draw:name="Google Shape;386;p54" presentation:style-name="pr11" draw:text-style-name="P7" draw:layer="layout" svg:width="14.245cm" svg:height="7.227cm" svg:x="10.288cm" svg:y="3.692cm" presentation:class="outline" presentation:user-transformed="true">
          <draw:text-box>
            <text:p text:style-name="P15"><text:span text:style-name="T22">Unlike </text:span><text:span text:style-name="T23">API Composer</text:span><text:span text:style-name="T22">, which runs actions in parallel, </text:span><text:span text:style-name="T23">Process Manager</text:span><text:span text:style-name="T22"> executes a use case as a sequence of steps. </text:span></text:p>
            <text:p text:style-name="P16"><text:span text:style-name="T22">It can have complex logic with branching and error handling.</text:span></text:p>
            <text:p text:style-name="P22"><text:span text:style-name="T22"/></text:p>
          </draw:text-box>
        </draw:frame>
        <draw:custom-shape draw:name="Google Shape;387;p54" draw:style-name="gr3" draw:text-style-name="P19" draw:layer="layout" svg:width="7.488cm" svg:height="1.271cm" svg:x="1.242cm" svg:y="10.115cm">
          <text:p text:style-name="P1"><text:span text:style-name="T16">Process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8;p54" draw:style-name="gr2" draw:text-style-name="P12" draw:layer="layout" svg:width="5.11cm" svg:height="5.743cm" svg:x="2.431cm" svg:y="4.122cm">
          <draw:image xlink:href="Pictures/1000020100000286000002D6DD1898668520D350.png" xlink:type="simple" xlink:show="embed" xlink:actuate="onLoad">
            <text:p/>
          </draw:image>
        </draw:frame>
        <presentation:notes draw:style-name="dp2">
          <draw:page-thumbnail draw:name="Google Shape;382;g3af9f17ed48_0_37:notes" draw:style-name="gr1" draw:layer="layout" svg:width="16.932cm" svg:height="9.524cm" svg:x="1.059cm" svg:y="1.905cm" draw:page-number="42" presentation:class="page"/>
          <draw:frame draw:name="Google Shape;383;g3af9f17ed48_0_37:notes" presentation:style-name="pr52" draw:text-style-name="P4" draw:layer="layout" svg:width="15.239cm" svg:height="11.429cm" svg:x="1.905cm" svg:y="12.065cm" presentation:class="notes" presentation:placeholder="true" presentation:user-transformed="true">
            <draw:text-box/>
          </draw:frame>
        </presentation:notes>
      </draw:page>
      <draw:page draw:name="Orchestrator – variants" draw:style-name="dp1" draw:master-page-name="TITLE_5f_AND_5f_BODY" presentation:presentation-page-layout-name="AL2T1">
        <draw:frame draw:name="Google Shape;393;p55" presentation:style-name="pr17" draw:text-style-name="P7" draw:layer="layout" svg:width="12.562cm" svg:height="8.94cm" svg:x="6.529cm" svg:y="3.936cm" presentation:class="outline" presentation:user-transformed="true">
          <draw:text-box>
            <text:p text:style-name="P15"><text:span text:style-name="T11">A </text:span><text:span text:style-name="T12">Saga</text:span><text:span text:style-name="T11"> is a scenario that updates states of multiple components:</text:span></text:p>
            <text:list text:style-name="L9">
              <text:list-item>
                <text:p text:style-name="P16"><text:span text:style-name="T11">An </text:span><text:span text:style-name="T12">Atomically Consistent Saga</text:span><text:span text:style-name="T11"> rolls back changes on any error.</text:span></text:p>
              </text:list-item>
              <text:list-item>
                <text:p text:style-name="P21"><text:span text:style-name="T11">An </text:span><text:span text:style-name="T12">Eventually Consistent Saga</text:span><text:span text:style-name="T11"> retries applying the changes till it succeeds.</text:span></text:p>
              </text:list-item>
            </text:list>
          </draw:text-box>
        </draw:frame>
        <draw:custom-shape draw:name="Google Shape;394;p55" draw:style-name="gr3" draw:text-style-name="P19" draw:layer="layout" svg:width="5.256cm" svg:height="2.033cm" svg:x="0.866cm" svg:y="9.992cm">
          <text:p text:style-name="P1"><text:span text:style-name="T16">Atomically Consistent Sag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5;p55" draw:style-name="gr3" draw:text-style-name="P19" draw:layer="layout" svg:width="5.351cm" svg:height="2.033cm" svg:x="19.451cm" svg:y="9.992cm">
          <text:p text:style-name="P1"><text:span text:style-name="T16">Eventually Consistent Sag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6;p55" presentation:style-name="pr5" draw:text-style-name="P8" draw:layer="layout" svg:width="23.667cm" svg:height="1.59cm" svg:x="0.866cm" svg:y="1.236cm" presentation:class="title" presentation:user-transformed="true">
          <draw:text-box>
            <text:p text:style-name="P1"><text:span text:style-name="T5">Orchestrator – variants</text:span></text:p>
          </draw:text-box>
        </draw:frame>
        <draw:frame draw:name="Google Shape;397;p55" draw:style-name="gr2" draw:text-style-name="P12" draw:layer="layout" svg:width="4.703cm" svg:height="5.322cm" svg:x="1.142cm" svg:y="4.482cm">
          <draw:image xlink:href="Pictures/1000020100000286000002DB006FE96CC255A04D.png" xlink:type="simple" xlink:show="embed" xlink:actuate="onLoad">
            <text:p/>
          </draw:image>
        </draw:frame>
        <draw:frame draw:name="Google Shape;398;p55" draw:style-name="gr2" draw:text-style-name="P12" draw:layer="layout" svg:width="4.703cm" svg:height="5.322cm" svg:x="19.775cm" svg:y="4.482cm">
          <draw:image xlink:href="Pictures/1000020100000286000002DBA431B40CD9002085.png" xlink:type="simple" xlink:show="embed" xlink:actuate="onLoad">
            <text:p/>
          </draw:image>
        </draw:frame>
        <presentation:notes draw:style-name="dp2">
          <draw:page-thumbnail draw:name="Google Shape;390;g3af9f17ed48_0_43:notes" draw:style-name="gr1" draw:layer="layout" svg:width="16.932cm" svg:height="9.524cm" svg:x="1.059cm" svg:y="1.905cm" draw:page-number="43" presentation:class="page"/>
          <draw:frame draw:name="Google Shape;391;g3af9f17ed48_0_43:notes" presentation:style-name="pr34" draw:text-style-name="P26" draw:layer="layout" svg:width="15.239cm" svg:height="11.429cm" svg:x="1.905cm" svg:y="12.065cm" presentation:class="notes" presentation:user-transformed="true">
            <draw:text-box>
              <text:p text:style-name="P25"><text:span text:style-name="T21"><text:a xlink:href="https://metapatterns.io/basic-metapatterns/layers/" xlink:type="simple">https://metapatterns.io/basic-metapatterns/layers/</text:a></text:span></text:p>
            </draw:text-box>
          </draw:frame>
        </presentation:notes>
      </draw:page>
      <draw:page draw:name="Orchestrator – variants" draw:style-name="dp1" draw:master-page-name="TITLE_5f_AND_5f_BODY" presentation:presentation-page-layout-name="AL2T1">
        <draw:frame draw:name="Google Shape;403;p56" presentation:style-name="pr5" draw:text-style-name="P8" draw:layer="layout" svg:width="23.667cm" svg:height="1.59cm" svg:x="0.866cm" svg:y="1.236cm" presentation:class="title" presentation:user-transformed="true">
          <draw:text-box>
            <text:p text:style-name="P1"><text:span text:style-name="T5">Orchestrator – variants</text:span></text:p>
          </draw:text-box>
        </draw:frame>
        <draw:frame draw:name="Google Shape;404;p56" presentation:style-name="pr11" draw:text-style-name="P7" draw:layer="layout" svg:width="14.245cm" svg:height="7.227cm" svg:x="10.288cm" svg:y="3.692cm" presentation:class="outline" presentation:user-transformed="true">
          <draw:text-box>
            <text:p text:style-name="P15"><text:span text:style-name="T22">An </text:span><text:span text:style-name="T23">Integration Service</text:span><text:span text:style-name="T22"> is a full-featured service which uses other services in its operation.</text:span></text:p>
            <text:p text:style-name="P22"><text:span text:style-name="T22">It tends to implement the application layer (use case logic) in DDD terminology.</text:span></text:p>
          </draw:text-box>
        </draw:frame>
        <draw:custom-shape draw:name="Google Shape;405;p56" draw:style-name="gr3" draw:text-style-name="P19" draw:layer="layout" svg:width="7.488cm" svg:height="2.033cm" svg:x="1.303cm" svg:y="9.801cm">
          <text:p text:style-name="P1"><text:span text:style-name="T16">Integration Service, Application 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6;p56" draw:style-name="gr2" draw:text-style-name="P12" draw:layer="layout" svg:width="5.408cm" svg:height="5.743cm" svg:x="2.343cm" svg:y="4.057cm">
          <draw:image xlink:href="Pictures/1000020100000286000002AE7A87B30D30A5798C.png" xlink:type="simple" xlink:show="embed" xlink:actuate="onLoad">
            <text:p/>
          </draw:image>
        </draw:frame>
        <presentation:notes draw:style-name="dp2">
          <draw:page-thumbnail draw:name="Google Shape;400;g3af9f17ed48_0_50:notes" draw:style-name="gr1" draw:layer="layout" svg:width="16.932cm" svg:height="9.524cm" svg:x="1.059cm" svg:y="1.905cm" draw:page-number="44" presentation:class="page"/>
          <draw:frame draw:name="Google Shape;401;g3af9f17ed48_0_50:notes" presentation:style-name="pr53" draw:text-style-name="P4" draw:layer="layout" svg:width="15.239cm" svg:height="11.429cm" svg:x="1.905cm" svg:y="12.065cm" presentation:class="notes" presentation:placeholder="true" presentation:user-transformed="true">
            <draw:text-box/>
          </draw:frame>
        </presentation:notes>
      </draw:page>
      <draw:page draw:name="Combined Component" draw:style-name="dp1" draw:master-page-name="SECTION_5f_HEADER">
        <draw:frame draw:name="Google Shape;411;p57" presentation:style-name="pr8" draw:text-style-name="P13" draw:layer="layout" svg:width="23.667cm" svg:height="2.337cm" svg:x="0.866cm" svg:y="4.805cm" presentation:class="title" presentation:user-transformed="true">
          <draw:text-box>
            <text:p text:style-name="P1"><text:span text:style-name="T9">Combined Component</text:span></text:p>
          </draw:text-box>
        </draw:frame>
        <draw:frame draw:name="Google Shape;412;p57" presentation:style-name="pr9" draw:text-style-name="P14" draw:layer="layout" svg:width="23.667cm" svg:height="2.201cm" svg:x="0.866cm" svg:y="7.144cm" presentation:class="subtitle" presentation:user-transformed="true">
          <draw:text-box>
            <text:p text:style-name="P11"><text:span text:style-name="T10">A multifunctional layer</text:span></text:p>
          </draw:text-box>
        </draw:frame>
        <presentation:notes draw:style-name="dp2">
          <draw:page-thumbnail draw:name="Google Shape;408;g3ada4842c12_0_0:notes" draw:style-name="gr1" draw:layer="layout" svg:width="16.932cm" svg:height="9.524cm" svg:x="1.059cm" svg:y="1.905cm" draw:page-number="45" presentation:class="page"/>
          <draw:frame draw:name="Google Shape;409;g3ada4842c12_0_0:notes" presentation:style-name="pr54" draw:text-style-name="P4" draw:layer="layout" svg:width="15.239cm" svg:height="11.429cm" svg:x="1.905cm" svg:y="12.065cm" presentation:class="notes" presentation:placeholder="true" presentation:user-transformed="true">
            <draw:text-box/>
          </draw:frame>
        </presentation:notes>
      </draw:page>
      <draw:page draw:name="Combined Component – overview" draw:style-name="dp1" draw:master-page-name="TITLE_5f_AND_5f_BODY" presentation:presentation-page-layout-name="AL2T1">
        <draw:frame draw:name="Google Shape;417;p58" presentation:style-name="pr5" draw:text-style-name="P8" draw:layer="layout" svg:width="23.667cm" svg:height="1.59cm" svg:x="0.866cm" svg:y="1.236cm" presentation:class="title" presentation:user-transformed="true">
          <draw:text-box>
            <text:p text:style-name="P1"><text:span text:style-name="T5">Combined Component – overview</text:span></text:p>
          </draw:text-box>
        </draw:frame>
        <draw:frame draw:name="Google Shape;418;p58" presentation:style-name="pr11" draw:text-style-name="P7" draw:layer="layout" svg:width="15.988cm" svg:height="6.903cm" svg:x="8.546cm" svg:y="3.201cm" presentation:class="outline" presentation:user-transformed="true">
          <draw:text-box>
            <text:p text:style-name="P27"><text:span text:style-name="T11">A </text:span><text:span text:style-name="T12">Combined Component</text:span><text:span text:style-name="T11"> implements the functionality of several different system-wide layers.</text:span></text:p>
          </draw:text-box>
        </draw:frame>
        <draw:frame draw:name="Google Shape;419;p58" presentation:style-name="pr4" draw:text-style-name="P7" draw:layer="layout" svg:width="23.667cm" svg:height="3.001cm" svg:x="0.866cm" svg:y="10.572cm" presentation:class="outline" presentation:user-transformed="true">
          <draw:text-box>
            <text:p text:style-name="P17"><text:span text:style-name="T13">Combined Components</text:span><text:span text:style-name="T14"> expedite programming in familiar domains.</text:span></text:p>
            <text:p text:style-name="P18"><text:span text:style-name="T15">It is very hard to replace if you outgrow it.</text:span></text:p>
          </draw:text-box>
        </draw:frame>
        <draw:custom-shape draw:name="Google Shape;420;p58" draw:style-name="gr3" draw:text-style-name="P19" draw:layer="layout" svg:width="5.82cm" svg:height="2.033cm" svg:x="1.695cm" svg:y="8.519cm">
          <text:p text:style-name="P1"><text:span text:style-name="T16">Combined Compon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1;p58" draw:style-name="gr2" draw:text-style-name="P12" draw:layer="layout" svg:width="6.423cm" svg:height="5.377cm" svg:x="1.394cm" svg:y="3.201cm">
          <draw:image xlink:href="Pictures/1000020100000368000002DAF4AA6AD5D3F8F90C.png" xlink:type="simple" xlink:show="embed" xlink:actuate="onLoad">
            <text:p/>
          </draw:image>
        </draw:frame>
        <presentation:notes draw:style-name="dp2">
          <draw:page-thumbnail draw:name="Google Shape;414;g3ada4842c12_0_5:notes" draw:style-name="gr1" draw:layer="layout" svg:width="16.932cm" svg:height="9.524cm" svg:x="1.059cm" svg:y="1.905cm" draw:page-number="46" presentation:class="page"/>
          <draw:frame draw:name="Google Shape;415;g3ada4842c12_0_5:notes" presentation:style-name="pr55" draw:text-style-name="P4" draw:layer="layout" svg:width="15.239cm" svg:height="11.429cm" svg:x="1.905cm" svg:y="12.065cm" presentation:class="notes" presentation:placeholder="true" presentation:user-transformed="true">
            <draw:text-box/>
          </draw:frame>
        </presentation:notes>
      </draw:page>
      <draw:page draw:name="Combined Component – trade-offs" draw:style-name="dp1" draw:master-page-name="TITLE_5f_AND_5f_TWO_5f_COLUMNS" presentation:presentation-page-layout-name="AL3T3">
        <draw:frame draw:name="Google Shape;426;p59" presentation:style-name="pr13" draw:text-style-name="P8" draw:layer="layout" svg:width="23.667cm" svg:height="1.59cm" svg:x="0.866cm" svg:y="1.236cm" presentation:class="title" presentation:user-transformed="true">
          <draw:text-box>
            <text:p text:style-name="P1"><text:span text:style-name="T5">Combined Component – trade-offs</text:span></text:p>
          </draw:text-box>
        </draw:frame>
        <draw:frame draw:name="Google Shape;427;p59" presentation:style-name="pr14" draw:text-style-name="P19" draw:layer="layout" svg:width="11.11cm" svg:height="9.061cm" svg:x="0.866cm" svg:y="3.201cm" presentation:class="outline" presentation:user-transformed="true">
          <draw:text-box>
            <text:p text:style-name="P20"><text:span text:style-name="T17">Covers many of your needs off the shelf</text:span></text:p>
            <text:p text:style-name="P22"><text:span text:style-name="T17">Has better performance and simpler setup than a set of stand-alone layers</text:span></text:p>
          </draw:text-box>
        </draw:frame>
        <draw:frame draw:name="Google Shape;428;p59" presentation:style-name="pr15" draw:text-style-name="P19" draw:layer="layout" svg:width="11.11cm" svg:height="9.061cm" svg:x="13.423cm" svg:y="3.201cm" presentation:class="outline" presentation:user-transformed="true">
          <draw:text-box>
            <text:p text:style-name="P20"><text:span text:style-name="T18">Locks you to its vendor</text:span></text:p>
            <text:p text:style-name="P16"><text:span text:style-name="T18">Requires learning a proprietary technology</text:span></text:p>
            <text:p text:style-name="P22"><text:span text:style-name="T18">May be too simple, too complex, or just misaligned for your needs</text:span></text:p>
          </draw:text-box>
        </draw:frame>
        <presentation:notes draw:style-name="dp2">
          <draw:page-thumbnail draw:name="Google Shape;423;g3ada4842c12_0_13:notes" draw:style-name="gr1" draw:layer="layout" svg:width="16.932cm" svg:height="9.524cm" svg:x="1.059cm" svg:y="1.905cm" draw:page-number="47" presentation:class="page"/>
          <draw:frame draw:name="Google Shape;424;g3ada4842c12_0_13:notes" presentation:style-name="pr56" draw:text-style-name="P4" draw:layer="layout" svg:width="15.239cm" svg:height="11.429cm" svg:x="1.905cm" svg:y="12.065cm" presentation:class="notes" presentation:placeholder="true" presentation:user-transformed="true">
            <draw:text-box/>
          </draw:frame>
        </presentation:notes>
      </draw:page>
      <draw:page draw:name="Combined Component – examples" draw:style-name="dp1" draw:master-page-name="TITLE_5f_AND_5f_BODY" presentation:presentation-page-layout-name="AL2T1">
        <draw:frame draw:name="Google Shape;433;p60" presentation:style-name="pr5" draw:text-style-name="P8" draw:layer="layout" svg:width="23.667cm" svg:height="1.59cm" svg:x="0.866cm" svg:y="1.236cm" presentation:class="title" presentation:user-transformed="true">
          <draw:text-box>
            <text:p text:style-name="P1"><text:span text:style-name="T5">Combined Component – examples</text:span></text:p>
          </draw:text-box>
        </draw:frame>
        <draw:frame draw:name="Google Shape;434;p60" draw:style-name="standard" draw:layer="layout" svg:width="22.479cm" svg:height="6.662cm" svg:x="1.459cm" svg:y="4.792cm">
          <table:table>
            <table:table-column table:style-name="co5"/>
            <table:table-column table:style-name="co5"/>
            <table:table-column table:style-name="co5"/>
            <table:table-column table:style-name="co5"/>
            <table:table-column table:style-name="co5"/>
            <table:table-row table:style-name="ro6" table:default-cell-style-name="ce3">
              <table:table-cell/>
              <table:table-cell/>
              <table:table-cell/>
              <table:table-cell/>
              <table:table-cell/>
            </table:table-row>
            <table:table-row table:style-name="ro7" table:default-cell-style-name="ce4">
              <table:table-cell>
                <text:p text:style-name="P1"><text:span text:style-name="T24">Service Mesh</text:span></text:p>
              </table:table-cell>
              <table:table-cell>
                <text:p text:style-name="P1"><text:span text:style-name="T24">Event Mediator</text:span></text:p>
              </table:table-cell>
              <table:table-cell>
                <text:p text:style-name="P1"><text:span text:style-name="T24">Message Bus</text:span></text:p>
              </table:table-cell>
              <table:table-cell>
                <text:p text:style-name="P1"><text:span text:style-name="T24">Enterprise Service Bus</text:span></text:p>
              </table:table-cell>
              <table:table-cell>
                <text:p text:style-name="P1"><text:span text:style-name="T24">API Gateway</text:span></text:p>
              </table:table-cell>
            </table:table-row>
          </table:table>
          <draw:image xlink:href="Pictures/TablePreview3.svm" xlink:type="simple" xlink:show="embed" xlink:actuate="onLoad"/>
        </draw:frame>
        <draw:frame draw:name="Google Shape;435;p60" presentation:style-name="pr17" draw:text-style-name="P7" draw:layer="layout" svg:width="23.667cm" svg:height="1.59cm" svg:x="0.866cm" svg:y="3.201cm" presentation:class="outline" presentation:user-transformed="true">
          <draw:text-box>
            <text:p text:style-name="P11"><text:span text:style-name="T11">We have already covered several Combined Components:</text:span></text:p>
          </draw:text-box>
        </draw:frame>
        <draw:frame draw:name="Google Shape;436;p60" draw:style-name="gr2" draw:text-style-name="P12" draw:layer="layout" svg:width="3.862cm" svg:height="3.011cm" svg:x="10.852cm" svg:y="5.768cm">
          <draw:image xlink:href="Pictures/10000201000002D600000236B5132C55C988699C.png" xlink:type="simple" xlink:show="embed" xlink:actuate="onLoad">
            <text:p/>
          </draw:image>
        </draw:frame>
        <draw:frame draw:name="Google Shape;437;p60" draw:style-name="gr2" draw:text-style-name="P12" draw:layer="layout" svg:width="3.862cm" svg:height="4.61cm" svg:x="6.272cm" svg:y="5.078cm">
          <draw:image xlink:href="Pictures/10000201000002860000030368AB4CFBA1636267.png" xlink:type="simple" xlink:show="embed" xlink:actuate="onLoad">
            <text:p/>
          </draw:image>
        </draw:frame>
        <draw:frame draw:name="Google Shape;438;p60" draw:style-name="gr2" draw:text-style-name="P12" draw:layer="layout" svg:width="3.862cm" svg:height="2.816cm" svg:x="1.775cm" svg:y="5.866cm">
          <draw:image xlink:href="Pictures/100002010000037600000286F73345B74E114F6A.png" xlink:type="simple" xlink:show="embed" xlink:actuate="onLoad">
            <text:p/>
          </draw:image>
        </draw:frame>
        <draw:frame draw:name="Google Shape;439;p60" draw:style-name="gr2" draw:text-style-name="P12" draw:layer="layout" svg:width="3.862cm" svg:height="3.999cm" svg:x="15.307cm" svg:y="5.144cm">
          <draw:image xlink:href="Pictures/10000201000004160000043B0D7141A9A9C7ECE4.png" xlink:type="simple" xlink:show="embed" xlink:actuate="onLoad">
            <text:p/>
          </draw:image>
        </draw:frame>
        <draw:frame draw:name="Google Shape;440;p60" draw:style-name="gr2" draw:text-style-name="P12" draw:layer="layout" svg:width="3.896cm" svg:height="4.391cm" svg:x="19.763cm" svg:y="5.078cm">
          <draw:image xlink:href="Pictures/1000020100000286000002D8C7C1FB26104AB3C3.png" xlink:type="simple" xlink:show="embed" xlink:actuate="onLoad">
            <text:p/>
          </draw:image>
        </draw:frame>
        <presentation:notes draw:style-name="dp2">
          <draw:page-thumbnail draw:name="Google Shape;430;g3ada4842c12_0_19:notes" draw:style-name="gr1" draw:layer="layout" svg:width="16.932cm" svg:height="9.524cm" svg:x="1.059cm" svg:y="1.905cm" draw:page-number="48" presentation:class="page"/>
          <draw:frame draw:name="Google Shape;431;g3ada4842c12_0_19:notes" presentation:style-name="pr57" draw:text-style-name="P4" draw:layer="layout" svg:width="15.239cm" svg:height="11.429cm" svg:x="1.905cm" svg:y="12.065cm" presentation:class="notes" presentation:placeholder="true" presentation:user-transformed="true">
            <draw:text-box/>
          </draw:frame>
        </presentation:notes>
      </draw:page>
      <draw:page draw:name="Combined Component – examples" draw:style-name="dp1" draw:master-page-name="TITLE_5f_AND_5f_BODY" presentation:presentation-page-layout-name="AL2T1">
        <draw:frame draw:name="Google Shape;445;p61" presentation:style-name="pr5" draw:text-style-name="P8" draw:layer="layout" svg:width="23.667cm" svg:height="1.59cm" svg:x="0.866cm" svg:y="1.236cm" presentation:class="title" presentation:user-transformed="true">
          <draw:text-box>
            <text:p text:style-name="P1"><text:span text:style-name="T5">Combined Component – examples</text:span></text:p>
          </draw:text-box>
        </draw:frame>
        <draw:frame draw:name="Google Shape;446;p61" presentation:style-name="pr11" draw:text-style-name="P7" draw:layer="layout" svg:width="14.461cm" svg:height="9.55cm" svg:x="10.073cm" svg:y="3.692cm" presentation:class="outline" presentation:user-transformed="true">
          <draw:text-box>
            <text:p text:style-name="P15"><text:span text:style-name="T23">Space-Based Architecture</text:span><text:span text:style-name="T22"> (</text:span><text:span text:style-name="T23">SBA</text:span><text:span text:style-name="T22">) provides a complex framework that contains:</text:span></text:p>
            <text:list text:style-name="L13">
              <text:list-item>
                <text:p text:style-name="P16"><text:span text:style-name="T23">Messaging Grid</text:span><text:span text:style-name="T22"> – a </text:span><text:span text:style-name="T23">Proxy</text:span><text:span text:style-name="T22"> that processes client requests.</text:span></text:p>
              </text:list-item>
              <text:list-item>
                <text:p text:style-name="P15"><text:span text:style-name="T22">A </text:span><text:span text:style-name="T23">Processing Grid</text:span><text:span text:style-name="T22"> – an </text:span><text:span text:style-name="T23">Orchestrator</text:span><text:span text:style-name="T22"> for complex workflows.</text:span></text:p>
              </text:list-item>
              <text:list-item>
                <text:p text:style-name="P15"><text:span text:style-name="T22">A </text:span><text:span text:style-name="T23">Data Grid</text:span><text:span text:style-name="T22"> – a distributed </text:span><text:span text:style-name="T23">Shared Repository</text:span><text:span text:style-name="T22">.</text:span></text:p>
              </text:list-item>
              <text:list-item>
                <text:p text:style-name="P15"><text:span text:style-name="T22">A </text:span><text:span text:style-name="T23">Deployment Manager</text:span><text:span text:style-name="T22"> – a </text:span><text:span text:style-name="T23">Middleware</text:span><text:span text:style-name="T22">.</text:span></text:p>
              </text:list-item>
            </text:list>
            <text:p text:style-name="P22"><text:span text:style-name="T22"/></text:p>
          </draw:text-box>
        </draw:frame>
        <draw:custom-shape draw:name="Google Shape;447;p61" draw:style-name="gr3" draw:text-style-name="P19" draw:layer="layout" svg:width="7.977cm" svg:height="1.271cm" svg:x="1.289cm" svg:y="12.109cm">
          <text:p text:style-name="P1"><text:span text:style-name="T16">Space-Based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8;p61" draw:style-name="gr2" draw:text-style-name="P12" draw:layer="layout" svg:width="6.337cm" svg:height="7.767cm" svg:x="2.109cm" svg:y="4.191cm">
          <draw:image xlink:href="Pictures/10000201000003760000043E0537519F0F10BD4B.png" xlink:type="simple" xlink:show="embed" xlink:actuate="onLoad">
            <text:p/>
          </draw:image>
        </draw:frame>
        <presentation:notes draw:style-name="dp2">
          <draw:page-thumbnail draw:name="Google Shape;442;g3ada4842c12_0_28:notes" draw:style-name="gr1" draw:layer="layout" svg:width="16.932cm" svg:height="9.524cm" svg:x="1.059cm" svg:y="1.905cm" draw:page-number="49" presentation:class="page"/>
          <draw:frame draw:name="Google Shape;443;g3ada4842c12_0_28:notes" presentation:style-name="pr58" draw:text-style-name="P4" draw:layer="layout" svg:width="15.239cm" svg:height="11.429cm" svg:x="1.905cm" svg:y="12.065cm" presentation:class="notes" presentation:placeholder="true" presentation:user-transformed="true">
            <draw:text-box/>
          </draw:frame>
        </presentation:notes>
      </draw:page>
      <draw:page draw:name="Combined Component – examples" draw:style-name="dp1" draw:master-page-name="TITLE_5f_AND_5f_BODY" presentation:presentation-page-layout-name="AL2T1">
        <draw:frame draw:name="Google Shape;453;p62" presentation:style-name="pr5" draw:text-style-name="P8" draw:layer="layout" svg:width="23.667cm" svg:height="1.59cm" svg:x="0.866cm" svg:y="1.236cm" presentation:class="title" presentation:user-transformed="true">
          <draw:text-box>
            <text:p text:style-name="P1"><text:span text:style-name="T5">Combined Component – examples</text:span></text:p>
          </draw:text-box>
        </draw:frame>
        <draw:frame draw:name="Google Shape;454;p62" presentation:style-name="pr11" draw:text-style-name="P7" draw:layer="layout" svg:width="14.427cm" svg:height="8.786cm" svg:x="10.106cm" svg:y="3.692cm" presentation:class="outline" presentation:user-transformed="true">
          <draw:text-box>
            <text:p text:style-name="P15"><text:span text:style-name="T22">A </text:span><text:span text:style-name="T23">Cell</text:span><text:span text:style-name="T22"> is an intermediate step in transition from </text:span><text:span text:style-name="T23">Layers</text:span><text:span text:style-name="T22"> to </text:span><text:span text:style-name="T23">Services</text:span><text:span text:style-name="T22">.</text:span></text:p>
            <text:p text:style-name="P16"><text:span text:style-name="T22">The domain logic layer is the easiest to subdivide into services, while other components remain as layers.</text:span></text:p>
            <text:p text:style-name="P22"><text:span text:style-name="T22">Though not being genuine </text:span><text:span text:style-name="T23">Combined Components</text:span><text:span text:style-name="T22">, </text:span><text:span text:style-name="T23">Cells</text:span><text:span text:style-name="T22"> show a similar structure.</text:span></text:p>
          </draw:text-box>
        </draw:frame>
        <draw:custom-shape draw:name="Google Shape;455;p62" draw:style-name="gr3" draw:text-style-name="P19" draw:layer="layout" svg:width="8.385cm" svg:height="1.271cm" svg:x="0.856cm" svg:y="10.964cm">
          <text:p text:style-name="P1"><text:span text:style-name="T16">C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6;p62" draw:style-name="gr2" draw:text-style-name="P12" draw:layer="layout" svg:width="6.164cm" svg:height="6.164cm" svg:x="1.967cm" svg:y="4.229cm">
          <draw:image xlink:href="Pictures/10000201000001E6000001E68CF3133A61E65386.png" xlink:type="simple" xlink:show="embed" xlink:actuate="onLoad">
            <text:p/>
          </draw:image>
        </draw:frame>
        <presentation:notes draw:style-name="dp2">
          <draw:page-thumbnail draw:name="Google Shape;450;g3ada4842c12_0_35:notes" draw:style-name="gr1" draw:layer="layout" svg:width="16.932cm" svg:height="9.524cm" svg:x="1.059cm" svg:y="1.905cm" draw:page-number="50" presentation:class="page"/>
          <draw:frame draw:name="Google Shape;451;g3ada4842c12_0_35:notes" presentation:style-name="pr59" draw:text-style-name="P4" draw:layer="layout" svg:width="15.239cm" svg:height="11.429cm" svg:x="1.905cm" svg:y="12.065cm" presentation:class="notes" presentation:placeholder="true" presentation:user-transformed="true">
            <draw:text-box/>
          </draw:frame>
        </presentation:notes>
      </draw:page>
      <draw:page draw:name="Conclusion" draw:style-name="dp1" draw:master-page-name="SECTION_5f_HEADER">
        <draw:frame draw:name="Google Shape;461;p63" presentation:style-name="pr8" draw:text-style-name="P13" draw:layer="layout" svg:width="23.667cm" svg:height="2.337cm" svg:x="0.866cm" svg:y="5.975cm" presentation:class="title" presentation:user-transformed="true">
          <draw:text-box>
            <text:p text:style-name="P1"><text:span text:style-name="T9">Conclusion</text:span></text:p>
          </draw:text-box>
        </draw:frame>
        <presentation:notes draw:style-name="dp2">
          <draw:page-thumbnail draw:name="Google Shape;458;g39ecdd5df51_0_44:notes" draw:style-name="gr1" draw:layer="layout" svg:width="16.932cm" svg:height="9.524cm" svg:x="1.059cm" svg:y="1.905cm" draw:page-number="51" presentation:class="page"/>
          <draw:frame draw:name="Google Shape;459;g39ecdd5df51_0_44:notes" presentation:style-name="pr60" draw:text-style-name="P4" draw:layer="layout" svg:width="15.239cm" svg:height="11.429cm" svg:x="1.905cm" svg:y="12.065cm" presentation:class="notes" presentation:placeholder="true" presentation:user-transformed="true">
            <draw:text-box/>
          </draw:frame>
        </presentation:notes>
      </draw:page>
      <draw:page draw:name="Moving functionality out of services" draw:style-name="dp1" draw:master-page-name="TITLE_5f_AND_5f_BODY" presentation:presentation-page-layout-name="AL2T1">
        <draw:frame draw:name="Google Shape;466;p64" presentation:style-name="pr17" draw:text-style-name="P7" draw:layer="layout" svg:width="23.667cm" svg:height="10.04cm" svg:x="0.866cm" svg:y="3.201cm" presentation:class="outline" presentation:user-transformed="true">
          <draw:text-box>
            <text:p text:style-name="P20"><text:span text:style-name="T11">Each of the extension patterns which we’ve reviewed takes care of some functionality which would otherwise need to be implemented by the main services that contain the business logic.</text:span></text:p>
            <text:p text:style-name="P16"><text:span text:style-name="T11">It is the business logic that makes the core of the business and brings profit to the company. Your teams should concentrate their efforts on developing it. Everything else is expendable and should be acquired when available off the shelf.</text:span></text:p>
            <text:p text:style-name="P22"><text:span text:style-name="T11">Segregating technical or behavioral aspects not only lowers the development complexity, but may also decouple the subdomains, as we see when data-centric systems are built around </text:span><text:span text:style-name="T12">Shared Repositories</text:span><text:span text:style-name="T11"> or when applications with complex use cases employ </text:span><text:span text:style-name="T12">Orchestrators</text:span><text:span text:style-name="T11">.</text:span></text:p>
          </draw:text-box>
        </draw:frame>
        <draw:frame draw:name="Google Shape;467;p64" presentation:style-name="pr5" draw:text-style-name="P8" draw:layer="layout" svg:width="23.667cm" svg:height="1.59cm" svg:x="0.866cm" svg:y="1.236cm" presentation:class="title" presentation:user-transformed="true">
          <draw:text-box>
            <text:p text:style-name="P1"><text:span text:style-name="T5">Moving functionality out of services</text:span></text:p>
          </draw:text-box>
        </draw:frame>
        <presentation:notes draw:style-name="dp2">
          <draw:page-thumbnail draw:name="Google Shape;463;g3afbd97c74f_0_0:notes" draw:style-name="gr1" draw:layer="layout" svg:width="16.932cm" svg:height="9.524cm" svg:x="1.059cm" svg:y="1.905cm" draw:page-number="52" presentation:class="page"/>
          <draw:frame draw:name="Google Shape;464;g3afbd97c74f_0_0:notes" presentation:style-name="pr61" draw:text-style-name="P4" draw:layer="layout" svg:width="15.239cm" svg:height="11.429cm" svg:x="1.905cm" svg:y="12.065cm" presentation:class="notes" presentation:placeholder="true" presentation:user-transformed="true">
            <draw:text-box/>
          </draw:frame>
        </presentation:notes>
      </draw:page>
      <draw:page draw:name="Links" draw:style-name="dp1" draw:master-page-name="TITLE_5f_AND_5f_BODY" presentation:presentation-page-layout-name="AL2T1">
        <draw:frame draw:name="Google Shape;472;p65" presentation:style-name="pr5" draw:text-style-name="P8" draw:layer="layout" svg:width="23.667cm" svg:height="1.59cm" svg:x="0.866cm" svg:y="1.236cm" presentation:class="title" presentation:user-transformed="true">
          <draw:text-box>
            <text:p text:style-name="P1"><text:span text:style-name="T5">Links</text:span></text:p>
          </draw:text-box>
        </draw:frame>
        <draw:frame draw:name="Google Shape;473;p65" presentation:style-name="pr17" draw:text-style-name="P7" draw:layer="layout" svg:width="23.667cm" svg:height="6.506cm" svg:x="0.866cm" svg:y="3.201cm" presentation:class="outline" presentation:user-transformed="true">
          <draw:text-box>
            <text:p text:style-name="P15"><text:span text:style-name="T11">This was an overview of part 3 of my book </text:span><text:span text:style-name="T12">Architectural Metapatterns</text:span><text:span text:style-name="T11"> which is available:</text:span></text:p>
            <text:p text:style-name="P16"><text:span text:style-name="T11">– </text:span><text:span text:style-name="T11">as a website </text:span><text:span text:style-name="T25"><text:a xlink:href="https://metapatterns.io/" xlink:type="simple">metapatterns.io</text:a></text:span></text:p>
            <text:p text:style-name="P16"><text:span text:style-name="T11">– </text:span><text:span text:style-name="T11">as a PDF or EPUB from </text:span><text:span text:style-name="T25"><text:a xlink:href="https://leanpub.com/metapatterns" xlink:type="simple">leanpub.com/metapatterns</text:a></text:span></text:p>
            <text:p text:style-name="P22"><text:span text:style-name="T11">The diagrams and the ODT source file are available under the CC BY license.</text:span></text:p>
          </draw:text-box>
        </draw:frame>
        <draw:frame draw:name="Google Shape;474;p65" presentation:style-name="pr4" draw:text-style-name="P7" draw:layer="layout" svg:width="23.667cm" svg:height="3.218cm" svg:x="0.866cm" svg:y="9.708cm" presentation:class="outline" presentation:user-transformed="true">
          <draw:text-box>
            <text:p text:style-name="P17"><text:span text:style-name="T26">More patterns are to follow…</text:span></text:p>
          </draw:text-box>
        </draw:frame>
        <presentation:notes draw:style-name="dp2">
          <draw:page-thumbnail draw:name="Google Shape;469;g39ecdd5df51_0_53:notes" draw:style-name="gr1" draw:layer="layout" svg:width="16.932cm" svg:height="9.524cm" svg:x="1.059cm" svg:y="1.905cm" draw:page-number="53" presentation:class="page"/>
          <draw:frame draw:name="Google Shape;470;g39ecdd5df51_0_53:notes" presentation:style-name="pr62"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1212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212121"/>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212121"/>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adada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66"/>
    <meta:generator>LibreOfficeDev/6.0.5.2$Linux_X86_64 LibreOffice_project/</meta:generator>
  </office:meta>
</office:document-meta>
</file>