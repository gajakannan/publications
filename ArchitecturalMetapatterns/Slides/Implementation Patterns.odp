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7AC0000039E3ADAFDDDA50DF1C9.png" manifest:media-type="image/png"/>
  <manifest:file-entry manifest:full-path="Pictures/1000020100000260000002D68C556EB31DBE6315.png" manifest:media-type="image/png"/>
  <manifest:file-entry manifest:full-path="Pictures/100002010000046E000003766B5F88F6BB876F7B.png" manifest:media-type="image/png"/>
  <manifest:file-entry manifest:full-path="Pictures/100002010000025F0000025E20BC8891B9B8879B.png" manifest:media-type="image/png"/>
  <manifest:file-entry manifest:full-path="Pictures/1000020100000236000001C56580A95572D3B94B.png" manifest:media-type="image/png"/>
  <manifest:file-entry manifest:full-path="Pictures/10000201000002AE000002D66C1F289604020D65.png" manifest:media-type="image/png"/>
  <manifest:file-entry manifest:full-path="Pictures/10000201000001BE000002FE137FA8C7455D98ED.png" manifest:media-type="image/png"/>
  <manifest:file-entry manifest:full-path="Pictures/1000020100000232000002D6DF77A539256BD9AC.png" manifest:media-type="image/png"/>
  <manifest:file-entry manifest:full-path="Pictures/100002010000028600000287037642A698E8CD1F.png" manifest:media-type="image/png"/>
  <manifest:file-entry manifest:full-path="Pictures/100002010000023C000001BB9A4FE41566E12D83.png" manifest:media-type="image/png"/>
  <manifest:file-entry manifest:full-path="Pictures/1000020100000286000002FDAEC64F6F04BC2903.png" manifest:media-type="image/png"/>
  <manifest:file-entry manifest:full-path="Pictures/1000020100000238000002D6F2457AC8C9CB91B0.png" manifest:media-type="image/png"/>
  <manifest:file-entry manifest:full-path="Pictures/100002010000034C000001C130BEA01337E0F356.png" manifest:media-type="image/png"/>
  <manifest:file-entry manifest:full-path="Pictures/10000201000004B40000036784974C0A1722C2FF.png" manifest:media-type="image/png"/>
  <manifest:file-entry manifest:full-path="Pictures/10000201000002440000034E2EC5E89D19C2E7B0.png" manifest:media-type="image/png"/>
  <manifest:file-entry manifest:full-path="Pictures/100002010000025F0000028677B0215C186861AA.png" manifest:media-type="image/png"/>
  <manifest:file-entry manifest:full-path="Pictures/10000201000003C4000002D6673560290FD932AB.png" manifest:media-type="image/png"/>
  <manifest:file-entry manifest:full-path="Pictures/10000201000002360000039E39EF17ED20F2F858.png" manifest:media-type="image/png"/>
  <manifest:file-entry manifest:full-path="Pictures/10000201000001E6000002863A0ED87E49DA53E0.png" manifest:media-type="image/png"/>
  <manifest:file-entry manifest:full-path="Pictures/100002010000025F0000025E59FB719AED0770E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508cm" fo:padding-bottom="0.508cm" fo:padding-left="0.508cm" fo:padding-right="0.508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4.772cm" fo:padding-top="0.508cm" fo:padding-bottom="0.508cm" fo:padding-left="0.508cm" fo:padding-right="0.508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16.573cm" fo:padding-top="0.508cm" fo:padding-bottom="0.508cm" fo:padding-left="0.508cm" fo:padding-right="0.508cm" fo:wrap-option="wrap"/>
    </style:style>
    <style:style style:name="pr3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middle" draw:auto-grow-height="false" draw:fit-to-size="shrink-to-fit" style:shrink-to-fit="true" fo:min-height="16.322cm" fo:padding-top="0.508cm" fo:padding-bottom="0.508cm" fo:padding-left="0.508cm" fo:padding-right="0.508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4.772cm" fo:padding-top="0.508cm" fo:padding-bottom="0.508cm" fo:padding-left="0.508cm" fo:padding-right="0.508cm" fo:wrap-option="wrap"/>
    </style:style>
    <style:style style:name="pr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4.772cm" fo:padding-top="0.508cm" fo:padding-bottom="0.508cm" fo:padding-left="0.508cm" fo:padding-right="0.508cm" fo:wrap-option="wrap"/>
    </style:style>
    <style:style style:name="pr9" style:family="presentation" style:parent-style-name="SECTION_5f_HEADER-subtitle">
      <style:graphic-properties draw:stroke="none" svg:stroke-width="0cm" draw:fill="none" draw:fill-color="#ffffff" draw:textarea-vertical-align="middle" draw:auto-grow-height="false" draw:fit-to-size="shrink-to-fit" style:shrink-to-fit="true" fo:min-height="16.573cm" fo:padding-top="0.508cm" fo:padding-bottom="0.508cm" fo:padding-left="0.508cm" fo:padding-right="0.508cm" fo:wrap-option="wrap"/>
    </style:style>
    <style:style style:name="pr10" style:family="presentation" style:parent-style-name="SECTION_5f_HEADER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16.322cm" fo:padding-top="0.508cm" fo:padding-bottom="0.508cm" fo:padding-left="0.508cm" fo:padding-right="0.508cm" fo:wrap-option="wrap"/>
    </style:style>
    <style:style style:name="pr1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TWO_5f_COLUMNS-title">
      <style:graphic-properties draw:stroke="none" svg:stroke-width="0cm" draw:fill="none" draw:textarea-vertical-align="middle" draw:auto-grow-height="false" draw:fit-to-size="false" style:shrink-to-fit="false" fo:min-height="4.772cm" fo:padding-top="0.508cm" fo:padding-bottom="0.508cm" fo:padding-left="0.508cm" fo:padding-right="0.508cm" fo:wrap-option="wrap"/>
    </style:style>
    <style:style style:name="pr14" style:family="presentation" style:parent-style-name="TITLE_5f_AND_5f_TWO_5f_COLUMNS-outline1">
      <style:graphic-properties draw:stroke="none" svg:stroke-width="0cm" draw:fill="none" draw:textarea-vertical-align="top" draw:auto-grow-height="false" draw:fit-to-size="shrink-to-fit" style:shrink-to-fit="true" fo:min-height="16.322cm" fo:padding-top="0.508cm" fo:padding-bottom="0.508cm" fo:padding-left="0.508cm" fo:padding-right="0.508cm" fo:wrap-option="wrap"/>
    </style:style>
    <style:style style:name="pr15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16.322cm" fo:padding-top="0.508cm" fo:padding-bottom="0.508cm" fo:padding-left="0.508cm" fo:padding-right="0.508cm" fo:wrap-option="wrap"/>
    </style:style>
    <style:style style:name="pr16" style:family="presentation" style:parent-style-name="TITLE_5f_AND_5f_TWO_5f_COLUMN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16.322cm" fo:padding-top="0.508cm" fo:padding-bottom="0.508cm" fo:padding-left="0.508cm" fo:padding-right="0.508cm" fo:wrap-option="wrap"/>
    </style:style>
    <style:style style:name="pr1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SECTION_5f_HEADER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TWO_5f_COLUMN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SECTION_5f_HEADER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TWO_5f_COLUMN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SECTION_5f_HEADER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TITLE_5f_AND_5f_TWO_5f_COLUMN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3" style:family="presentation" style:parent-style-name="SECTION_5f_HEADER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5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0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5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.706cm" fo:margin-bottom="0cm" fo:line-height="10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706cm" fo:margin-bottom="0.706cm" fo:line-height="10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8" style:family="paragraph">
      <loext:graphic-properties draw:fill="none"/>
      <style:paragraph-properties fo:text-align="start" style:font-independent-line-spacing="true"/>
      <style:text-properties fo:font-size="56pt"/>
    </style:style>
    <style:style style:name="P9" style:family="paragraph">
      <style:paragraph-properties fo:margin-left="0cm" fo:margin-right="0cm" fo:margin-top="0cm" fo:margin-bottom="0.847cm" fo:line-height="10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72pt"/>
    </style:style>
    <style:style style:name="P12" style:family="paragraph">
      <style:paragraph-properties fo:margin-left="0cm" fo:margin-right="0cm" fo:margin-top="0cm" fo:margin-bottom="0.847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36pt"/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847cm" fo:margin-bottom="0.847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847cm" fo:margin-bottom="0.847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9" style:family="paragraph">
      <style:paragraph-properties fo:margin-left="0cm" fo:margin-right="0cm" fo:margin-top="0.706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847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2" style:family="paragraph">
      <style:paragraph-properties fo:margin-left="0cm" fo:margin-right="0cm" fo:margin-top="0.706cm" fo:margin-bottom="0.847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104pt" fo:letter-spacing="normal" fo:font-style="normal" style:text-underline-style="none" fo:font-weight="normal" style:font-name-asian="Arial" style:font-size-asian="104pt" style:font-style-asian="normal" style:font-weight-asian="normal" style:font-name-complex="Arial" style:font-size-complex="104pt" style:font-style-complex="normal" style:font-weight-complex="normal"/>
    </style:style>
    <style:style style:name="T2" style:family="text">
      <style:text-properties fo:font-variant="normal" fo:text-transform="none" fo:color="#eeeeee" style:text-line-through-style="none" style:text-line-through-type="none" style:text-position="0% 100%" style:font-name="Arial" fo:font-size="56pt" fo:letter-spacing="normal" fo:font-style="normal" style:text-underline-style="none" fo:font-weight="normal" style:font-name-asian="Arial" style:font-size-asian="56pt" style:font-style-asian="normal" style:font-weight-asian="normal" style:font-name-complex="Arial" style:font-size-complex="56pt" style:font-style-complex="normal" style:font-weight-complex="normal"/>
    </style:style>
    <style:style style:name="T3" style:family="text">
      <style:text-properties fo:font-variant="normal" fo:text-transform="none" fo:color="#eeeeee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4" style:family="text">
      <style:text-properties fo:font-variant="normal" fo:text-transform="none" fo:color="#eedd00" style:text-line-through-style="none" style:text-line-through-type="none" style:text-position="0% 100%" style:font-name="Arial" fo:font-size="48pt" fo:letter-spacing="normal" fo:font-style="italic" style:text-underline-style="none" fo:font-weight="normal" style:font-name-asian="Arial" style:font-size-asian="48pt" style:font-style-asian="italic" style:font-weight-asian="normal" style:font-name-complex="Arial" style:font-size-complex="48pt" style:font-style-complex="italic" style:font-weight-complex="normal"/>
    </style:style>
    <style:style style:name="T5" style:family="text">
      <style:text-properties fo:font-variant="normal" fo:text-transform="none" fo:color="#eeeeee" style:text-line-through-style="none" style:text-line-through-type="none" style:text-position="0% 100%" style:font-name="Arial" fo:font-size="48pt" fo:letter-spacing="normal" fo:font-style="italic" style:text-underline-style="none" fo:font-weight="normal" style:font-name-asian="Arial" style:font-size-asian="48pt" style:font-style-asian="italic" style:font-weight-asian="normal" style:font-name-complex="Arial" style:font-size-complex="48pt" style:font-style-complex="italic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72pt" fo:letter-spacing="normal" fo:font-style="normal" style:text-underline-style="none" fo:font-weight="normal" style:font-name-asian="Arial" style:font-size-asian="72pt" style:font-style-asian="normal" style:font-weight-asian="normal" style:font-name-complex="Arial" style:font-size-complex="72pt" style:font-style-complex="normal" style:font-weight-complex="normal"/>
    </style:style>
    <style:style style:name="T7" style:family="text">
      <style:text-properties fo:font-variant="normal" fo:text-transform="none" fo:color="#eeeeee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96pt" fo:letter-spacing="normal" fo:font-style="normal" style:text-underline-style="none" fo:font-weight="normal" style:font-name-asian="Arial" style:font-size-asian="96pt" style:font-style-asian="normal" style:font-weight-asian="normal" style:font-name-complex="Arial" style:font-size-complex="96pt" style:font-style-complex="normal" style:font-weight-complex="normal"/>
    </style:style>
    <style:style style:name="T9" style:family="text">
      <style:text-properties fo:font-variant="normal" fo:text-transform="none" fo:color="#eeeeee" style:text-line-through-style="none" style:text-line-through-type="none" style:text-position="0% 100%" style:font-name="Arial" fo:font-size="60pt" fo:letter-spacing="normal" fo:font-style="normal" style:text-underline-style="none" fo:font-weight="normal" style:font-name-asian="Arial" style:font-size-asian="60pt" style:font-style-asian="normal" style:font-weight-asian="normal" style:font-name-complex="Arial" style:font-size-complex="60pt" style:font-style-complex="normal" style:font-weight-complex="normal"/>
    </style:style>
    <style:style style:name="T10" style:family="text">
      <style:text-properties fo:font-variant="normal" fo:text-transform="none" fo:color="#eeeeee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11" style:family="text">
      <style:text-properties fo:font-variant="normal" fo:text-transform="none" fo:color="#eeeeee" style:text-line-through-style="none" style:text-line-through-type="none" style:text-position="0% 100%" style:font-name="Arial" fo:font-size="36pt" fo:letter-spacing="normal" fo:font-style="italic" style:text-underline-style="none" fo:font-weight="normal" style:font-name-asian="Arial" style:font-size-asian="36pt" style:font-style-asian="italic" style:font-weight-asian="normal" style:font-name-complex="Arial" style:font-size-complex="36pt" style:font-style-complex="italic" style:font-weight-complex="normal"/>
    </style:style>
    <style:style style:name="T12" style:family="text">
      <style:text-properties fo:font-variant="normal" fo:text-transform="none" fo:color="#11dd11" style:text-line-through-style="none" style:text-line-through-type="none" style:text-position="0% 100%" style:font-name="Arial" fo:font-size="44pt" fo:letter-spacing="normal" fo:font-style="italic" style:text-underline-style="none" fo:font-weight="normal" style:font-name-asian="Arial" style:font-size-asian="44pt" style:font-style-asian="italic" style:font-weight-asian="normal" style:font-name-complex="Arial" style:font-size-complex="44pt" style:font-style-complex="italic" style:font-weight-complex="normal"/>
    </style:style>
    <style:style style:name="T13" style:family="text">
      <style:text-properties fo:font-variant="normal" fo:text-transform="none" fo:color="#11dd11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14" style:family="text">
      <style:text-properties fo:font-variant="normal" fo:text-transform="none" fo:color="#ff4455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15" style:family="text">
      <style:text-properties fo:font-variant="normal" fo:text-transform="none" fo:color="#ff4455" style:text-line-through-style="none" style:text-line-through-type="none" style:text-position="0% 100%" style:font-name="Arial" fo:font-size="44pt" fo:letter-spacing="normal" fo:font-style="italic" style:text-underline-style="none" fo:font-weight="normal" style:font-name-asian="Arial" style:font-size-asian="44pt" style:font-style-asian="italic" style:font-weight-asian="normal" style:font-name-complex="Arial" style:font-size-complex="44pt" style:font-style-complex="italic" style:font-weight-complex="normal"/>
    </style:style>
    <style:style style:name="T16" style:family="text">
      <style:text-properties fo:font-variant="normal" fo:text-transform="none" fo:color="#eedd00" style:text-line-through-style="none" style:text-line-through-type="none" style:text-position="0% 100%" style:font-name="Arial" fo:font-size="36pt" fo:letter-spacing="normal" fo:font-style="italic" style:text-underline-style="none" fo:font-weight="normal" style:font-name-asian="Arial" style:font-size-asian="36pt" style:font-style-asian="italic" style:font-weight-asian="normal" style:font-name-complex="Arial" style:font-size-complex="36pt" style:font-style-complex="italic" style:font-weight-complex="normal"/>
    </style:style>
    <style:style style:name="T17" style:family="text">
      <style:text-properties fo:font-variant="normal" fo:text-transform="none" fo:color="#11dd11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18" style:family="text">
      <style:text-properties fo:font-variant="normal" fo:text-transform="none" fo:color="#ff4455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19" style:family="text">
      <style:text-properties fo:font-variant="normal" fo:text-transform="none" fo:color="#eeeeee" style:text-line-through-style="none" style:text-line-through-type="none" style:text-position="0% 100%" style:font-name="Arial" fo:font-size="40pt" fo:letter-spacing="normal" fo:font-style="normal" style:text-underline-style="none" fo:font-weight="normal" style:font-name-asian="Ari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20" style:family="text">
      <style:text-properties fo:font-variant="normal" fo:text-transform="none" fo:color="#4dd0e1" style:text-line-through-style="none" style:text-line-through-type="none" style:text-position="0% 100%" style:font-name="Arial" fo:font-size="36pt" fo:letter-spacing="normal" fo:font-style="normal" style:text-underline-style="solid" style:text-underline-width="auto" style:text-underline-color="font-color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21" style:family="text">
      <style:text-properties fo:font-variant="normal" fo:text-transform="none" fo:color="#eedd00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24cm" text:min-label-width="2.116cm"/>
        <style:text-properties style:font-name="Arial" fo:color="#eeeee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636cm" text:min-label-width="1.904cm"/>
        <style:text-properties style:font-name="Arial" fo:color="#eeeee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47.336cm" svg:height="11.402cm" svg:x="1.732cm" svg:y="4.137cm" presentation:class="title" presentation:user-transformed="true">
          <draw:text-box>
            <text:p text:style-name="P1"><text:span text:style-name="T1">Implementation Patterns</text:span></text:p>
          </draw:text-box>
        </draw:frame>
        <draw:frame draw:name="Google Shape;55;p13" presentation:style-name="pr2" draw:text-style-name="P3" draw:layer="layout" svg:width="47.336cm" svg:height="4.402cm" svg:x="1.732cm" svg:y="15.745cm" presentation:class="subtitle" presentation:user-transformed="true">
          <draw:text-box>
            <text:p text:style-name="P1"><text:span text:style-name="T2">The high-level design of system components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nts" draw:style-name="dp1" draw:master-page-name="TITLE_5f_AND_5f_BODY" presentation:presentation-page-layout-name="AL2T1">
        <draw:frame draw:name="Google Shape;60;p14" presentation:style-name="pr4" draw:text-style-name="P7" draw:layer="layout" svg:width="44.289cm" svg:height="19.979cm" svg:x="3.255cm" svg:y="6.239cm" presentation:class="outline" presentation:user-transformed="true">
          <draw:text-box>
            <text:p text:style-name="P5"><text:span text:style-name="T3">Several patterns are found inside system components:</text:span></text:p>
            <text:list text:style-name="L4">
              <text:list-item>
                <text:p text:style-name="P5"><text:span text:style-name="T4">Plugins</text:span><text:span text:style-name="T3"> customize the component’s behavior.</text:span></text:p>
              </text:list-item>
              <text:list-item>
                <text:p text:style-name="P5"><text:span text:style-name="T4">Hexagonal Architecture</text:span><text:span text:style-name="T3"> isolates the business logic from external dependencies.</text:span></text:p>
              </text:list-item>
              <text:list-item>
                <text:p text:style-name="P5"><text:span text:style-name="T4">Microkernel</text:span><text:span text:style-name="T5"> </text:span><text:span text:style-name="T3">mediates between resource providers and resource consumers.</text:span></text:p>
              </text:list-item>
              <text:list-item>
                <text:p text:style-name="P6"><text:span text:style-name="T4">Mesh</text:span><text:span text:style-name="T3"> maintains a decentralized system.</text:span></text:p>
              </text:list-item>
            </text:list>
          </draw:text-box>
        </draw:frame>
        <draw:frame draw:name="Google Shape;61;p14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Contents</text:span></text:p>
          </draw:text-box>
        </draw:frame>
        <presentation:notes draw:style-name="dp2">
          <draw:page-thumbnail draw:name="Google Shape;57;g36fa2bd9aed_0_190:notes" draw:style-name="gr1" draw:layer="layout" svg:width="16.932cm" svg:height="9.524cm" svg:x="1.059cm" svg:y="1.905cm" draw:page-number="2" presentation:class="page"/>
          <draw:frame draw:name="Google Shape;58;g36fa2bd9aed_0_19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system of coordinates" draw:style-name="dp1" draw:master-page-name="TITLE_5f_AND_5f_BODY" presentation:presentation-page-layout-name="AL2T1">
        <draw:frame draw:name="Google Shape;66;p15" presentation:style-name="pr4" draw:text-style-name="P7" draw:layer="layout" svg:width="16.826cm" svg:height="16.662cm" svg:x="3.485cm" svg:y="6.466cm" presentation:class="outline" presentation:user-transformed="true">
          <draw:text-box>
            <text:p text:style-name="P9"><text:span text:style-name="T7">All architectures are color-coded and drawn in the same system of coordinates</text:span></text:p>
          </draw:text-box>
        </draw:frame>
        <draw:frame draw:name="Google Shape;67;p15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The system of coordinates</text:span></text:p>
          </draw:text-box>
        </draw:frame>
        <draw:frame draw:name="Google Shape;68;p15" draw:style-name="gr2" draw:text-style-name="P10" draw:layer="layout" svg:width="25.57cm" svg:height="18.498cm" svg:x="23.497cm" svg:y="7.819cm">
          <draw:image xlink:href="Pictures/10000201000004B40000036784974C0A1722C2FF.png" xlink:type="simple" xlink:show="embed" xlink:actuate="onLoad">
            <text:p/>
          </draw:image>
        </draw:frame>
        <presentation:notes draw:style-name="dp2">
          <draw:page-thumbnail draw:name="Google Shape;63;g39ecdd5df51_0_0:notes" draw:style-name="gr1" draw:layer="layout" svg:width="16.932cm" svg:height="9.524cm" svg:x="1.059cm" svg:y="1.905cm" draw:page-number="3" presentation:class="page"/>
          <draw:frame draw:name="Google Shape;64;g39ecdd5df51_0_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ugins" draw:style-name="dp1" draw:master-page-name="SECTION_5f_HEADER">
        <draw:frame draw:name="Google Shape;73;p16" presentation:style-name="pr8" draw:text-style-name="P11" draw:layer="layout" svg:width="47.336cm" svg:height="4.676cm" svg:x="1.732cm" svg:y="9.611cm" presentation:class="title" presentation:user-transformed="true">
          <draw:text-box>
            <text:p text:style-name="P1"><text:span text:style-name="T8">Plugins</text:span></text:p>
          </draw:text-box>
        </draw:frame>
        <draw:frame draw:name="Google Shape;74;p16" presentation:style-name="pr9" draw:text-style-name="P13" draw:layer="layout" svg:width="47.336cm" svg:height="4.402cm" svg:x="1.732cm" svg:y="14.288cm" presentation:class="subtitle" presentation:user-transformed="true">
          <draw:text-box>
            <text:p text:style-name="P12"><text:span text:style-name="T9">Customized behavior</text:span></text:p>
          </draw:text-box>
        </draw:frame>
        <presentation:notes draw:style-name="dp2">
          <draw:page-thumbnail draw:name="Google Shape;70;g3ace7d219c8_0_8:notes" draw:style-name="gr1" draw:layer="layout" svg:width="16.932cm" svg:height="9.524cm" svg:x="1.059cm" svg:y="1.905cm" draw:page-number="4" presentation:class="page"/>
          <draw:frame draw:name="Google Shape;71;g3ace7d219c8_0_8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ugins – overview" draw:style-name="dp1" draw:master-page-name="TITLE_5f_AND_5f_BODY" presentation:presentation-page-layout-name="AL2T1">
        <draw:frame draw:name="Google Shape;79;p17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Plugins – overview</text:span></text:p>
          </draw:text-box>
        </draw:frame>
        <draw:frame draw:name="Google Shape;80;p17" presentation:style-name="pr11" draw:text-style-name="P7" draw:layer="layout" svg:width="33.327cm" svg:height="13.982cm" svg:x="15.739cm" svg:y="6.403cm" presentation:class="outline" presentation:user-transformed="true">
          <draw:text-box>
            <text:p text:style-name="P14"><text:span text:style-name="T10">If you need your component to be customizable, you have it support </text:span><text:span text:style-name="T11">plugins</text:span><text:span text:style-name="T10"> – replaceable subcomponents that define key aspects of your </text:span><text:span text:style-name="T11">core</text:span><text:span text:style-name="T10"> behavior.</text:span></text:p>
            <text:p text:style-name="P15"><text:span text:style-name="T11">Plugins</text:span><text:span text:style-name="T10"> is a loosely defined pattern with many variations.</text:span></text:p>
          </draw:text-box>
        </draw:frame>
        <draw:frame draw:name="Google Shape;81;p17" presentation:style-name="pr4" draw:text-style-name="P7" draw:layer="layout" svg:width="47.336cm" svg:height="6.002cm" svg:x="1.732cm" svg:y="21.144cm" presentation:class="outline" presentation:user-transformed="true">
          <draw:text-box>
            <text:p text:style-name="P16"><text:span text:style-name="T12">Plugins</text:span><text:span text:style-name="T13"> power product lines and frameworks.</text:span></text:p>
            <text:p text:style-name="P17"><text:span text:style-name="T14">Heavy use of </text:span><text:span text:style-name="T15">plugins</text:span><text:span text:style-name="T14"> may degrade performance.</text:span></text:p>
          </draw:text-box>
        </draw:frame>
        <draw:custom-shape draw:name="Google Shape;82;p17" draw:style-name="gr3" draw:text-style-name="P18" draw:layer="layout" svg:width="10.089cm" svg:height="2.541cm" svg:x="2.973cm" svg:y="18.579cm">
          <text:p text:style-name="P1"><text:span text:style-name="T16">Plugi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3;p17" draw:style-name="gr2" draw:text-style-name="P10" draw:layer="layout" svg:width="8.174cm" svg:height="10.865cm" svg:x="3.93cm" svg:y="7.202cm">
          <draw:image xlink:href="Pictures/10000201000001E6000002863A0ED87E49DA53E0.png" xlink:type="simple" xlink:show="embed" xlink:actuate="onLoad">
            <text:p/>
          </draw:image>
        </draw:frame>
        <presentation:notes draw:style-name="dp2">
          <draw:page-thumbnail draw:name="Google Shape;76;g3acdfc7e991_0_20:notes" draw:style-name="gr1" draw:layer="layout" svg:width="16.932cm" svg:height="9.524cm" svg:x="1.059cm" svg:y="1.905cm" draw:page-number="5" presentation:class="page"/>
          <draw:frame draw:name="Google Shape;77;g3acdfc7e991_0_20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ugins – trade-offs" draw:style-name="dp1" draw:master-page-name="TITLE_5f_AND_5f_TWO_5f_COLUMNS" presentation:presentation-page-layout-name="AL3T3">
        <draw:frame draw:name="Google Shape;88;p18" presentation:style-name="pr13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Plugins – trade-offs</text:span></text:p>
          </draw:text-box>
        </draw:frame>
        <draw:frame draw:name="Google Shape;89;p18" presentation:style-name="pr14" draw:text-style-name="P21" draw:layer="layout" svg:width="22.221cm" svg:height="18.122cm" svg:x="1.732cm" svg:y="6.403cm" presentation:class="outline" presentation:user-transformed="true">
          <draw:text-box>
            <text:p text:style-name="P19"><text:span text:style-name="T17">Select aspects of your system’s behavior become customizable</text:span></text:p>
            <text:p text:style-name="P20"><text:span text:style-name="T17">Sometimes the custom behavior can be defined in a high-level DSL</text:span></text:p>
            <text:p text:style-name="P15"><text:span text:style-name="T17">Plugins may employ platform-specific optimizations</text:span></text:p>
          </draw:text-box>
        </draw:frame>
        <draw:frame draw:name="Google Shape;90;p18" presentation:style-name="pr15" draw:text-style-name="P21" draw:layer="layout" svg:width="22.916cm" svg:height="18.122cm" svg:x="26.152cm" svg:y="6.403cm" presentation:class="outline" presentation:user-transformed="true">
          <draw:text-box>
            <text:p text:style-name="P19"><text:span text:style-name="T18">It’s hard to deduce good plugin APIs</text:span></text:p>
            <text:p text:style-name="P20"><text:span text:style-name="T18">Plugins impede whole-system performance optimization</text:span></text:p>
            <text:p text:style-name="P15"><text:span text:style-name="T18">Testability is poor as there are too many possible configurations</text:span></text:p>
          </draw:text-box>
        </draw:frame>
        <presentation:notes draw:style-name="dp2">
          <draw:page-thumbnail draw:name="Google Shape;85;g3acdfc7e991_0_28:notes" draw:style-name="gr1" draw:layer="layout" svg:width="16.932cm" svg:height="9.524cm" svg:x="1.059cm" svg:y="1.905cm" draw:page-number="6" presentation:class="page"/>
          <draw:frame draw:name="Google Shape;86;g3acdfc7e991_0_28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ugins – integration" draw:style-name="dp1" draw:master-page-name="TITLE_5f_AND_5f_BODY" presentation:presentation-page-layout-name="AL2T1">
        <draw:frame draw:name="Google Shape;95;p19" presentation:style-name="pr17" draw:text-style-name="P7" draw:layer="layout" svg:width="47.336cm" svg:height="20.346cm" svg:x="1.732cm" svg:y="6.403cm" presentation:class="outline" presentation:user-transformed="true">
          <draw:text-box>
            <text:p text:style-name="P19"><text:span text:style-name="T11">Plugins</text:span><text:span text:style-name="T10"> may involve components that use the system or are used by it:</text:span></text:p>
            <text:list text:style-name="L11">
              <text:list-item>
                <text:p text:style-name="P20"><text:span text:style-name="T10">True </text:span><text:span text:style-name="T11">Plugins</text:span><text:span text:style-name="T10"> are registered with the system’s </text:span><text:span text:style-name="T11">core</text:span><text:span text:style-name="T10"> and are called by the </text:span><text:span text:style-name="T11">core</text:span><text:span text:style-name="T10">. Each plugin has a single function in the system and is usually a third party product.</text:span></text:p>
              </text:list-item>
              <text:list-item>
                <text:p text:style-name="P19"><text:span text:style-name="T11">Add-ins</text:span><text:span text:style-name="T10"> come from the component’s authors and have access to its internals. They are like optional but deeply integrated modules that often feature business logic.</text:span></text:p>
              </text:list-item>
              <text:list-item>
                <text:p text:style-name="P19"><text:span text:style-name="T11">Extensions</text:span><text:span text:style-name="T10"> modify business logic by changing existing or adding new use cases but are still called and managed by the </text:span><text:span text:style-name="T11">core</text:span><text:span text:style-name="T10">.</text:span></text:p>
              </text:list-item>
              <text:list-item>
                <text:p text:style-name="P22"><text:span text:style-name="T11">Addons</text:span><text:span text:style-name="T10"> build a layer of indirection on top of the system’s public API.</text:span></text:p>
              </text:list-item>
            </text:list>
          </draw:text-box>
        </draw:frame>
        <draw:frame draw:name="Google Shape;96;p19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Plugins – integration</text:span></text:p>
          </draw:text-box>
        </draw:frame>
        <presentation:notes draw:style-name="dp2">
          <draw:page-thumbnail draw:name="Google Shape;92;g3b16c6db887_0_1:notes" draw:style-name="gr1" draw:layer="layout" svg:width="16.932cm" svg:height="9.524cm" svg:x="1.059cm" svg:y="1.905cm" draw:page-number="7" presentation:class="page"/>
          <draw:frame draw:name="Google Shape;93;g3b16c6db887_0_1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ugins – abstractness" draw:style-name="dp1" draw:master-page-name="TITLE_5f_AND_5f_BODY" presentation:presentation-page-layout-name="AL2T1">
        <draw:frame draw:name="Google Shape;101;p20" presentation:style-name="pr17" draw:text-style-name="P7" draw:layer="layout" svg:width="47.336cm" svg:height="20.081cm" svg:x="1.732cm" svg:y="6.403cm" presentation:class="outline" presentation:user-transformed="true">
          <draw:text-box>
            <text:p text:style-name="P19"><text:span text:style-name="T11">Plugins</text:span><text:span text:style-name="T10"> may be more or less abstract than the system’s </text:span><text:span text:style-name="T11">core</text:span><text:span text:style-name="T10">:</text:span></text:p>
            <text:list text:style-name="L11">
              <text:list-item>
                <text:p text:style-name="P20"><text:span text:style-name="T10">High-level </text:span><text:span text:style-name="T11">plugins</text:span><text:span text:style-name="T10"> or </text:span><text:span text:style-name="T11">addons</text:span><text:span text:style-name="T10"> customize user experience or collect metadata. They may run independently and use the system’s API.</text:span></text:p>
              </text:list-item>
              <text:list-item>
                <text:p text:style-name="P19"><text:span text:style-name="T10">Low-level </text:span><text:span text:style-name="T11">plugins</text:span><text:span text:style-name="T10"> encapsulate algorithms, business rules, or hardware acceleration. They are called by the </text:span><text:span text:style-name="T11">core</text:span><text:span text:style-name="T10"> as a part of its workflow.</text:span></text:p>
              </text:list-item>
              <text:list-item>
                <text:p text:style-name="P22"><text:span text:style-name="T10">A customization may involve a set of both high- and low-level </text:span><text:span text:style-name="T11">plugins</text:span><text:span text:style-name="T10">.</text:span></text:p>
              </text:list-item>
            </text:list>
          </draw:text-box>
        </draw:frame>
        <draw:frame draw:name="Google Shape;102;p20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Plugins – abstractness</text:span></text:p>
          </draw:text-box>
        </draw:frame>
        <presentation:notes draw:style-name="dp2">
          <draw:page-thumbnail draw:name="Google Shape;98;g3b16c6db887_0_71:notes" draw:style-name="gr1" draw:layer="layout" svg:width="16.932cm" svg:height="9.524cm" svg:x="1.059cm" svg:y="1.905cm" draw:page-number="8" presentation:class="page"/>
          <draw:frame draw:name="Google Shape;99;g3b16c6db887_0_71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ugins – role" draw:style-name="dp1" draw:master-page-name="TITLE_5f_AND_5f_BODY" presentation:presentation-page-layout-name="AL2T1">
        <draw:frame draw:name="Google Shape;107;p21" presentation:style-name="pr17" draw:text-style-name="P7" draw:layer="layout" svg:width="47.336cm" svg:height="20.081cm" svg:x="1.732cm" svg:y="6.403cm" presentation:class="outline" presentation:user-transformed="true">
          <draw:text-box>
            <text:p text:style-name="P19"><text:span text:style-name="T10">A </text:span><text:span text:style-name="T11">plugin</text:span><text:span text:style-name="T10"> may:</text:span></text:p>
            <text:list text:style-name="L11">
              <text:list-item>
                <text:p text:style-name="P20"><text:span text:style-name="T10">Provide input from a UI widget or CLI connection to the </text:span><text:span text:style-name="T11">core</text:span><text:span text:style-name="T10">.</text:span></text:p>
              </text:list-item>
              <text:list-item>
                <text:p text:style-name="P19"><text:span text:style-name="T10">Collect output, such as statistics or logs, from the </text:span><text:span text:style-name="T11">core</text:span><text:span text:style-name="T10">.</text:span></text:p>
              </text:list-item>
              <text:list-item>
                <text:p text:style-name="P19"><text:span text:style-name="T10">Participate in both input and output. Health check belongs here.</text:span></text:p>
              </text:list-item>
              <text:list-item>
                <text:p text:style-name="P19"><text:span text:style-name="T10">Behave as a </text:span><text:span text:style-name="T11">Controller</text:span><text:span text:style-name="T10"> by receiving input from the </text:span><text:span text:style-name="T11">core</text:span><text:span text:style-name="T10"> and deciding on the further </text:span><text:span text:style-name="T11">core</text:span><text:span text:style-name="T10">’s actions.</text:span></text:p>
              </text:list-item>
              <text:list-item>
                <text:p text:style-name="P22"><text:span text:style-name="T10">Be a data processor for the </text:span><text:span text:style-name="T11">core</text:span><text:span text:style-name="T10"> by implementing a step of its main algorithm. Examples include codecs and the use of SIMD / DSP / cryptoprocessors.</text:span></text:p>
              </text:list-item>
            </text:list>
          </draw:text-box>
        </draw:frame>
        <draw:frame draw:name="Google Shape;108;p21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Plugins – role</text:span></text:p>
          </draw:text-box>
        </draw:frame>
        <presentation:notes draw:style-name="dp2">
          <draw:page-thumbnail draw:name="Google Shape;104;g3b16c6db887_0_66:notes" draw:style-name="gr1" draw:layer="layout" svg:width="16.932cm" svg:height="9.524cm" svg:x="1.059cm" svg:y="1.905cm" draw:page-number="9" presentation:class="page"/>
          <draw:frame draw:name="Google Shape;105;g3b16c6db887_0_66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ugins – linkage" draw:style-name="dp1" draw:master-page-name="TITLE_5f_AND_5f_BODY" presentation:presentation-page-layout-name="AL2T1">
        <draw:frame draw:name="Google Shape;113;p22" presentation:style-name="pr17" draw:text-style-name="P7" draw:layer="layout" svg:width="47.336cm" svg:height="20.081cm" svg:x="1.732cm" svg:y="6.403cm" presentation:class="outline" presentation:user-transformed="true">
          <draw:text-box>
            <text:p text:style-name="P19"><text:span text:style-name="T11">Plugins</text:span><text:span text:style-name="T10"> may be selected at different stages:</text:span></text:p>
            <text:list text:style-name="L11">
              <text:list-item>
                <text:p text:style-name="P20"><text:span text:style-name="T11">Flavors</text:span><text:span text:style-name="T10"> are special builds of a software with functionality customized through different sets of </text:span><text:span text:style-name="T11">plugins</text:span><text:span text:style-name="T10">. A more functional </text:span><text:span text:style-name="T11">flavor</text:span><text:span text:style-name="T10"> is more expensive.</text:span></text:p>
              </text:list-item>
              <text:list-item>
                <text:p text:style-name="P19"><text:span text:style-name="T10">An application may choose </text:span><text:span text:style-name="T11">plugins</text:span><text:span text:style-name="T10"> at startup according to its configuration file.</text:span></text:p>
              </text:list-item>
              <text:list-item>
                <text:p text:style-name="P19"><text:span text:style-name="T10">Some software systems allow for changing </text:span><text:span text:style-name="T11">plugins</text:span><text:span text:style-name="T10"> at runtime.</text:span></text:p>
              </text:list-item>
            </text:list>
          </draw:text-box>
        </draw:frame>
        <draw:frame draw:name="Google Shape;114;p22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Plugins – linkage</text:span></text:p>
          </draw:text-box>
        </draw:frame>
        <presentation:notes draw:style-name="dp2">
          <draw:page-thumbnail draw:name="Google Shape;110;g3b16c6db887_0_61:notes" draw:style-name="gr1" draw:layer="layout" svg:width="16.932cm" svg:height="9.524cm" svg:x="1.059cm" svg:y="1.905cm" draw:page-number="10" presentation:class="page"/>
          <draw:frame draw:name="Google Shape;111;g3b16c6db887_0_61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ugins – granularity" draw:style-name="dp1" draw:master-page-name="TITLE_5f_AND_5f_BODY" presentation:presentation-page-layout-name="AL2T1">
        <draw:frame draw:name="Google Shape;119;p23" presentation:style-name="pr17" draw:text-style-name="P7" draw:layer="layout" svg:width="47.336cm" svg:height="20.081cm" svg:x="1.732cm" svg:y="6.403cm" presentation:class="outline" presentation:user-transformed="true">
          <draw:text-box>
            <text:p text:style-name="P19"><text:span text:style-name="T10">A </text:span><text:span text:style-name="T11">plugin</text:span><text:span text:style-name="T10"> can be large or tiny:</text:span></text:p>
            <text:list text:style-name="L11">
              <text:list-item>
                <text:p text:style-name="P20"><text:span text:style-name="T10">A small function or class built into the application corresponds to the </text:span><text:span text:style-name="T11">Strategy</text:span><text:span text:style-name="T10"> pattern.</text:span></text:p>
              </text:list-item>
              <text:list-item>
                <text:p text:style-name="P19"><text:span text:style-name="T10">An </text:span><text:span text:style-name="T11">aspect</text:span><text:span text:style-name="T10"> implements some kind of pervasive functionality, such as logging.</text:span></text:p>
              </text:list-item>
              <text:list-item>
                <text:p text:style-name="P19"><text:span text:style-name="T10">An external component (library, application or remote service) may be used by the </text:span><text:span text:style-name="T11">core</text:span><text:span text:style-name="T10"> as a </text:span><text:span text:style-name="T11">plugin</text:span><text:span text:style-name="T10">.</text:span></text:p>
              </text:list-item>
            </text:list>
          </draw:text-box>
        </draw:frame>
        <draw:frame draw:name="Google Shape;120;p23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Plugins – granularity</text:span></text:p>
          </draw:text-box>
        </draw:frame>
        <presentation:notes draw:style-name="dp2">
          <draw:page-thumbnail draw:name="Google Shape;116;g3b16c6db887_0_56:notes" draw:style-name="gr1" draw:layer="layout" svg:width="16.932cm" svg:height="9.524cm" svg:x="1.059cm" svg:y="1.905cm" draw:page-number="11" presentation:class="page"/>
          <draw:frame draw:name="Google Shape;117;g3b16c6db887_0_56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ugins – multiplicity" draw:style-name="dp1" draw:master-page-name="TITLE_5f_AND_5f_BODY" presentation:presentation-page-layout-name="AL2T1">
        <draw:frame draw:name="Google Shape;125;p24" presentation:style-name="pr17" draw:text-style-name="P7" draw:layer="layout" svg:width="47.336cm" svg:height="20.081cm" svg:x="1.732cm" svg:y="6.403cm" presentation:class="outline" presentation:user-transformed="true">
          <draw:text-box>
            <text:p text:style-name="P19"><text:span text:style-name="T10">A </text:span><text:span text:style-name="T11">plugin</text:span><text:span text:style-name="T10"> can be optional or mandatory:</text:span></text:p>
            <text:list text:style-name="L11">
              <text:list-item>
                <text:p text:style-name="P20"><text:span text:style-name="T10">A </text:span><text:span text:style-name="T11">mandatory</text:span><text:span text:style-name="T10"> </text:span><text:span text:style-name="T11">plugin</text:span><text:span text:style-name="T10">, such as an implementation of an algorithm or business rule, is required for the proper functioning of the core.</text:span></text:p>
              </text:list-item>
              <text:list-item>
                <text:p text:style-name="P19"><text:span text:style-name="T10">An </text:span><text:span text:style-name="T11">optional</text:span><text:span text:style-name="T10"> </text:span><text:span text:style-name="T11">plugin</text:span><text:span text:style-name="T10"> may be absent, in which case the core substitutes an empty or trivial implementation. This is common with logging or statistics.</text:span></text:p>
              </text:list-item>
              <text:list-item>
                <text:p text:style-name="P19"><text:span text:style-name="T10">It can also be </text:span><text:span text:style-name="T11">subscriptional</text:span><text:span text:style-name="T10">, in which case multiple instances of an </text:span><text:span text:style-name="T11">optional</text:span><text:span text:style-name="T10"> </text:span><text:span text:style-name="T11">plugin</text:span><text:span text:style-name="T10"> are allowed. This helps if you want your logs to be both saved to the local file system and sent over the network.</text:span></text:p>
              </text:list-item>
            </text:list>
          </draw:text-box>
        </draw:frame>
        <draw:frame draw:name="Google Shape;126;p24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Plugins – multiplicity</text:span></text:p>
          </draw:text-box>
        </draw:frame>
        <presentation:notes draw:style-name="dp2">
          <draw:page-thumbnail draw:name="Google Shape;122;g3b16c6db887_0_51:notes" draw:style-name="gr1" draw:layer="layout" svg:width="16.932cm" svg:height="9.524cm" svg:x="1.059cm" svg:y="1.905cm" draw:page-number="12" presentation:class="page"/>
          <draw:frame draw:name="Google Shape;123;g3b16c6db887_0_51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ugins – execution" draw:style-name="dp1" draw:master-page-name="TITLE_5f_AND_5f_BODY" presentation:presentation-page-layout-name="AL2T1">
        <draw:frame draw:name="Google Shape;131;p25" presentation:style-name="pr17" draw:text-style-name="P7" draw:layer="layout" svg:width="47.336cm" svg:height="20.081cm" svg:x="1.732cm" svg:y="6.403cm" presentation:class="outline" presentation:user-transformed="true">
          <draw:text-box>
            <text:p text:style-name="P19"><text:span text:style-name="T10">A </text:span><text:span text:style-name="T11">plugin</text:span><text:span text:style-name="T10"> can be executed in a variety of ways:</text:span></text:p>
            <text:list text:style-name="L11">
              <text:list-item>
                <text:p text:style-name="P20"><text:span text:style-name="T10">It can be a selectable part of the </text:span><text:span text:style-name="T11">core</text:span><text:span text:style-name="T10">, or a statically or dynamically linked library.</text:span></text:p>
              </text:list-item>
              <text:list-item>
                <text:p text:style-name="P19"><text:span text:style-name="T10">It can be written in a </text:span><text:span text:style-name="T11">domain-specific language</text:span><text:span text:style-name="T10"> (</text:span><text:span text:style-name="T11">DSL</text:span><text:span text:style-name="T10">) which is interpreted or compiled by the </text:span><text:span text:style-name="T11">core</text:span><text:span text:style-name="T10">.</text:span></text:p>
              </text:list-item>
              <text:list-item>
                <text:p text:style-name="P19"><text:span text:style-name="T10">It can reside on a remote server or in a hardware device accessible via RPC or messaging.</text:span></text:p>
              </text:list-item>
            </text:list>
          </draw:text-box>
        </draw:frame>
        <draw:frame draw:name="Google Shape;132;p25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Plugins – execution</text:span></text:p>
          </draw:text-box>
        </draw:frame>
        <presentation:notes draw:style-name="dp2">
          <draw:page-thumbnail draw:name="Google Shape;128;g3b16c6db887_0_76:notes" draw:style-name="gr1" draw:layer="layout" svg:width="16.932cm" svg:height="9.524cm" svg:x="1.059cm" svg:y="1.905cm" draw:page-number="13" presentation:class="page"/>
          <draw:frame draw:name="Google Shape;129;g3b16c6db887_0_76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exagonal Architecture" draw:style-name="dp1" draw:master-page-name="SECTION_5f_HEADER">
        <draw:frame draw:name="Google Shape;137;p26" presentation:style-name="pr8" draw:text-style-name="P11" draw:layer="layout" svg:width="47.336cm" svg:height="4.676cm" svg:x="1.732cm" svg:y="9.611cm" presentation:class="title" presentation:user-transformed="true">
          <draw:text-box>
            <text:p text:style-name="P1"><text:span text:style-name="T8">Hexagonal Architecture</text:span></text:p>
          </draw:text-box>
        </draw:frame>
        <draw:frame draw:name="Google Shape;138;p26" presentation:style-name="pr9" draw:text-style-name="P13" draw:layer="layout" svg:width="47.336cm" svg:height="4.402cm" svg:x="1.732cm" svg:y="14.288cm" presentation:class="subtitle" presentation:user-transformed="true">
          <draw:text-box>
            <text:p text:style-name="P12"><text:span text:style-name="T9">Isolation from dependencies</text:span></text:p>
          </draw:text-box>
        </draw:frame>
        <presentation:notes draw:style-name="dp2">
          <draw:page-thumbnail draw:name="Google Shape;134;g3ad3d35e571_0_0:notes" draw:style-name="gr1" draw:layer="layout" svg:width="16.932cm" svg:height="9.524cm" svg:x="1.059cm" svg:y="1.905cm" draw:page-number="14" presentation:class="page"/>
          <draw:frame draw:name="Google Shape;135;g3ad3d35e571_0_0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exagonal Architecture – overview" draw:style-name="dp1" draw:master-page-name="TITLE_5f_AND_5f_BODY" presentation:presentation-page-layout-name="AL2T1">
        <draw:frame draw:name="Google Shape;143;p27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Hexagonal Architecture – overview</text:span></text:p>
          </draw:text-box>
        </draw:frame>
        <draw:frame draw:name="Google Shape;144;p27" presentation:style-name="pr11" draw:text-style-name="P7" draw:layer="layout" svg:width="31.129cm" svg:height="13.807cm" svg:x="16.096cm" svg:y="6.403cm" presentation:class="outline" presentation:user-transformed="true">
          <draw:text-box>
            <text:p text:style-name="P14"><text:span text:style-name="T11">Hexagonal Architecture</text:span><text:span text:style-name="T10"> is a variation of </text:span><text:span text:style-name="T11">Plugins</text:span><text:span text:style-name="T10"> designed to isolate business logic from dependencies on external components.</text:span></text:p>
            <text:p text:style-name="P15"><text:span text:style-name="T10">Anything not belonging to the </text:span><text:span text:style-name="T11">core</text:span><text:span text:style-name="T10"> logic is hidden behind an </text:span><text:span text:style-name="T11">adapter</text:span><text:span text:style-name="T10"> which translates between the SPI of the core and the API of the plugged-in component.</text:span></text:p>
          </draw:text-box>
        </draw:frame>
        <draw:frame draw:name="Google Shape;145;p27" presentation:style-name="pr4" draw:text-style-name="P7" draw:layer="layout" svg:width="47.336cm" svg:height="6.002cm" svg:x="1.732cm" svg:y="21.144cm" presentation:class="outline" presentation:user-transformed="true">
          <draw:text-box>
            <text:p text:style-name="P16"><text:span text:style-name="T12">Hexagonal Architecture</text:span><text:span text:style-name="T13"> is mandatory for long-lived products.</text:span></text:p>
            <text:p text:style-name="P17"><text:span text:style-name="T14">It does not benefit small components or proofs of concept.</text:span></text:p>
          </draw:text-box>
        </draw:frame>
        <draw:custom-shape draw:name="Google Shape;146;p27" draw:style-name="gr3" draw:text-style-name="P18" draw:layer="layout" svg:width="14.629cm" svg:height="2.541cm" svg:x="1.506cm" svg:y="18.745cm">
          <text:p text:style-name="P1"><text:span text:style-name="T16">Hexagonal Archite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7;p27" draw:style-name="gr2" draw:text-style-name="P10" draw:layer="layout" svg:width="8.896cm" svg:height="11.493cm" svg:x="4.372cm" svg:y="7.251cm">
          <draw:image xlink:href="Pictures/1000020100000232000002D6DF77A539256BD9AC.png" xlink:type="simple" xlink:show="embed" xlink:actuate="onLoad">
            <text:p/>
          </draw:image>
        </draw:frame>
        <presentation:notes draw:style-name="dp2">
          <draw:page-thumbnail draw:name="Google Shape;140;g3ad3d35e571_0_5:notes" draw:style-name="gr1" draw:layer="layout" svg:width="16.932cm" svg:height="9.524cm" svg:x="1.059cm" svg:y="1.905cm" draw:page-number="15" presentation:class="page"/>
          <draw:frame draw:name="Google Shape;141;g3ad3d35e571_0_5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exagonal Architecture – trade-offs" draw:style-name="dp1" draw:master-page-name="TITLE_5f_AND_5f_TWO_5f_COLUMNS" presentation:presentation-page-layout-name="AL3T3">
        <draw:frame draw:name="Google Shape;152;p28" presentation:style-name="pr13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Hexagonal Architecture – trade-offs</text:span></text:p>
          </draw:text-box>
        </draw:frame>
        <draw:frame draw:name="Google Shape;153;p28" presentation:style-name="pr14" draw:text-style-name="P21" draw:layer="layout" svg:width="22.221cm" svg:height="18.122cm" svg:x="1.732cm" svg:y="6.403cm" presentation:class="outline" presentation:user-transformed="true">
          <draw:text-box>
            <text:p text:style-name="P19"><text:span text:style-name="T17">Protects the business logic from external influences</text:span></text:p>
            <text:p text:style-name="P20"><text:span text:style-name="T17">Protects business logic programmers from the need to learn technologies</text:span></text:p>
            <text:p text:style-name="P15"><text:span text:style-name="T17">Facilitates the use of stubs / mocks</text:span></text:p>
          </draw:text-box>
        </draw:frame>
        <draw:frame draw:name="Google Shape;154;p28" presentation:style-name="pr15" draw:text-style-name="P21" draw:layer="layout" svg:width="22.682cm" svg:height="18.122cm" svg:x="26.385cm" svg:y="6.403cm" presentation:class="outline" presentation:user-transformed="true">
          <draw:text-box>
            <text:p text:style-name="P19"><text:span text:style-name="T18">The performance is suboptimal</text:span></text:p>
            <text:p text:style-name="P15"><text:span text:style-name="T18">Extra APIs need to be designed and maintained</text:span></text:p>
          </draw:text-box>
        </draw:frame>
        <presentation:notes draw:style-name="dp2">
          <draw:page-thumbnail draw:name="Google Shape;149;g3ad3d35e571_0_13:notes" draw:style-name="gr1" draw:layer="layout" svg:width="16.932cm" svg:height="9.524cm" svg:x="1.059cm" svg:y="1.905cm" draw:page-number="16" presentation:class="page"/>
          <draw:frame draw:name="Google Shape;150;g3ad3d35e571_0_13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exagonal Architecture – variants" draw:style-name="dp1" draw:master-page-name="TITLE_5f_AND_5f_BODY" presentation:presentation-page-layout-name="AL2T1">
        <draw:frame draw:name="Google Shape;159;p29" presentation:style-name="pr17" draw:text-style-name="P7" draw:layer="layout" svg:width="20.962cm" svg:height="18.312cm" svg:x="14.918cm" svg:y="6.711cm" presentation:class="outline" presentation:user-transformed="true">
          <draw:text-box>
            <text:p text:style-name="P19"><text:span text:style-name="T10">The true </text:span><text:span text:style-name="T11">Hexagonal Architecture</text:span><text:span text:style-name="T10"> isolates the application’s business logic from all its dependencies.</text:span></text:p>
            <text:p text:style-name="P15"><text:span text:style-name="T10">Its older sibling, </text:span><text:span text:style-name="T11">Separated Presentation</text:span><text:span text:style-name="T10">, decouples the core application from its user interface.</text:span></text:p>
          </draw:text-box>
        </draw:frame>
        <draw:custom-shape draw:name="Google Shape;160;p29" draw:style-name="gr3" draw:text-style-name="P18" draw:layer="layout" svg:width="8.989cm" svg:height="4.065cm" svg:x="37.928cm" svg:y="19.564cm">
          <text:p text:style-name="P1"><text:span text:style-name="T16">Separated Pres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29" draw:style-name="gr3" draw:text-style-name="P18" draw:layer="layout" svg:width="9.614cm" svg:height="4.065cm" svg:x="3.047cm" svg:y="20.145cm">
          <text:p text:style-name="P1"><text:span text:style-name="T16">Hexagonal Archite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2;p29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Hexagonal Architecture – variants</text:span></text:p>
          </draw:text-box>
        </draw:frame>
        <draw:frame draw:name="Google Shape;163;p29" draw:style-name="gr2" draw:text-style-name="P10" draw:layer="layout" svg:width="9.7cm" svg:height="12.398cm" svg:x="3.004cm" svg:y="7.164cm">
          <draw:image xlink:href="Pictures/1000020100000238000002D6F2457AC8C9CB91B0.png" xlink:type="simple" xlink:show="embed" xlink:actuate="onLoad">
            <text:p/>
          </draw:image>
        </draw:frame>
        <draw:frame draw:name="Google Shape;164;p29" draw:style-name="gr2" draw:text-style-name="P10" draw:layer="layout" svg:width="9.7cm" svg:height="9.715cm" svg:x="37.572cm" svg:y="7.164cm">
          <draw:image xlink:href="Pictures/100002010000028600000287037642A698E8CD1F.png" xlink:type="simple" xlink:show="embed" xlink:actuate="onLoad">
            <text:p/>
          </draw:image>
        </draw:frame>
        <presentation:notes draw:style-name="dp2">
          <draw:page-thumbnail draw:name="Google Shape;156;g3b16c6db887_0_81:notes" draw:style-name="gr1" draw:layer="layout" svg:width="16.932cm" svg:height="9.524cm" svg:x="1.059cm" svg:y="1.905cm" draw:page-number="17" presentation:class="page"/>
          <draw:frame draw:name="Google Shape;157;g3b16c6db887_0_81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exagonal Architecture – examples" draw:style-name="dp1" draw:master-page-name="TITLE_5f_AND_5f_BODY" presentation:presentation-page-layout-name="AL2T1">
        <draw:frame draw:name="Google Shape;169;p30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Hexagonal Architecture – examples</text:span></text:p>
          </draw:text-box>
        </draw:frame>
        <draw:frame draw:name="Google Shape;170;p30" presentation:style-name="pr11" draw:text-style-name="P7" draw:layer="layout" svg:width="31.294cm" svg:height="20.546cm" svg:x="17.158cm" svg:y="6.403cm" presentation:class="outline" presentation:user-transformed="true">
          <draw:text-box>
            <text:p text:style-name="P14"><text:span text:style-name="T11">Ports and Adapters</text:span><text:span text:style-name="T10"> is the original </text:span><text:span text:style-name="T11">Hexagonal Architecture</text:span><text:span text:style-name="T10">. It inserts </text:span><text:span text:style-name="T11">adapters</text:span><text:span text:style-name="T10"> between the business logic </text:span><text:span text:style-name="T11">core</text:span><text:span text:style-name="T10"> and any </text:span><text:span text:style-name="T11">external components</text:span><text:span text:style-name="T10">, such as third party services, libraries or databases.</text:span></text:p>
            <text:p text:style-name="P20"><text:span text:style-name="T10">If the interface of an external component changes, or even the whole component needs to be replaced by an incompatible one from another vendor, its </text:span><text:span text:style-name="T11">adapter</text:span><text:span text:style-name="T10"> absorbs the change, leaving the business logic intact.</text:span></text:p>
            <text:p text:style-name="P20"><text:span text:style-name="T10">As the result, the business logic lives on its own terms, while anything outside of it is dispensable.</text:span></text:p>
            <text:p text:style-name="P15"><text:span text:style-name="T10"/></text:p>
          </draw:text-box>
        </draw:frame>
        <draw:custom-shape draw:name="Google Shape;171;p30" draw:style-name="gr3" draw:text-style-name="P18" draw:layer="layout" svg:width="12.571cm" svg:height="5.589cm" svg:x="2.371cm" svg:y="20.444cm">
          <text:p text:style-name="P1"><text:span text:style-name="T16">Ports and Adapters, Hexagonal Archite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2;p30" draw:style-name="gr2" draw:text-style-name="P10" draw:layer="layout" svg:width="10.141cm" svg:height="12.963cm" svg:x="3.585cm" svg:y="7.248cm">
          <draw:image xlink:href="Pictures/1000020100000238000002D6F2457AC8C9CB91B0.png" xlink:type="simple" xlink:show="embed" xlink:actuate="onLoad">
            <text:p/>
          </draw:image>
        </draw:frame>
        <presentation:notes draw:style-name="dp2">
          <draw:page-thumbnail draw:name="Google Shape;166;g3ad3d35e571_0_100:notes" draw:style-name="gr1" draw:layer="layout" svg:width="16.932cm" svg:height="9.524cm" svg:x="1.059cm" svg:y="1.905cm" draw:page-number="18" presentation:class="page"/>
          <draw:frame draw:name="Google Shape;167;g3ad3d35e571_0_100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exagonal Architecture – examples" draw:style-name="dp1" draw:master-page-name="TITLE_5f_AND_5f_BODY" presentation:presentation-page-layout-name="AL2T1">
        <draw:frame draw:name="Google Shape;177;p31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Hexagonal Architecture – examples</text:span></text:p>
          </draw:text-box>
        </draw:frame>
        <draw:frame draw:name="Google Shape;178;p31" presentation:style-name="pr11" draw:text-style-name="P7" draw:layer="layout" svg:width="31.362cm" svg:height="17.027cm" svg:x="17.092cm" svg:y="6.403cm" presentation:class="outline" presentation:user-transformed="true">
          <draw:text-box>
            <text:p text:style-name="P14"><text:span text:style-name="T11">Onion Architecture</text:span><text:span text:style-name="T10"> delves into the structure of the </text:span><text:span text:style-name="T11">Hexagonal Architecture</text:span><text:span text:style-name="T10">’s </text:span><text:span text:style-name="T11">core</text:span><text:span text:style-name="T10">, dividing it into </text:span><text:span text:style-name="T11">Layers</text:span><text:span text:style-name="T10"> by the canons of </text:span><text:span text:style-name="T11">Domain-Driven Design</text:span><text:span text:style-name="T10">.</text:span></text:p>
            <text:p text:style-name="P15"><text:span text:style-name="T11">Clean Architecture</text:span><text:span text:style-name="T10"> is a later generalization or redesign of </text:span><text:span text:style-name="T11">Onion Architecture</text:span><text:span text:style-name="T10">.</text:span></text:p>
          </draw:text-box>
        </draw:frame>
        <draw:custom-shape draw:name="Google Shape;179;p31" draw:style-name="gr3" draw:text-style-name="P18" draw:layer="layout" svg:width="13.596cm" svg:height="4.065cm" svg:x="1.969cm" svg:y="20.378cm">
          <text:p text:style-name="P1"><text:span text:style-name="T16">Onion Architecture,</text:span></text:p>
          <text:p text:style-name="P1"><text:span text:style-name="T16">Clean Archite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0;p31" draw:style-name="gr2" draw:text-style-name="P10" draw:layer="layout" svg:width="8.949cm" svg:height="13.054cm" svg:x="4.292cm" svg:y="7.119cm">
          <draw:image xlink:href="Pictures/10000201000002440000034E2EC5E89D19C2E7B0.png" xlink:type="simple" xlink:show="embed" xlink:actuate="onLoad">
            <text:p/>
          </draw:image>
        </draw:frame>
        <presentation:notes draw:style-name="dp2">
          <draw:page-thumbnail draw:name="Google Shape;174;g3b16c6db887_0_135:notes" draw:style-name="gr1" draw:layer="layout" svg:width="16.932cm" svg:height="9.524cm" svg:x="1.059cm" svg:y="1.905cm" draw:page-number="19" presentation:class="page"/>
          <draw:frame draw:name="Google Shape;175;g3b16c6db887_0_135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parated Presentation – examples" draw:style-name="dp1" draw:master-page-name="TITLE_5f_AND_5f_BODY" presentation:presentation-page-layout-name="AL2T1">
        <draw:frame draw:name="Google Shape;185;p32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Separated Presentation – examples</text:span></text:p>
          </draw:text-box>
        </draw:frame>
        <draw:frame draw:name="Google Shape;186;p32" presentation:style-name="pr11" draw:text-style-name="P7" draw:layer="layout" svg:width="31.977cm" svg:height="17.027cm" svg:x="17.092cm" svg:y="6.403cm" presentation:class="outline" presentation:user-transformed="true">
          <draw:text-box>
            <text:p text:style-name="P14"><text:span text:style-name="T11">Model-View-Presenter</text:span><text:span text:style-name="T10"> (</text:span><text:span text:style-name="T11">MVP</text:span><text:span text:style-name="T10">) and the related </text:span><text:span text:style-name="T11">MVA</text:span><text:span text:style-name="T10">, </text:span><text:span text:style-name="T11">MVVM</text:span><text:span text:style-name="T10">, </text:span><text:span text:style-name="T11">Model 1</text:span><text:span text:style-name="T10">, and </text:span><text:span text:style-name="T11">Document-View</text:span><text:span text:style-name="T10"> insert one or two layers of indirection between the main application, called </text:span><text:span text:style-name="T11">model</text:span><text:span text:style-name="T10">, and its user interface, usually built with an OS GUI or a web framework.</text:span></text:p>
            <text:p text:style-name="P15"><text:span text:style-name="T10">The indirection allows for replacing or editing the UI without affecting the core, supporting cross-platform development and look and feel upgrades.</text:span></text:p>
          </draw:text-box>
        </draw:frame>
        <draw:custom-shape draw:name="Google Shape;187;p32" draw:style-name="gr3" draw:text-style-name="P18" draw:layer="layout" svg:width="14.091cm" svg:height="2.541cm" svg:x="1.801cm" svg:y="20.866cm">
          <text:p text:style-name="P1"><text:span text:style-name="T16">Model-View-Presen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8;p32" draw:style-name="gr2" draw:text-style-name="P10" draw:layer="layout" svg:width="11.226cm" svg:height="13.295cm" svg:x="3.233cm" svg:y="7.347cm">
          <draw:image xlink:href="Pictures/1000020100000286000002FDAEC64F6F04BC2903.png" xlink:type="simple" xlink:show="embed" xlink:actuate="onLoad">
            <text:p/>
          </draw:image>
        </draw:frame>
        <presentation:notes draw:style-name="dp2">
          <draw:page-thumbnail draw:name="Google Shape;182;g3b0ad707ea8_0_122:notes" draw:style-name="gr1" draw:layer="layout" svg:width="16.932cm" svg:height="9.524cm" svg:x="1.059cm" svg:y="1.905cm" draw:page-number="20" presentation:class="page"/>
          <draw:frame draw:name="Google Shape;183;g3b0ad707ea8_0_122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parated Presentation – examples" draw:style-name="dp1" draw:master-page-name="TITLE_5f_AND_5f_BODY" presentation:presentation-page-layout-name="AL2T1">
        <draw:frame draw:name="Google Shape;193;p33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Separated Presentation – examples</text:span></text:p>
          </draw:text-box>
        </draw:frame>
        <draw:frame draw:name="Google Shape;194;p33" presentation:style-name="pr11" draw:text-style-name="P7" draw:layer="layout" svg:width="31.977cm" svg:height="17.027cm" svg:x="17.092cm" svg:y="6.403cm" presentation:class="outline" presentation:user-transformed="true">
          <draw:text-box>
            <text:p text:style-name="P14"><text:span text:style-name="T11">Model-View-Controller</text:span><text:span text:style-name="T10"> (</text:span><text:span text:style-name="T11">MVC</text:span><text:span text:style-name="T10">) and the related </text:span><text:span text:style-name="T11">ADR</text:span><text:span text:style-name="T10">, </text:span><text:span text:style-name="T11">RMR</text:span><text:span text:style-name="T10">, and </text:span><text:span text:style-name="T11">Model 2</text:span><text:span text:style-name="T10"> separate the model’s input from its output. These patterns process raw mouse clicks (or HTTP requests) and draw home-made windows (or send XML responses).</text:span></text:p>
            <text:p text:style-name="P15"><text:span text:style-name="T10">This makes sense when well-established GUI or web frameworks are unavailable or don’t match the system’s requirements.</text:span></text:p>
          </draw:text-box>
        </draw:frame>
        <draw:custom-shape draw:name="Google Shape;195;p33" draw:style-name="gr3" draw:text-style-name="P18" draw:layer="layout" svg:width="14.091cm" svg:height="2.541cm" svg:x="1.839cm" svg:y="18.884cm">
          <text:p text:style-name="P1"><text:span text:style-name="T16">Model-View-Controll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6;p33" draw:style-name="gr2" draw:text-style-name="P10" draw:layer="layout" svg:width="11.302cm" svg:height="11.32cm" svg:x="3.233cm" svg:y="7.33cm">
          <draw:image xlink:href="Pictures/100002010000028600000287037642A698E8CD1F.png" xlink:type="simple" xlink:show="embed" xlink:actuate="onLoad">
            <text:p/>
          </draw:image>
        </draw:frame>
        <presentation:notes draw:style-name="dp2">
          <draw:page-thumbnail draw:name="Google Shape;190;g3b16c6db887_0_141:notes" draw:style-name="gr1" draw:layer="layout" svg:width="16.932cm" svg:height="9.524cm" svg:x="1.059cm" svg:y="1.905cm" draw:page-number="21" presentation:class="page"/>
          <draw:frame draw:name="Google Shape;191;g3b16c6db887_0_141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crokernel" draw:style-name="dp1" draw:master-page-name="SECTION_5f_HEADER">
        <draw:frame draw:name="Google Shape;201;p34" presentation:style-name="pr8" draw:text-style-name="P11" draw:layer="layout" svg:width="47.336cm" svg:height="4.676cm" svg:x="1.732cm" svg:y="9.611cm" presentation:class="title" presentation:user-transformed="true">
          <draw:text-box>
            <text:p text:style-name="P1"><text:span text:style-name="T8">Microkernel</text:span></text:p>
          </draw:text-box>
        </draw:frame>
        <draw:frame draw:name="Google Shape;202;p34" presentation:style-name="pr9" draw:text-style-name="P13" draw:layer="layout" svg:width="47.336cm" svg:height="4.402cm" svg:x="1.732cm" svg:y="14.288cm" presentation:class="subtitle" presentation:user-transformed="true">
          <draw:text-box>
            <text:p text:style-name="P12"><text:span text:style-name="T9">Management of shared resources</text:span></text:p>
          </draw:text-box>
        </draw:frame>
        <presentation:notes draw:style-name="dp2">
          <draw:page-thumbnail draw:name="Google Shape;198;g3ad72b8a13e_0_0:notes" draw:style-name="gr1" draw:layer="layout" svg:width="16.932cm" svg:height="9.524cm" svg:x="1.059cm" svg:y="1.905cm" draw:page-number="22" presentation:class="page"/>
          <draw:frame draw:name="Google Shape;199;g3ad72b8a13e_0_0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crokernel – overview" draw:style-name="dp1" draw:master-page-name="TITLE_5f_AND_5f_BODY" presentation:presentation-page-layout-name="AL2T1">
        <draw:frame draw:name="Google Shape;207;p35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Microkernel – overview</text:span></text:p>
          </draw:text-box>
        </draw:frame>
        <draw:frame draw:name="Google Shape;208;p35" presentation:style-name="pr11" draw:text-style-name="P7" draw:layer="layout" svg:width="30.431cm" svg:height="13.807cm" svg:x="17.789cm" svg:y="6.403cm" presentation:class="outline" presentation:user-transformed="true">
          <draw:text-box>
            <text:p text:style-name="P14"><text:span text:style-name="T11">Microkernel</text:span><text:span text:style-name="T10"> is another variation of </text:span><text:span text:style-name="T11">Plugins</text:span><text:span text:style-name="T10"> with a rudimentary </text:span><text:span text:style-name="T11">core</text:span><text:span text:style-name="T10">, called </text:span><text:span text:style-name="T11">microkernel</text:span><text:span text:style-name="T10">, which mediates between </text:span><text:span text:style-name="T11">resource providers</text:span><text:span text:style-name="T10"> and </text:span><text:span text:style-name="T11">resource consumers </text:span><text:span text:style-name="T10">(applications).</text:span></text:p>
            <text:p text:style-name="P20"><text:span text:style-name="T10">The </text:span><text:span text:style-name="T11">microkernel</text:span><text:span text:style-name="T10"> is a </text:span><text:span text:style-name="T11">Middleware</text:span><text:span text:style-name="T10"> for the </text:span><text:span text:style-name="T11">applications</text:span><text:span text:style-name="T10"> and an </text:span><text:span text:style-name="T11">Orchestrator</text:span><text:span text:style-name="T10"> for the </text:span><text:span text:style-name="T11">resource providers</text:span><text:span text:style-name="T10">.</text:span></text:p>
            <text:p text:style-name="P15"><text:span text:style-name="T10"/></text:p>
          </draw:text-box>
        </draw:frame>
        <draw:frame draw:name="Google Shape;209;p35" presentation:style-name="pr4" draw:text-style-name="P7" draw:layer="layout" svg:width="47.336cm" svg:height="6.002cm" svg:x="1.732cm" svg:y="21.144cm" presentation:class="outline" presentation:user-transformed="true">
          <draw:text-box>
            <text:p text:style-name="P16"><text:span text:style-name="T12">Microkernel</text:span><text:span text:style-name="T13"> is found in frameworks with complex behavior.</text:span></text:p>
            <text:p text:style-name="P17"><text:span text:style-name="T14">It is ill-suited if the </text:span><text:span text:style-name="T15">providers</text:span><text:span text:style-name="T14"> are coupled to each other.</text:span></text:p>
          </draw:text-box>
        </draw:frame>
        <draw:custom-shape draw:name="Google Shape;210;p35" draw:style-name="gr3" draw:text-style-name="P18" draw:layer="layout" svg:width="11.214cm" svg:height="2.541cm" svg:x="3.602cm" svg:y="19.282cm">
          <text:p text:style-name="P1"><text:span text:style-name="T16">Microkern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1;p35" draw:style-name="gr2" draw:text-style-name="P10" draw:layer="layout" svg:width="11.213cm" svg:height="11.934cm" svg:x="3.601cm" svg:y="7.431cm">
          <draw:image xlink:href="Pictures/100002010000025F0000028677B0215C186861AA.png" xlink:type="simple" xlink:show="embed" xlink:actuate="onLoad">
            <text:p/>
          </draw:image>
        </draw:frame>
        <presentation:notes draw:style-name="dp2">
          <draw:page-thumbnail draw:name="Google Shape;204;g3ad72b8a13e_0_5:notes" draw:style-name="gr1" draw:layer="layout" svg:width="16.932cm" svg:height="9.524cm" svg:x="1.059cm" svg:y="1.905cm" draw:page-number="23" presentation:class="page"/>
          <draw:frame draw:name="Google Shape;205;g3ad72b8a13e_0_5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crokernel – trade-offs" draw:style-name="dp1" draw:master-page-name="TITLE_5f_AND_5f_TWO_5f_COLUMNS" presentation:presentation-page-layout-name="AL3T3">
        <draw:frame draw:name="Google Shape;216;p36" presentation:style-name="pr13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Microkernel – trade-offs</text:span></text:p>
          </draw:text-box>
        </draw:frame>
        <draw:frame draw:name="Google Shape;217;p36" presentation:style-name="pr14" draw:text-style-name="P21" draw:layer="layout" svg:width="22.221cm" svg:height="18.122cm" svg:x="1.732cm" svg:y="6.403cm" presentation:class="outline" presentation:user-transformed="true">
          <draw:text-box>
            <text:p text:style-name="P19"><text:span text:style-name="T17">Microkernel tackles system complexity by distributing it across multiple roles</text:span></text:p>
            <text:p text:style-name="P20"><text:span text:style-name="T17">Polymorphic components, often from unknown vendors, are supported</text:span></text:p>
            <text:p text:style-name="P15"><text:span text:style-name="T17">The applications are sandboxed and platform-agnostic</text:span></text:p>
          </draw:text-box>
        </draw:frame>
        <draw:frame draw:name="Google Shape;218;p36" presentation:style-name="pr15" draw:text-style-name="P21" draw:layer="layout" svg:width="22.221cm" svg:height="18.122cm" svg:x="26.847cm" svg:y="6.403cm" presentation:class="outline" presentation:user-transformed="true">
          <draw:text-box>
            <text:p text:style-name="P19"><text:span text:style-name="T18">Microkernel’s APIs and SPIs are hard to change after the initial release</text:span></text:p>
            <text:p text:style-name="P20"><text:span text:style-name="T18">Indirection degrades performance</text:span></text:p>
            <text:p text:style-name="P20"><text:span text:style-name="T18">The latency is unpredictable because of resource contention</text:span></text:p>
            <text:p text:style-name="P15"><text:span text:style-name="T18"/></text:p>
          </draw:text-box>
        </draw:frame>
        <presentation:notes draw:style-name="dp2">
          <draw:page-thumbnail draw:name="Google Shape;213;g3ad72b8a13e_0_13:notes" draw:style-name="gr1" draw:layer="layout" svg:width="16.932cm" svg:height="9.524cm" svg:x="1.059cm" svg:y="1.905cm" draw:page-number="24" presentation:class="page"/>
          <draw:frame draw:name="Google Shape;214;g3ad72b8a13e_0_13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crokernel – examples" draw:style-name="dp1" draw:master-page-name="TITLE_5f_AND_5f_BODY" presentation:presentation-page-layout-name="AL2T1">
        <draw:frame draw:name="Google Shape;223;p37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Microkernel – examples</text:span></text:p>
          </draw:text-box>
        </draw:frame>
        <draw:frame draw:name="Google Shape;224;p37" presentation:style-name="pr11" draw:text-style-name="P7" draw:layer="layout" svg:width="26.716cm" svg:height="19.399cm" svg:x="21.539cm" svg:y="6.554cm" presentation:class="outline" presentation:user-transformed="true">
          <draw:text-box>
            <text:p text:style-name="P14"><text:span text:style-name="T10">This is the original inspiration for </text:span><text:span text:style-name="T11">Microkernel</text:span><text:span text:style-name="T10">.</text:span></text:p>
            <text:p text:style-name="P20"><text:span text:style-name="T10">Though not “micro-”, the kernel of an operating system is exactly this thing – it sandboxes user space applications and provides them access to system resources owned by </text:span><text:span text:style-name="T11">device drivers</text:span><text:span text:style-name="T10">.</text:span></text:p>
            <text:p text:style-name="P15"><text:span text:style-name="T10">Drivers for each kind of hardware devices are polymorphic towards the kernel, allowing it to support any combination of hardware components.</text:span></text:p>
          </draw:text-box>
        </draw:frame>
        <draw:custom-shape draw:name="Google Shape;225;p37" draw:style-name="gr3" draw:text-style-name="P18" draw:layer="layout" svg:width="14.977cm" svg:height="2.541cm" svg:x="2.332cm" svg:y="21.241cm">
          <text:p text:style-name="P1"><text:span text:style-name="T16">Operating Syst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6;p37" draw:style-name="gr2" draw:text-style-name="P10" draw:layer="layout" svg:width="16.515cm" svg:height="12.437cm" svg:x="3.286cm" svg:y="8.338cm">
          <draw:image xlink:href="Pictures/10000201000003C4000002D6673560290FD932AB.png" xlink:type="simple" xlink:show="embed" xlink:actuate="onLoad">
            <text:p/>
          </draw:image>
        </draw:frame>
        <presentation:notes draw:style-name="dp2">
          <draw:page-thumbnail draw:name="Google Shape;220;g3af9f17ed48_0_37:notes" draw:style-name="gr1" draw:layer="layout" svg:width="16.932cm" svg:height="9.524cm" svg:x="1.059cm" svg:y="1.905cm" draw:page-number="25" presentation:class="page"/>
          <draw:frame draw:name="Google Shape;221;g3af9f17ed48_0_37:notes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crokernel – examples" draw:style-name="dp1" draw:master-page-name="TITLE_5f_AND_5f_BODY" presentation:presentation-page-layout-name="AL2T1">
        <draw:frame draw:name="Google Shape;231;p38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Microkernel – examples</text:span></text:p>
          </draw:text-box>
        </draw:frame>
        <draw:frame draw:name="Google Shape;232;p38" presentation:style-name="pr11" draw:text-style-name="P7" draw:layer="layout" svg:width="26.682cm" svg:height="19.399cm" svg:x="21.572cm" svg:y="6.554cm" presentation:class="outline" presentation:user-transformed="true">
          <draw:text-box>
            <text:p text:style-name="P14"><text:span text:style-name="T10">Software frameworks often feature a </text:span><text:span text:style-name="T11">Facade</text:span><text:span text:style-name="T10"> which integrates the framework’s internals and provides a stable API to its clients, matching the role of microkernel.</text:span></text:p>
            <text:p text:style-name="P20"><text:span text:style-name="T10">In this case the functionality provided by the framework’s internal components is a kind of resource needed by the application.</text:span></text:p>
            <text:p text:style-name="P15"><text:span text:style-name="T19"/></text:p>
          </draw:text-box>
        </draw:frame>
        <draw:custom-shape draw:name="Google Shape;233;p38" draw:style-name="gr3" draw:text-style-name="P18" draw:layer="layout" svg:width="14.977cm" svg:height="2.541cm" svg:x="2.322cm" svg:y="21.009cm">
          <text:p text:style-name="P1"><text:span text:style-name="T16">Software Frame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4;p38" draw:style-name="gr2" draw:text-style-name="P10" draw:layer="layout" svg:width="12.104cm" svg:height="12.084cm" svg:x="3.759cm" svg:y="8.295cm">
          <draw:image xlink:href="Pictures/100002010000025F0000025E59FB719AED0770E5.png" xlink:type="simple" xlink:show="embed" xlink:actuate="onLoad">
            <text:p/>
          </draw:image>
        </draw:frame>
        <presentation:notes draw:style-name="dp2">
          <draw:page-thumbnail draw:name="Google Shape;228;g3b16c6db887_0_147:notes" draw:style-name="gr1" draw:layer="layout" svg:width="16.932cm" svg:height="9.524cm" svg:x="1.059cm" svg:y="1.905cm" draw:page-number="26" presentation:class="page"/>
          <draw:frame draw:name="Google Shape;229;g3b16c6db887_0_147:notes" presentation:style-name="pr3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crokernel – examples" draw:style-name="dp1" draw:master-page-name="TITLE_5f_AND_5f_BODY" presentation:presentation-page-layout-name="AL2T1">
        <draw:frame draw:name="Google Shape;239;p39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Microkernel – examples</text:span></text:p>
          </draw:text-box>
        </draw:frame>
        <draw:frame draw:name="Google Shape;240;p39" presentation:style-name="pr11" draw:text-style-name="P7" draw:layer="layout" svg:width="26.649cm" svg:height="19.399cm" svg:x="21.606cm" svg:y="6.554cm" presentation:class="outline" presentation:user-transformed="true">
          <draw:text-box>
            <text:p text:style-name="P14"><text:span text:style-name="T11">Virtualizers</text:span><text:span text:style-name="T10">, </text:span><text:span text:style-name="T11">Hypervisors</text:span><text:span text:style-name="T10">, and </text:span><text:span text:style-name="T11">Distributed Runtimes</text:span><text:span text:style-name="T10"> use the resources of underlying hardware to run guest applications.</text:span></text:p>
            <text:p text:style-name="P20"><text:span text:style-name="T10">A </text:span><text:span text:style-name="T11">Hypervisor</text:span><text:span text:style-name="T10"> runs on a single computer while a </text:span><text:span text:style-name="T11">Distributed Runtime</text:span><text:span text:style-name="T10">, such as common actor frameworks, distributes a client application over a pool of servers.</text:span></text:p>
            <text:p text:style-name="P15"><text:span text:style-name="T19"/></text:p>
          </draw:text-box>
        </draw:frame>
        <draw:custom-shape draw:name="Google Shape;241;p39" draw:style-name="gr3" draw:text-style-name="P18" draw:layer="layout" svg:width="14.977cm" svg:height="4.065cm" svg:x="3.162cm" svg:y="21.44cm">
          <text:p text:style-name="P1"><text:span text:style-name="T16">Virtualizer, </text:span></text:p>
          <text:p text:style-name="P1"><text:span text:style-name="T16">Distributed Run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2;p39" draw:style-name="gr2" draw:text-style-name="P10" draw:layer="layout" svg:width="7.951cm" svg:height="13.656cm" svg:x="6.675cm" svg:y="7.316cm">
          <draw:image xlink:href="Pictures/10000201000001BE000002FE137FA8C7455D98ED.png" xlink:type="simple" xlink:show="embed" xlink:actuate="onLoad">
            <text:p/>
          </draw:image>
        </draw:frame>
        <presentation:notes draw:style-name="dp2">
          <draw:page-thumbnail draw:name="Google Shape;236;g3b16c6db887_0_177:notes" draw:style-name="gr1" draw:layer="layout" svg:width="16.932cm" svg:height="9.524cm" svg:x="1.059cm" svg:y="1.905cm" draw:page-number="27" presentation:class="page"/>
          <draw:frame draw:name="Google Shape;237;g3b16c6db887_0_177:notes" presentation:style-name="pr3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crokernel – examples" draw:style-name="dp1" draw:master-page-name="TITLE_5f_AND_5f_BODY" presentation:presentation-page-layout-name="AL2T1">
        <draw:frame draw:name="Google Shape;247;p40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Microkernel – examples</text:span></text:p>
          </draw:text-box>
        </draw:frame>
        <draw:frame draw:name="Google Shape;248;p40" presentation:style-name="pr11" draw:text-style-name="P7" draw:layer="layout" svg:width="26.716cm" svg:height="19.399cm" svg:x="21.539cm" svg:y="6.554cm" presentation:class="outline" presentation:user-transformed="true">
          <draw:text-box>
            <text:p text:style-name="P14"><text:span text:style-name="T10">An </text:span><text:span text:style-name="T11">Interpreter</text:span><text:span text:style-name="T10"> executes a client </text:span><text:span text:style-name="T11">script</text:span><text:span text:style-name="T10"> in a sandboxed environment with access to libraries and resources registered with the </text:span><text:span text:style-name="T11">Interpreter</text:span><text:span text:style-name="T10">.</text:span></text:p>
            <text:p text:style-name="P15"><text:span text:style-name="T19"/></text:p>
          </draw:text-box>
        </draw:frame>
        <draw:custom-shape draw:name="Google Shape;249;p40" draw:style-name="gr3" draw:text-style-name="P18" draw:layer="layout" svg:width="14.977cm" svg:height="2.541cm" svg:x="3.256cm" svg:y="19.714cm">
          <text:p text:style-name="P1"><text:span text:style-name="T16">Interpre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0;p40" draw:style-name="gr2" draw:text-style-name="P10" draw:layer="layout" svg:width="11.763cm" svg:height="11.743cm" svg:x="4.864cm" svg:y="7.306cm">
          <draw:image xlink:href="Pictures/100002010000025F0000025E20BC8891B9B8879B.png" xlink:type="simple" xlink:show="embed" xlink:actuate="onLoad">
            <text:p/>
          </draw:image>
        </draw:frame>
        <presentation:notes draw:style-name="dp2">
          <draw:page-thumbnail draw:name="Google Shape;244;g3b16c6db887_0_171:notes" draw:style-name="gr1" draw:layer="layout" svg:width="16.932cm" svg:height="9.524cm" svg:x="1.059cm" svg:y="1.905cm" draw:page-number="28" presentation:class="page"/>
          <draw:frame draw:name="Google Shape;245;g3b16c6db887_0_171:notes" presentation:style-name="pr3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crokernel – examples" draw:style-name="dp1" draw:master-page-name="TITLE_5f_AND_5f_BODY" presentation:presentation-page-layout-name="AL2T1">
        <draw:frame draw:name="Google Shape;255;p41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Microkernel – examples</text:span></text:p>
          </draw:text-box>
        </draw:frame>
        <draw:frame draw:name="Google Shape;256;p41" presentation:style-name="pr11" draw:text-style-name="P7" draw:layer="layout" svg:width="26.716cm" svg:height="19.399cm" svg:x="21.539cm" svg:y="6.554cm" presentation:class="outline" presentation:user-transformed="true">
          <draw:text-box>
            <text:p text:style-name="P14"><text:span text:style-name="T10">A </text:span><text:span text:style-name="T11">Configurator</text:span><text:span text:style-name="T10"> is a short-lived component which runs once on the application’s startup. It’s task is to set up the application’s internal components in accordance to the instructions in the input </text:span><text:span text:style-name="T11">configuration file</text:span><text:span text:style-name="T10">.</text:span></text:p>
            <text:p text:style-name="P20"><text:span text:style-name="T10">Surprisingly, the </text:span><text:span text:style-name="T11">Configurator</text:span><text:span text:style-name="T10"> is an </text:span><text:span text:style-name="T11">Interpreter</text:span><text:span text:style-name="T10"> for the configuration file, and its creation of the software components is similar to initialization of library classes for use by a script.</text:span></text:p>
            <text:p text:style-name="P15"><text:span text:style-name="T19"/></text:p>
          </draw:text-box>
        </draw:frame>
        <draw:custom-shape draw:name="Google Shape;257;p41" draw:style-name="gr3" draw:text-style-name="P18" draw:layer="layout" svg:width="14.977cm" svg:height="2.541cm" svg:x="3.294cm" svg:y="21.838cm">
          <text:p text:style-name="P1"><text:span text:style-name="T16">Configura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8;p41" draw:style-name="gr2" draw:text-style-name="P10" draw:layer="layout" svg:width="13.032cm" svg:height="13.792cm" svg:x="4.267cm" svg:y="7.281cm">
          <draw:image xlink:href="Pictures/10000201000002AE000002D66C1F289604020D65.png" xlink:type="simple" xlink:show="embed" xlink:actuate="onLoad">
            <text:p/>
          </draw:image>
        </draw:frame>
        <presentation:notes draw:style-name="dp2">
          <draw:page-thumbnail draw:name="Google Shape;252;g3b16c6db887_0_165:notes" draw:style-name="gr1" draw:layer="layout" svg:width="16.932cm" svg:height="9.524cm" svg:x="1.059cm" svg:y="1.905cm" draw:page-number="29" presentation:class="page"/>
          <draw:frame draw:name="Google Shape;253;g3b16c6db887_0_165:notes" presentation:style-name="pr4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crokernel – examples" draw:style-name="dp1" draw:master-page-name="TITLE_5f_AND_5f_BODY" presentation:presentation-page-layout-name="AL2T1">
        <draw:frame draw:name="Google Shape;263;p42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Microkernel – examples</text:span></text:p>
          </draw:text-box>
        </draw:frame>
        <draw:frame draw:name="Google Shape;264;p42" presentation:style-name="pr11" draw:text-style-name="P7" draw:layer="layout" svg:width="26.716cm" svg:height="19.399cm" svg:x="21.539cm" svg:y="6.554cm" presentation:class="outline" presentation:user-transformed="true">
          <draw:text-box>
            <text:p text:style-name="P14"><text:span text:style-name="T10">A </text:span><text:span text:style-name="T11">Saga Engine</text:span><text:span text:style-name="T10"> executes </text:span><text:span text:style-name="T11">Sagas</text:span><text:span text:style-name="T10"> to change states of multiple services in a consistent way. </text:span></text:p>
            <text:p text:style-name="P20"><text:span text:style-name="T10">The </text:span><text:span text:style-name="T11">Sagas</text:span><text:span text:style-name="T10"> are often written in a domain-specific language (DSL) which makes the </text:span><text:span text:style-name="T11">Saga Engine</text:span><text:span text:style-name="T10"> an </text:span><text:span text:style-name="T11">Interpreter</text:span><text:span text:style-name="T10">.</text:span></text:p>
            <text:p text:style-name="P15"><text:span text:style-name="T19"/></text:p>
          </draw:text-box>
        </draw:frame>
        <draw:custom-shape draw:name="Google Shape;265;p42" draw:style-name="gr3" draw:text-style-name="P18" draw:layer="layout" svg:width="14.977cm" svg:height="2.541cm" svg:x="3.352cm" svg:y="22.071cm">
          <text:p text:style-name="P1"><text:span text:style-name="T16">Saga Eng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6;p42" draw:style-name="gr2" draw:text-style-name="P10" draw:layer="layout" svg:width="11.558cm" svg:height="13.801cm" svg:x="5.062cm" svg:y="7.198cm">
          <draw:image xlink:href="Pictures/1000020100000260000002D68C556EB31DBE6315.png" xlink:type="simple" xlink:show="embed" xlink:actuate="onLoad">
            <text:p/>
          </draw:image>
        </draw:frame>
        <presentation:notes draw:style-name="dp2">
          <draw:page-thumbnail draw:name="Google Shape;260;g3b16c6db887_0_159:notes" draw:style-name="gr1" draw:layer="layout" svg:width="16.932cm" svg:height="9.524cm" svg:x="1.059cm" svg:y="1.905cm" draw:page-number="30" presentation:class="page"/>
          <draw:frame draw:name="Google Shape;261;g3b16c6db887_0_159:notes" presentation:style-name="pr4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crokernel – examples" draw:style-name="dp1" draw:master-page-name="TITLE_5f_AND_5f_BODY" presentation:presentation-page-layout-name="AL2T1">
        <draw:frame draw:name="Google Shape;271;p43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Microkernel – examples</text:span></text:p>
          </draw:text-box>
        </draw:frame>
        <draw:frame draw:name="Google Shape;272;p43" presentation:style-name="pr11" draw:text-style-name="P7" draw:layer="layout" svg:width="24.856cm" svg:height="19.399cm" svg:x="23.398cm" svg:y="6.554cm" presentation:class="outline" presentation:user-transformed="true">
          <draw:text-box>
            <text:p text:style-name="P14"><text:span text:style-name="T11">AUTOSAR Classic</text:span><text:span text:style-name="T10">, the automotive standard, looks exactly like a </text:span><text:span text:style-name="T11">Microkernel</text:span><text:span text:style-name="T10">, though it was written and marketed as a </text:span><text:span text:style-name="T11">Service-Oriented Architecture</text:span><text:span text:style-name="T10"> (</text:span><text:span text:style-name="T11">SOA</text:span><text:span text:style-name="T10">).</text:span></text:p>
            <text:p text:style-name="P20"><text:span text:style-name="T10">There is a distributed </text:span><text:span text:style-name="T11">Virtual Functional Bus</text:span><text:span text:style-name="T10"> which connects all the car’s components together by allowing every </text:span><text:span text:style-name="T11">application</text:span><text:span text:style-name="T10"> to access any </text:span><text:span text:style-name="T11">service</text:span><text:span text:style-name="T10"> which may run on any of the hundreds chips present in a modern car.</text:span></text:p>
            <text:p text:style-name="P15"><text:span text:style-name="T19"/></text:p>
          </draw:text-box>
        </draw:frame>
        <draw:custom-shape draw:name="Google Shape;273;p43" draw:style-name="gr3" draw:text-style-name="P18" draw:layer="layout" svg:width="14.977cm" svg:height="2.541cm" svg:x="4.796cm" svg:y="21.307cm">
          <text:p text:style-name="P1"><text:span text:style-name="T16">AUTOSAR Class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4;p43" draw:style-name="gr2" draw:text-style-name="P10" draw:layer="layout" svg:width="21.378cm" svg:height="10.079cm" svg:x="1.596cm" svg:y="10.376cm">
          <draw:image xlink:href="Pictures/10000201000007AC0000039E3ADAFDDDA50DF1C9.png" xlink:type="simple" xlink:show="embed" xlink:actuate="onLoad">
            <text:p/>
          </draw:image>
        </draw:frame>
        <presentation:notes draw:style-name="dp2">
          <draw:page-thumbnail draw:name="Google Shape;268;g3b16c6db887_0_153:notes" draw:style-name="gr1" draw:layer="layout" svg:width="16.932cm" svg:height="9.524cm" svg:x="1.059cm" svg:y="1.905cm" draw:page-number="31" presentation:class="page"/>
          <draw:frame draw:name="Google Shape;269;g3b16c6db887_0_153:notes" presentation:style-name="pr4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sh" draw:style-name="dp1" draw:master-page-name="SECTION_5f_HEADER">
        <draw:frame draw:name="Google Shape;279;p44" presentation:style-name="pr8" draw:text-style-name="P11" draw:layer="layout" svg:width="47.336cm" svg:height="4.676cm" svg:x="1.732cm" svg:y="9.611cm" presentation:class="title" presentation:user-transformed="true">
          <draw:text-box>
            <text:p text:style-name="P1"><text:span text:style-name="T8">Mesh</text:span></text:p>
          </draw:text-box>
        </draw:frame>
        <draw:frame draw:name="Google Shape;280;p44" presentation:style-name="pr9" draw:text-style-name="P13" draw:layer="layout" svg:width="47.336cm" svg:height="4.402cm" svg:x="1.732cm" svg:y="14.288cm" presentation:class="subtitle" presentation:user-transformed="true">
          <draw:text-box>
            <text:p text:style-name="P12"><text:span text:style-name="T9">Decentralized communication</text:span></text:p>
          </draw:text-box>
        </draw:frame>
        <presentation:notes draw:style-name="dp2">
          <draw:page-thumbnail draw:name="Google Shape;276;g3ada4842c12_0_0:notes" draw:style-name="gr1" draw:layer="layout" svg:width="16.932cm" svg:height="9.524cm" svg:x="1.059cm" svg:y="1.905cm" draw:page-number="32" presentation:class="page"/>
          <draw:frame draw:name="Google Shape;277;g3ada4842c12_0_0:notes" presentation:style-name="pr4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sh – overview" draw:style-name="dp1" draw:master-page-name="TITLE_5f_AND_5f_BODY" presentation:presentation-page-layout-name="AL2T1">
        <draw:frame draw:name="Google Shape;285;p45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Mesh – overview</text:span></text:p>
          </draw:text-box>
        </draw:frame>
        <draw:frame draw:name="Google Shape;286;p45" presentation:style-name="pr11" draw:text-style-name="P7" draw:layer="layout" svg:width="30.451cm" svg:height="14.339cm" svg:x="18.619cm" svg:y="6.403cm" presentation:class="outline" presentation:user-transformed="true">
          <draw:text-box>
            <text:p text:style-name="P14"><text:span text:style-name="T10">A </text:span><text:span text:style-name="T11">Mesh</text:span><text:span text:style-name="T10"> or </text:span><text:span text:style-name="T11">Grid</text:span><text:span text:style-name="T10"> is a decentralized network. It is extremely fault-tolerant and elastic thanks to dynamic connectivity.</text:span></text:p>
            <text:p text:style-name="P15"><text:span text:style-name="T10">A </text:span><text:span text:style-name="T11">Mesh</text:span><text:span text:style-name="T10"> usually implements a virtual distributed </text:span><text:span text:style-name="T11">Middleware</text:span><text:span text:style-name="T10"> and/or </text:span><text:span text:style-name="T11">Shared Repository</text:span><text:span text:style-name="T10">.</text:span></text:p>
          </draw:text-box>
        </draw:frame>
        <draw:frame draw:name="Google Shape;287;p45" presentation:style-name="pr4" draw:text-style-name="P7" draw:layer="layout" svg:width="47.336cm" svg:height="6.002cm" svg:x="1.732cm" svg:y="21.144cm" presentation:class="outline" presentation:user-transformed="true">
          <draw:text-box>
            <text:p text:style-name="P16"><text:span text:style-name="T12">Mesh</text:span><text:span text:style-name="T13"> is perfect for dynamic scaling and high availability.</text:span></text:p>
            <text:p text:style-name="P17"><text:span text:style-name="T14">It does not work for low latency or security-critical systems.</text:span></text:p>
          </draw:text-box>
        </draw:frame>
        <draw:custom-shape draw:name="Google Shape;288;p45" draw:style-name="gr3" draw:text-style-name="P18" draw:layer="layout" svg:width="11.641cm" svg:height="2.541cm" svg:x="2.783cm" svg:y="16.057cm">
          <text:p text:style-name="P1"><text:span text:style-name="T16">Me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9;p45" draw:style-name="gr2" draw:text-style-name="P10" draw:layer="layout" svg:width="14.736cm" svg:height="7.839cm" svg:x="2.364cm" svg:y="7.919cm">
          <draw:image xlink:href="Pictures/100002010000034C000001C130BEA01337E0F356.png" xlink:type="simple" xlink:show="embed" xlink:actuate="onLoad">
            <text:p/>
          </draw:image>
        </draw:frame>
        <presentation:notes draw:style-name="dp2">
          <draw:page-thumbnail draw:name="Google Shape;282;g3ada4842c12_0_5:notes" draw:style-name="gr1" draw:layer="layout" svg:width="16.932cm" svg:height="9.524cm" svg:x="1.059cm" svg:y="1.905cm" draw:page-number="33" presentation:class="page"/>
          <draw:frame draw:name="Google Shape;283;g3ada4842c12_0_5:notes" presentation:style-name="pr4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sh – trade-offs" draw:style-name="dp1" draw:master-page-name="TITLE_5f_AND_5f_TWO_5f_COLUMNS" presentation:presentation-page-layout-name="AL3T3">
        <draw:frame draw:name="Google Shape;294;p46" presentation:style-name="pr13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Mesh – trade-offs</text:span></text:p>
          </draw:text-box>
        </draw:frame>
        <draw:frame draw:name="Google Shape;295;p46" presentation:style-name="pr14" draw:text-style-name="P21" draw:layer="layout" svg:width="22.221cm" svg:height="18.122cm" svg:x="1.732cm" svg:y="6.403cm" presentation:class="outline" presentation:user-transformed="true">
          <draw:text-box>
            <text:p text:style-name="P19"><text:span text:style-name="T17">The system is elastic and self-healing with no single point of failure</text:span></text:p>
            <text:p text:style-name="P15"><text:span text:style-name="T17">Mesh implementations are available off the shelf</text:span></text:p>
          </draw:text-box>
        </draw:frame>
        <draw:frame draw:name="Google Shape;296;p46" presentation:style-name="pr15" draw:text-style-name="P21" draw:layer="layout" svg:width="22.221cm" svg:height="18.122cm" svg:x="26.847cm" svg:y="6.403cm" presentation:class="outline" presentation:user-transformed="true">
          <draw:text-box>
            <text:p text:style-name="P19"><text:span text:style-name="T18">There is administration and security overhead</text:span></text:p>
            <text:p text:style-name="P20"><text:span text:style-name="T18">Unstable connections degrade performance</text:span></text:p>
            <text:p text:style-name="P20"><text:span text:style-name="T18">The business logic may need to account for unreliable communication of split brain conditions</text:span></text:p>
            <text:p text:style-name="P15"><text:span text:style-name="T18">The Mesh engine is hard to debug</text:span></text:p>
          </draw:text-box>
        </draw:frame>
        <presentation:notes draw:style-name="dp2">
          <draw:page-thumbnail draw:name="Google Shape;291;g3ada4842c12_0_13:notes" draw:style-name="gr1" draw:layer="layout" svg:width="16.932cm" svg:height="9.524cm" svg:x="1.059cm" svg:y="1.905cm" draw:page-number="34" presentation:class="page"/>
          <draw:frame draw:name="Google Shape;292;g3ada4842c12_0_13:notes" presentation:style-name="pr4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sh – structure" draw:style-name="dp1" draw:master-page-name="TITLE_5f_AND_5f_BODY" presentation:presentation-page-layout-name="AL2T1">
        <draw:frame draw:name="Google Shape;301;p47" presentation:style-name="pr17" draw:text-style-name="P7" draw:layer="layout" svg:width="47.336cm" svg:height="20.081cm" svg:x="1.732cm" svg:y="6.403cm" presentation:class="outline" presentation:user-transformed="true">
          <draw:text-box>
            <text:p text:style-name="P19"><text:span text:style-name="T10">Connections between </text:span><text:span text:style-name="T11">Mesh</text:span><text:span text:style-name="T10"> nodes can be:</text:span></text:p>
            <text:list text:style-name="L11">
              <text:list-item>
                <text:p text:style-name="P20"><text:span text:style-name="T11">Structured</text:span><text:span text:style-name="T10"> or </text:span><text:span text:style-name="T11">pre-defined</text:span><text:span text:style-name="T10">. This kind of </text:span><text:span text:style-name="T11">Meshes</text:span><text:span text:style-name="T10"> provides redundancy but not elasticity as no nodes can be added or removed at run time.</text:span></text:p>
              </text:list-item>
              <text:list-item>
                <text:p text:style-name="P19"><text:span text:style-name="T11">Unstructured</text:span><text:span text:style-name="T10"> or </text:span><text:span text:style-name="T11">ad-hoc</text:span><text:span text:style-name="T10">. Nodes can be freely added or removed, but the topology of the </text:span><text:span text:style-name="T11">Mesh</text:span><text:span text:style-name="T10"> may be hard to predict, resulting in latency spikes.</text:span></text:p>
              </text:list-item>
            </text:list>
          </draw:text-box>
        </draw:frame>
        <draw:frame draw:name="Google Shape;302;p47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Mesh – structure</text:span></text:p>
          </draw:text-box>
        </draw:frame>
        <presentation:notes draw:style-name="dp2">
          <draw:page-thumbnail draw:name="Google Shape;298;g3b16c6db887_0_183:notes" draw:style-name="gr1" draw:layer="layout" svg:width="16.932cm" svg:height="9.524cm" svg:x="1.059cm" svg:y="1.905cm" draw:page-number="35" presentation:class="page"/>
          <draw:frame draw:name="Google Shape;299;g3b16c6db887_0_183:notes" presentation:style-name="pr4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sh – connectivity" draw:style-name="dp1" draw:master-page-name="TITLE_5f_AND_5f_BODY" presentation:presentation-page-layout-name="AL2T1">
        <draw:frame draw:name="Google Shape;307;p48" presentation:style-name="pr17" draw:text-style-name="P7" draw:layer="layout" svg:width="47.336cm" svg:height="20.081cm" svg:x="1.732cm" svg:y="6.403cm" presentation:class="outline" presentation:user-transformed="true">
          <draw:text-box>
            <text:p text:style-name="P19"><text:span text:style-name="T10">Each </text:span><text:span text:style-name="T11">node</text:span><text:span text:style-name="T10"> can be:</text:span></text:p>
            <text:list text:style-name="L11">
              <text:list-item>
                <text:p text:style-name="P20"><text:span text:style-name="T10">Connected to every other </text:span><text:span text:style-name="T11">node</text:span><text:span text:style-name="T10">, making a </text:span><text:span text:style-name="T11">fully connected Mesh</text:span><text:span text:style-name="T10">. Such </text:span><text:span text:style-name="T11">Meshes</text:span><text:span text:style-name="T10"> are limited in size because of the number of connections, but deliver the best performance and fault tolerance.</text:span></text:p>
              </text:list-item>
              <text:list-item>
                <text:p text:style-name="P22"><text:span text:style-name="T10">Connected to some other </text:span><text:span text:style-name="T11">nodes</text:span><text:span text:style-name="T10">. The exact rules for making connections define the internal </text:span><text:span text:style-name="T11">topology</text:span><text:span text:style-name="T10"> of the </text:span><text:span text:style-name="T11">Mesh</text:span><text:span text:style-name="T10">.</text:span></text:p>
              </text:list-item>
            </text:list>
          </draw:text-box>
        </draw:frame>
        <draw:frame draw:name="Google Shape;308;p48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Mesh – connectivity</text:span></text:p>
          </draw:text-box>
        </draw:frame>
        <presentation:notes draw:style-name="dp2">
          <draw:page-thumbnail draw:name="Google Shape;304;g3b16c6db887_0_188:notes" draw:style-name="gr1" draw:layer="layout" svg:width="16.932cm" svg:height="9.524cm" svg:x="1.059cm" svg:y="1.905cm" draw:page-number="36" presentation:class="page"/>
          <draw:frame draw:name="Google Shape;305;g3b16c6db887_0_188:notes" presentation:style-name="pr4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sh – layering" draw:style-name="dp1" draw:master-page-name="TITLE_5f_AND_5f_BODY" presentation:presentation-page-layout-name="AL2T1">
        <draw:frame draw:name="Google Shape;313;p49" presentation:style-name="pr17" draw:text-style-name="P7" draw:layer="layout" svg:width="47.336cm" svg:height="20.081cm" svg:x="1.732cm" svg:y="6.403cm" presentation:class="outline" presentation:user-transformed="true">
          <draw:text-box>
            <text:p text:style-name="P19"><text:span text:style-name="T10">The interconnected </text:span><text:span text:style-name="T11">nodes</text:span><text:span text:style-name="T10"> of the </text:span><text:span text:style-name="T11">Mesh</text:span><text:span text:style-name="T10"> can be:</text:span></text:p>
            <text:list text:style-name="L11">
              <text:list-item>
                <text:p text:style-name="P20"><text:span text:style-name="T11">Identical</text:span><text:span text:style-name="T10"> in a </text:span><text:span text:style-name="T11">one-layer Mesh</text:span><text:span text:style-name="T10">.</text:span></text:p>
              </text:list-item>
              <text:list-item>
                <text:p text:style-name="P22"><text:span text:style-name="T11">Specialized</text:span><text:span text:style-name="T10"> in a </text:span><text:span text:style-name="T11">multi-layer Mesh</text:span><text:span text:style-name="T10">. In most cases there are </text:span><text:span text:style-name="T11">trunk nodes</text:span><text:span text:style-name="T10"> that maintain the </text:span><text:span text:style-name="T11">Mesh</text:span><text:span text:style-name="T10">’s </text:span><text:span text:style-name="T11">topology</text:span><text:span text:style-name="T10"> and connectivity, and </text:span><text:span text:style-name="T11">leaf nodes</text:span><text:span text:style-name="T10"> that carry end user applications.</text:span></text:p>
              </text:list-item>
            </text:list>
          </draw:text-box>
        </draw:frame>
        <draw:frame draw:name="Google Shape;314;p49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Mesh – layering</text:span></text:p>
          </draw:text-box>
        </draw:frame>
        <presentation:notes draw:style-name="dp2">
          <draw:page-thumbnail draw:name="Google Shape;310;g3b16c6db887_0_193:notes" draw:style-name="gr1" draw:layer="layout" svg:width="16.932cm" svg:height="9.524cm" svg:x="1.059cm" svg:y="1.905cm" draw:page-number="37" presentation:class="page"/>
          <draw:frame draw:name="Google Shape;311;g3b16c6db887_0_193:notes" presentation:style-name="pr4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sh – examples" draw:style-name="dp1" draw:master-page-name="TITLE_5f_AND_5f_BODY" presentation:presentation-page-layout-name="AL2T1">
        <draw:frame draw:name="Google Shape;319;p50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Mesh – examples</text:span></text:p>
          </draw:text-box>
        </draw:frame>
        <draw:frame draw:name="Google Shape;320;p50" presentation:style-name="pr11" draw:text-style-name="P7" draw:layer="layout" svg:width="28.856cm" svg:height="17.572cm" svg:x="20.212cm" svg:y="7.383cm" presentation:class="outline" presentation:user-transformed="true">
          <draw:text-box>
            <text:p text:style-name="P14"><text:span text:style-name="T11">Peer-to-peer Networks</text:span><text:span text:style-name="T10"> share resources (files, CPU time or even Internet access) over unstable connections.</text:span></text:p>
            <text:p text:style-name="P15"><text:span text:style-name="T10">Such a </text:span><text:span text:style-name="T11">Mesh</text:span><text:span text:style-name="T10"> is usually an unstructured (nodes are free to join and leave) two-layer (there are dedicated registrar servers) network that runs on top of the Internet infrastructure and protocols.</text:span></text:p>
          </draw:text-box>
        </draw:frame>
        <draw:custom-shape draw:name="Google Shape;321;p50" draw:style-name="gr3" draw:text-style-name="P18" draw:layer="layout" svg:width="16.771cm" svg:height="2.541cm" svg:x="2.209cm" svg:y="18.509cm">
          <text:p text:style-name="P1"><text:span text:style-name="T16">Peer-to-Peer Net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2;p50" draw:style-name="gr2" draw:text-style-name="P10" draw:layer="layout" svg:width="11.267cm" svg:height="8.726cm" svg:x="4.961cm" svg:y="8.94cm">
          <draw:image xlink:href="Pictures/100002010000023C000001BB9A4FE41566E12D83.png" xlink:type="simple" xlink:show="embed" xlink:actuate="onLoad">
            <text:p/>
          </draw:image>
        </draw:frame>
        <presentation:notes draw:style-name="dp2">
          <draw:page-thumbnail draw:name="Google Shape;316;g3ada4842c12_0_35:notes" draw:style-name="gr1" draw:layer="layout" svg:width="16.932cm" svg:height="9.524cm" svg:x="1.059cm" svg:y="1.905cm" draw:page-number="38" presentation:class="page"/>
          <draw:frame draw:name="Google Shape;317;g3ada4842c12_0_35:notes" presentation:style-name="pr4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sh – examples" draw:style-name="dp1" draw:master-page-name="TITLE_5f_AND_5f_BODY" presentation:presentation-page-layout-name="AL2T1">
        <draw:frame draw:name="Google Shape;327;p51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Mesh – examples</text:span></text:p>
          </draw:text-box>
        </draw:frame>
        <draw:frame draw:name="Google Shape;328;p51" presentation:style-name="pr11" draw:text-style-name="P7" draw:layer="layout" svg:width="28.856cm" svg:height="17.572cm" svg:x="20.212cm" svg:y="7.383cm" presentation:class="outline" presentation:user-transformed="true">
          <draw:text-box>
            <text:p text:style-name="P14"><text:span text:style-name="T10">A system of </text:span><text:span text:style-name="T11">Actors</text:span><text:span text:style-name="T10"> models a fully connected </text:span><text:span text:style-name="T11">Mesh</text:span><text:span text:style-name="T10"> because every </text:span><text:span text:style-name="T11">Actor</text:span><text:span text:style-name="T10"> can send a message to any other </text:span><text:span text:style-name="T11">Actor</text:span><text:span text:style-name="T10"> in the system.</text:span></text:p>
            <text:p text:style-name="P15"><text:span text:style-name="T10">The </text:span><text:span text:style-name="T11">message queues</text:span><text:span text:style-name="T10"> of the </text:span><text:span text:style-name="T11">actors</text:span><text:span text:style-name="T10">, being their only means of communication, take the role of </text:span><text:span text:style-name="T11">Mesh</text:span><text:span text:style-name="T10"> nodes.</text:span></text:p>
          </draw:text-box>
        </draw:frame>
        <draw:custom-shape draw:name="Google Shape;329;p51" draw:style-name="gr3" draw:text-style-name="P18" draw:layer="layout" svg:width="10.901cm" svg:height="2.541cm" svg:x="4.869cm" svg:y="18.509cm">
          <text:p text:style-name="P1"><text:span text:style-name="T16">Acto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0;p51" draw:style-name="gr2" draw:text-style-name="P10" draw:layer="layout" svg:width="10.711cm" svg:height="8.573cm" svg:x="4.964cm" svg:y="8.91cm">
          <draw:image xlink:href="Pictures/1000020100000236000001C56580A95572D3B94B.png" xlink:type="simple" xlink:show="embed" xlink:actuate="onLoad">
            <text:p/>
          </draw:image>
        </draw:frame>
        <presentation:notes draw:style-name="dp2">
          <draw:page-thumbnail draw:name="Google Shape;324;g3b16c6db887_0_210:notes" draw:style-name="gr1" draw:layer="layout" svg:width="16.932cm" svg:height="9.524cm" svg:x="1.059cm" svg:y="1.905cm" draw:page-number="39" presentation:class="page"/>
          <draw:frame draw:name="Google Shape;325;g3b16c6db887_0_210:notes" presentation:style-name="pr5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sh – examples" draw:style-name="dp1" draw:master-page-name="TITLE_5f_AND_5f_BODY" presentation:presentation-page-layout-name="AL2T1">
        <draw:frame draw:name="Google Shape;335;p52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Mesh – examples</text:span></text:p>
          </draw:text-box>
        </draw:frame>
        <draw:frame draw:name="Google Shape;336;p52" presentation:style-name="pr11" draw:text-style-name="P7" draw:layer="layout" svg:width="28.856cm" svg:height="19.332cm" svg:x="20.212cm" svg:y="6.686cm" presentation:class="outline" presentation:user-transformed="true">
          <draw:text-box>
            <text:p text:style-name="P14"><text:span text:style-name="T11">Service Mesh</text:span><text:span text:style-name="T10"> is a distributed </text:span><text:span text:style-name="T11">Middleware</text:span><text:span text:style-name="T10"> for </text:span><text:span text:style-name="T11">Microservices</text:span><text:span text:style-name="T10">.</text:span></text:p>
            <text:p text:style-name="P20"><text:span text:style-name="T10">Every instance of a user service is colocated with a </text:span><text:span text:style-name="T11">Sidecar</text:span><text:span text:style-name="T10"> that contains both shared libraries and a </text:span><text:span text:style-name="T11">Mesh</text:span><text:span text:style-name="T10"> node, which maintains the system’s connectivity and is governed by a centralized </text:span><text:span text:style-name="T11">control</text:span><text:span text:style-name="T10"> service.</text:span></text:p>
            <text:p text:style-name="P15"><text:span text:style-name="T10">The Mesh nature makes Microservices elastic – new instances can be easily created and added to the network.</text:span></text:p>
          </draw:text-box>
        </draw:frame>
        <draw:custom-shape draw:name="Google Shape;337;p52" draw:style-name="gr3" draw:text-style-name="P18" draw:layer="layout" svg:width="16.771cm" svg:height="2.541cm" svg:x="1.975cm" svg:y="21.993cm">
          <text:p text:style-name="P1"><text:span text:style-name="T16">Service Me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8;p52" draw:style-name="gr2" draw:text-style-name="P10" draw:layer="layout" svg:width="17.258cm" svg:height="13.483cm" svg:x="1.732cm" svg:y="7.778cm">
          <draw:image xlink:href="Pictures/100002010000046E000003766B5F88F6BB876F7B.png" xlink:type="simple" xlink:show="embed" xlink:actuate="onLoad">
            <text:p/>
          </draw:image>
        </draw:frame>
        <presentation:notes draw:style-name="dp2">
          <draw:page-thumbnail draw:name="Google Shape;332;g3b16c6db887_0_204:notes" draw:style-name="gr1" draw:layer="layout" svg:width="16.932cm" svg:height="9.524cm" svg:x="1.059cm" svg:y="1.905cm" draw:page-number="40" presentation:class="page"/>
          <draw:frame draw:name="Google Shape;333;g3b16c6db887_0_204:notes" presentation:style-name="pr5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sh – examples" draw:style-name="dp1" draw:master-page-name="TITLE_5f_AND_5f_BODY" presentation:presentation-page-layout-name="AL2T1">
        <draw:frame draw:name="Google Shape;343;p53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Mesh – examples</text:span></text:p>
          </draw:text-box>
        </draw:frame>
        <draw:frame draw:name="Google Shape;344;p53" presentation:style-name="pr11" draw:text-style-name="P7" draw:layer="layout" svg:width="28.856cm" svg:height="19.929cm" svg:x="20.212cm" svg:y="6.587cm" presentation:class="outline" presentation:user-transformed="true">
          <draw:text-box>
            <text:p text:style-name="P14"><text:span text:style-name="T11">Space-Based Architecture</text:span><text:span text:style-name="T10"> is a kind of </text:span><text:span text:style-name="T11">Service Mesh</text:span><text:span text:style-name="T10"> whose </text:span><text:span text:style-name="T11">Sidecars</text:span><text:span text:style-name="T10"> carry nodes of a </text:span><text:span text:style-name="T11">Distributed Cache</text:span><text:span text:style-name="T10"> called </text:span><text:span text:style-name="T11">Data Grid</text:span><text:span text:style-name="T10">.</text:span></text:p>
            <text:p text:style-name="P20"><text:span text:style-name="T10">The nodes exchange information, ensuring that writes to one node quickly propagate to every other node. As the result, every services has an in-memory copy of the entire system’s state.</text:span></text:p>
            <text:p text:style-name="P15"><text:span text:style-name="T10">This architecture provides elasticity at both processing (service instances) and data access level.</text:span></text:p>
          </draw:text-box>
        </draw:frame>
        <draw:custom-shape draw:name="Google Shape;345;p53" draw:style-name="gr3" draw:text-style-name="P18" draw:layer="layout" svg:width="16.771cm" svg:height="2.541cm" svg:x="1.734cm" svg:y="24.151cm">
          <text:p text:style-name="P1"><text:span text:style-name="T16">Space-Based Archite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6;p53" draw:style-name="gr2" draw:text-style-name="P10" draw:layer="layout" svg:width="9.878cm" svg:height="16.162cm" svg:x="5.181cm" svg:y="7.666cm">
          <draw:image xlink:href="Pictures/10000201000002360000039E39EF17ED20F2F858.png" xlink:type="simple" xlink:show="embed" xlink:actuate="onLoad">
            <text:p/>
          </draw:image>
        </draw:frame>
        <presentation:notes draw:style-name="dp2">
          <draw:page-thumbnail draw:name="Google Shape;340;g3b16c6db887_0_198:notes" draw:style-name="gr1" draw:layer="layout" svg:width="16.932cm" svg:height="9.524cm" svg:x="1.059cm" svg:y="1.905cm" draw:page-number="41" presentation:class="page"/>
          <draw:frame draw:name="Google Shape;341;g3b16c6db887_0_198:notes" presentation:style-name="pr5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" draw:style-name="dp1" draw:master-page-name="SECTION_5f_HEADER">
        <draw:frame draw:name="Google Shape;351;p54" presentation:style-name="pr8" draw:text-style-name="P11" draw:layer="layout" svg:width="47.336cm" svg:height="4.676cm" svg:x="1.732cm" svg:y="11.949cm" presentation:class="title" presentation:user-transformed="true">
          <draw:text-box>
            <text:p text:style-name="P1"><text:span text:style-name="T8">Conclusion</text:span></text:p>
          </draw:text-box>
        </draw:frame>
        <presentation:notes draw:style-name="dp2">
          <draw:page-thumbnail draw:name="Google Shape;348;g39ecdd5df51_0_44:notes" draw:style-name="gr1" draw:layer="layout" svg:width="16.932cm" svg:height="9.524cm" svg:x="1.059cm" svg:y="1.905cm" draw:page-number="42" presentation:class="page"/>
          <draw:frame draw:name="Google Shape;349;g39ecdd5df51_0_44:notes" presentation:style-name="pr5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way of patterns" draw:style-name="dp1" draw:master-page-name="TITLE_5f_AND_5f_BODY" presentation:presentation-page-layout-name="AL2T1">
        <draw:frame draw:name="Google Shape;356;p55" presentation:style-name="pr17" draw:text-style-name="P7" draw:layer="layout" svg:width="47.336cm" svg:height="20.081cm" svg:x="1.732cm" svg:y="6.403cm" presentation:class="outline" presentation:user-transformed="true">
          <draw:text-box>
            <text:p text:style-name="P19"><text:span text:style-name="T10">We can modify the internal design of a system component to achieve flexibility with </text:span><text:span text:style-name="T11">Plugins</text:span><text:span text:style-name="T10"> or stability with </text:span><text:span text:style-name="T11">Hexagonal Architecture</text:span><text:span text:style-name="T10">.</text:span></text:p>
            <text:p text:style-name="P20"><text:span text:style-name="T10">We can share or coordinate resources by employing a </text:span><text:span text:style-name="T11">Microkernel</text:span><text:span text:style-name="T10">.</text:span></text:p>
            <text:p text:style-name="P20"><text:span text:style-name="T10">We can make our system elastic and fault tolerant by running it in a </text:span><text:span text:style-name="T11">Mesh</text:span><text:span text:style-name="T10">.</text:span></text:p>
            <text:p text:style-name="P20"><text:span text:style-name="T10">Patterns are like data structures: any system can be implemented with only vectors, or lists, or hash tables. Still, its performance will be better if you use an appropriate algorithm for each data processing task.</text:span></text:p>
            <text:p text:style-name="P15"><text:span text:style-name="T10">Likewise, any business logic can be implemented without patterns, but making prudent use of them will improve both the structure and performance of the code.</text:span></text:p>
          </draw:text-box>
        </draw:frame>
        <draw:frame draw:name="Google Shape;357;p55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The way of patterns</text:span></text:p>
          </draw:text-box>
        </draw:frame>
        <presentation:notes draw:style-name="dp2">
          <draw:page-thumbnail draw:name="Google Shape;353;g3afbd97c74f_0_0:notes" draw:style-name="gr1" draw:layer="layout" svg:width="16.932cm" svg:height="9.524cm" svg:x="1.059cm" svg:y="1.905cm" draw:page-number="43" presentation:class="page"/>
          <draw:frame draw:name="Google Shape;354;g3afbd97c74f_0_0:notes" presentation:style-name="pr5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ks" draw:style-name="dp1" draw:master-page-name="TITLE_5f_AND_5f_BODY" presentation:presentation-page-layout-name="AL2T1">
        <draw:frame draw:name="Google Shape;362;p56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Links</text:span></text:p>
          </draw:text-box>
        </draw:frame>
        <draw:frame draw:name="Google Shape;363;p56" presentation:style-name="pr17" draw:text-style-name="P7" draw:layer="layout" svg:width="47.336cm" svg:height="13.012cm" svg:x="1.732cm" svg:y="6.403cm" presentation:class="outline" presentation:user-transformed="true">
          <draw:text-box>
            <text:p text:style-name="P14"><text:span text:style-name="T10">This was an overview of patterns revisited in part 5 of </text:span><text:span text:style-name="T11">Architectural Metapatterns</text:span><text:span text:style-name="T10">. You can:</text:span></text:p>
            <text:p text:style-name="P20"><text:span text:style-name="T10">– </text:span><text:span text:style-name="T10">read the book online at </text:span><text:span text:style-name="T20"><text:a xlink:href="https://metapatterns.io/" xlink:type="simple">metapatterns.io</text:a></text:span></text:p>
            <text:p text:style-name="P20"><text:span text:style-name="T10">– </text:span><text:span text:style-name="T10">download it from </text:span><text:span text:style-name="T20"><text:a xlink:href="https://leanpub.com/metapatterns" xlink:type="simple">leanpub.com/metapatterns</text:a></text:span></text:p>
            <text:p text:style-name="P15"><text:span text:style-name="T10">The diagrams and the ODT source file are available under the CC BY license.</text:span></text:p>
          </draw:text-box>
        </draw:frame>
        <draw:frame draw:name="Google Shape;364;p56" presentation:style-name="pr4" draw:text-style-name="P7" draw:layer="layout" svg:width="47.336cm" svg:height="6.437cm" svg:x="1.732cm" svg:y="19.416cm" presentation:class="outline" presentation:user-transformed="true">
          <draw:text-box>
            <text:p text:style-name="P16"><text:span text:style-name="T21">The book also contains analytics not covered by these slides.</text:span></text:p>
          </draw:text-box>
        </draw:frame>
        <presentation:notes draw:style-name="dp2">
          <draw:page-thumbnail draw:name="Google Shape;359;g39ecdd5df51_0_53:notes" draw:style-name="gr1" draw:layer="layout" svg:width="16.932cm" svg:height="9.524cm" svg:x="1.059cm" svg:y="1.905cm" draw:page-number="44" presentation:class="page"/>
          <draw:frame draw:name="Google Shape;360;g39ecdd5df51_0_53:notes" presentation:style-name="pr5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212121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212121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28.5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16.573cm" fo:padding-top="0.508cm" fo:padding-bottom="0.508cm" fo:padding-left="0.508cm" fo:padding-right="0.508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16.573cm" fo:padding-top="0.508cm" fo:padding-bottom="0.508cm" fo:padding-left="0.508cm" fo:padding-right="0.508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16.573cm" fo:padding-top="0.508cm" fo:padding-bottom="0.508cm" fo:padding-left="0.508cm" fo:padding-right="0.508cm" fo:wrap-option="wrap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16.573cm" fo:padding-top="0.508cm" fo:padding-bottom="0.508cm" fo:padding-left="0.508cm" fo:padding-right="0.508cm" fo:wrap-option="wrap"/>
    </style:style>
    <style:style style:name="Mpr11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47.336cm" svg:height="11.402cm" svg:x="1.732cm" svg:y="4.137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45.719cm" svg:height="16.572cm" svg:x="2.54cm" svg:y="6.686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47.336cm" svg:height="3.181cm" svg:x="1.732cm" svg:y="2.472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47.336cm" svg:height="18.979cm" svg:x="1.732cm" svg:y="6.403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2cm" svg:height="9.524cm" svg:x="1.058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4;p3" presentation:style-name="SECTION_5f_HEADER-title" draw:layer="backgroundobjects" svg:width="47.336cm" svg:height="4.676cm" svg:x="1.732cm" svg:y="11.949cm" presentation:class="title" presentation:placeholder="true" presentation:user-transformed="true">
        <draw:text-box/>
      </draw:frame>
      <draw:frame draw:name="Google Shape;15;p3" presentation:style-name="Mpr7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SECTION_5f_HEADER-outline1" draw:layer="backgroundobjects" svg:width="45.719cm" svg:height="16.572cm" svg:x="2.54cm" svg:y="6.686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2cm" svg:height="9.524cm" svg:x="1.058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Google Shape;21;p5" presentation:style-name="TITLE_5f_AND_5f_TWO_5f_COLUMNS-title" draw:layer="backgroundobjects" svg:width="47.336cm" svg:height="3.181cm" svg:x="1.732cm" svg:y="2.472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22.221cm" svg:height="18.979cm" svg:x="1.732cm" svg:y="6.403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22.221cm" svg:height="18.979cm" svg:x="26.847cm" svg:y="6.403cm" presentation:class="outline" presentation:placeholder="true" presentation:user-transformed="true">
        <draw:text-box/>
      </draw:frame>
      <draw:frame draw:name="Google Shape;24;p5" presentation:style-name="Mpr10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2cm" svg:height="9.524cm" svg:x="1.058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74"/>
    <meta:generator>LibreOfficeDev/6.0.5.2$Linux_X86_64 LibreOffice_project/</meta:generator>
  </office:meta>
</office:document-meta>
</file>