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AC0000039E3ADAFDDDA50DF1C9.png" manifest:media-type="image/png"/>
  <manifest:file-entry manifest:full-path="Pictures/1000020100000260000002D68C556EB31DBE6315.png" manifest:media-type="image/png"/>
  <manifest:file-entry manifest:full-path="Pictures/100002010000046E000003766B5F88F6BB876F7B.png" manifest:media-type="image/png"/>
  <manifest:file-entry manifest:full-path="Pictures/100002010000025F0000025E20BC8891B9B8879B.png" manifest:media-type="image/png"/>
  <manifest:file-entry manifest:full-path="Pictures/1000020100000236000001C56580A95572D3B94B.png" manifest:media-type="image/png"/>
  <manifest:file-entry manifest:full-path="Pictures/10000201000002AE000002D66C1F289604020D65.png" manifest:media-type="image/png"/>
  <manifest:file-entry manifest:full-path="Pictures/10000201000001BE000002FE137FA8C7455D98ED.png" manifest:media-type="image/png"/>
  <manifest:file-entry manifest:full-path="Pictures/1000020100000232000002D6DF77A539256BD9AC.png" manifest:media-type="image/png"/>
  <manifest:file-entry manifest:full-path="Pictures/100002010000028600000287037642A698E8CD1F.png" manifest:media-type="image/png"/>
  <manifest:file-entry manifest:full-path="Pictures/100002010000023C000001BB9A4FE41566E12D83.png" manifest:media-type="image/png"/>
  <manifest:file-entry manifest:full-path="Pictures/1000020100000286000002FDAEC64F6F04BC2903.png" manifest:media-type="image/png"/>
  <manifest:file-entry manifest:full-path="Pictures/1000020100000238000002D6F2457AC8C9CB91B0.png" manifest:media-type="image/png"/>
  <manifest:file-entry manifest:full-path="Pictures/100002010000034C000001C130BEA01337E0F356.png" manifest:media-type="image/png"/>
  <manifest:file-entry manifest:full-path="Pictures/10000201000004B40000036784974C0A1722C2FF.png" manifest:media-type="image/png"/>
  <manifest:file-entry manifest:full-path="Pictures/10000201000002440000034E2EC5E89D19C2E7B0.png" manifest:media-type="image/png"/>
  <manifest:file-entry manifest:full-path="Pictures/100002010000025F0000028677B0215C186861AA.png" manifest:media-type="image/png"/>
  <manifest:file-entry manifest:full-path="Pictures/10000201000003C4000002D6673560290FD932AB.png" manifest:media-type="image/png"/>
  <manifest:file-entry manifest:full-path="Pictures/10000201000002360000039E39EF17ED20F2F858.png" manifest:media-type="image/png"/>
  <manifest:file-entry manifest:full-path="Pictures/10000201000001E6000002863A0ED87E49DA53E0.png" manifest:media-type="image/png"/>
  <manifest:file-entry manifest:full-path="Pictures/100002010000025F0000025E59FB719AED0770E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35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.35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35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eeeee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eedd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9" style:family="text">
      <style:text-properties fo:font-variant="normal" fo:text-transform="none" fo:color="#eeeeee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2" style:family="text">
      <style:text-properties fo:font-variant="normal" fo:text-transform="none" fo:color="#11dd11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3" style:family="text">
      <style:text-properties fo:font-variant="normal" fo:text-transform="none" fo:color="#11dd11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" style:family="text">
      <style:text-properties fo:font-variant="normal" fo:text-transform="none" fo:color="#ff4455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" style:family="text">
      <style:text-properties fo:font-variant="normal" fo:text-transform="none" fo:color="#ff4455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6" style:family="text">
      <style:text-properties fo:font-variant="normal" fo:text-transform="none" fo:color="#eedd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7" style:family="text">
      <style:text-properties fo:font-variant="normal" fo:text-transform="none" fo:color="#11dd1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ff4455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eeeee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0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eedd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mplementation Pattern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he high-level design of system component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TITLE_5f_AND_5f_BODY" presentation:presentation-page-layout-name="AL2T1">
        <draw:frame draw:name="Google Shape;60;p14" presentation:style-name="pr4" draw:text-style-name="P7" draw:layer="layout" svg:width="22.144cm" svg:height="9.989cm" svg:x="1.628cm" svg:y="3.12cm" presentation:class="outline" presentation:user-transformed="true">
          <draw:text-box>
            <text:p text:style-name="P5"><text:span text:style-name="T3">Several patterns are found inside system components:</text:span></text:p>
            <text:list text:style-name="L4">
              <text:list-item>
                <text:p text:style-name="P5"><text:span text:style-name="T4">Plugins</text:span><text:span text:style-name="T3"> customize the component’s behavior.</text:span></text:p>
              </text:list-item>
              <text:list-item>
                <text:p text:style-name="P5"><text:span text:style-name="T4">Hexagonal Architecture</text:span><text:span text:style-name="T3"> isolates the business logic from external dependencies.</text:span></text:p>
              </text:list-item>
              <text:list-item>
                <text:p text:style-name="P5"><text:span text:style-name="T4">Microkernel</text:span><text:span text:style-name="T5"> </text:span><text:span text:style-name="T3">mediates between resource providers and resource consumers.</text:span></text:p>
              </text:list-item>
              <text:list-item>
                <text:p text:style-name="P6"><text:span text:style-name="T4">Mesh</text:span><text:span text:style-name="T3"> maintains a decentralized system.</text:span></text:p>
              </text:list-item>
            </text:list>
          </draw:text-box>
        </draw:frame>
        <draw:frame draw:name="Google Shape;61;p1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Contents</text:span></text:p>
          </draw:text-box>
        </draw:frame>
        <presentation:notes draw:style-name="dp2">
          <draw:page-thumbnail draw:name="Google Shape;57;g36fa2bd9aed_0_190:notes" draw:style-name="gr1" draw:layer="layout" svg:width="16.932cm" svg:height="9.524cm" svg:x="1.059cm" svg:y="1.905cm" draw:page-number="2" presentation:class="page"/>
          <draw:frame draw:name="Google Shape;58;g36fa2bd9aed_0_19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ystem of coordinates" draw:style-name="dp1" draw:master-page-name="TITLE_5f_AND_5f_BODY" presentation:presentation-page-layout-name="AL2T1">
        <draw:frame draw:name="Google Shape;66;p15" presentation:style-name="pr4" draw:text-style-name="P7" draw:layer="layout" svg:width="8.412cm" svg:height="8.331cm" svg:x="1.742cm" svg:y="3.233cm" presentation:class="outline" presentation:user-transformed="true">
          <draw:text-box>
            <text:p text:style-name="P9"><text:span text:style-name="T7">All architectures are color-coded and drawn in the same system of coordinates</text:span></text:p>
          </draw:text-box>
        </draw:frame>
        <draw:frame draw:name="Google Shape;67;p1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The system of coordinates</text:span></text:p>
          </draw:text-box>
        </draw:frame>
        <draw:frame draw:name="Google Shape;68;p15" draw:style-name="gr2" draw:text-style-name="P10" draw:layer="layout" svg:width="12.785cm" svg:height="9.248cm" svg:x="11.749cm" svg:y="3.91cm">
          <draw:image xlink:href="Pictures/10000201000004B40000036784974C0A1722C2FF.png" xlink:type="simple" xlink:show="embed" xlink:actuate="onLoad">
            <text:p/>
          </draw:image>
        </draw:frame>
        <presentation:notes draw:style-name="dp2">
          <draw:page-thumbnail draw:name="Google Shape;63;g39ecdd5df51_0_0:notes" draw:style-name="gr1" draw:layer="layout" svg:width="16.932cm" svg:height="9.524cm" svg:x="1.059cm" svg:y="1.905cm" draw:page-number="3" presentation:class="page"/>
          <draw:frame draw:name="Google Shape;64;g39ecdd5df51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" draw:style-name="dp1" draw:master-page-name="SECTION_5f_HEADER">
        <draw:frame draw:name="Google Shape;73;p16" presentation:style-name="pr8" draw:text-style-name="P11" draw:layer="layout" svg:width="23.667cm" svg:height="2.337cm" svg:x="0.866cm" svg:y="4.805cm" presentation:class="title" presentation:user-transformed="true">
          <draw:text-box>
            <text:p text:style-name="P1"><text:span text:style-name="T8">Plugins</text:span></text:p>
          </draw:text-box>
        </draw:frame>
        <draw:frame draw:name="Google Shape;74;p16" presentation:style-name="pr9" draw:text-style-name="P13" draw:layer="layout" svg:width="23.667cm" svg:height="2.201cm" svg:x="0.866cm" svg:y="7.144cm" presentation:class="subtitle" presentation:user-transformed="true">
          <draw:text-box>
            <text:p text:style-name="P12"><text:span text:style-name="T9">Customized behavior</text:span></text:p>
          </draw:text-box>
        </draw:frame>
        <presentation:notes draw:style-name="dp2">
          <draw:page-thumbnail draw:name="Google Shape;70;g3ace7d219c8_0_8:notes" draw:style-name="gr1" draw:layer="layout" svg:width="16.932cm" svg:height="9.524cm" svg:x="1.059cm" svg:y="1.905cm" draw:page-number="4" presentation:class="page"/>
          <draw:frame draw:name="Google Shape;71;g3ace7d219c8_0_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overview" draw:style-name="dp1" draw:master-page-name="TITLE_5f_AND_5f_BODY" presentation:presentation-page-layout-name="AL2T1">
        <draw:frame draw:name="Google Shape;79;p1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lugins – overview</text:span></text:p>
          </draw:text-box>
        </draw:frame>
        <draw:frame draw:name="Google Shape;80;p17" presentation:style-name="pr11" draw:text-style-name="P7" draw:layer="layout" svg:width="16.663cm" svg:height="6.991cm" svg:x="7.869cm" svg:y="3.201cm" presentation:class="outline" presentation:user-transformed="true">
          <draw:text-box>
            <text:p text:style-name="P14"><text:span text:style-name="T10">If you need your component to be customizable, you have it support </text:span><text:span text:style-name="T11">plugins</text:span><text:span text:style-name="T10"> – replaceable subcomponents that define key aspects of your </text:span><text:span text:style-name="T11">core</text:span><text:span text:style-name="T10"> behavior.</text:span></text:p>
            <text:p text:style-name="P15"><text:span text:style-name="T11">Plugins</text:span><text:span text:style-name="T10"> is a loosely defined pattern with many variations.</text:span></text:p>
          </draw:text-box>
        </draw:frame>
        <draw:frame draw:name="Google Shape;81;p17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6"><text:span text:style-name="T12">Plugins</text:span><text:span text:style-name="T13"> power product lines and frameworks.</text:span></text:p>
            <text:p text:style-name="P17"><text:span text:style-name="T14">Heavy use of </text:span><text:span text:style-name="T15">plugins</text:span><text:span text:style-name="T14"> may degrade performance.</text:span></text:p>
          </draw:text-box>
        </draw:frame>
        <draw:custom-shape draw:name="Google Shape;82;p17" draw:style-name="gr3" draw:text-style-name="P18" draw:layer="layout" svg:width="5.044cm" svg:height="1.271cm" svg:x="1.486cm" svg:y="9.289cm">
          <text:p text:style-name="P1"><text:span text:style-name="T16">Plug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7" draw:style-name="gr2" draw:text-style-name="P10" draw:layer="layout" svg:width="4.086cm" svg:height="5.432cm" svg:x="1.965cm" svg:y="3.601cm">
          <draw:image xlink:href="Pictures/10000201000001E6000002863A0ED87E49DA53E0.png" xlink:type="simple" xlink:show="embed" xlink:actuate="onLoad">
            <text:p/>
          </draw:image>
        </draw:frame>
        <presentation:notes draw:style-name="dp2">
          <draw:page-thumbnail draw:name="Google Shape;76;g3acdfc7e991_0_20:notes" draw:style-name="gr1" draw:layer="layout" svg:width="16.932cm" svg:height="9.524cm" svg:x="1.059cm" svg:y="1.905cm" draw:page-number="5" presentation:class="page"/>
          <draw:frame draw:name="Google Shape;77;g3acdfc7e991_0_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trade-offs" draw:style-name="dp1" draw:master-page-name="TITLE_5f_AND_5f_TWO_5f_COLUMNS" presentation:presentation-page-layout-name="AL3T3">
        <draw:frame draw:name="Google Shape;88;p18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lugins – trade-offs</text:span></text:p>
          </draw:text-box>
        </draw:frame>
        <draw:frame draw:name="Google Shape;89;p18" presentation:style-name="pr14" draw:text-style-name="P18" draw:layer="layout" svg:width="11.11cm" svg:height="9.061cm" svg:x="0.866cm" svg:y="3.201cm" presentation:class="outline" presentation:user-transformed="true">
          <draw:text-box>
            <text:p text:style-name="P19"><text:span text:style-name="T17">Select aspects of your system’s behavior become customizable</text:span></text:p>
            <text:p text:style-name="P20"><text:span text:style-name="T17">Sometimes the custom behavior can be defined in a high-level DSL</text:span></text:p>
            <text:p text:style-name="P15"><text:span text:style-name="T17">Plugins may employ platform-specific optimizations</text:span></text:p>
          </draw:text-box>
        </draw:frame>
        <draw:frame draw:name="Google Shape;90;p18" presentation:style-name="pr15" draw:text-style-name="P18" draw:layer="layout" svg:width="11.457cm" svg:height="9.061cm" svg:x="13.076cm" svg:y="3.201cm" presentation:class="outline" presentation:user-transformed="true">
          <draw:text-box>
            <text:p text:style-name="P19"><text:span text:style-name="T18">It’s hard to deduce good plugin APIs</text:span></text:p>
            <text:p text:style-name="P20"><text:span text:style-name="T18">Plugins impede whole-system performance optimization</text:span></text:p>
            <text:p text:style-name="P15"><text:span text:style-name="T18">Testability is poor as there are too many possible configurations</text:span></text:p>
          </draw:text-box>
        </draw:frame>
        <presentation:notes draw:style-name="dp2">
          <draw:page-thumbnail draw:name="Google Shape;85;g3acdfc7e991_0_28:notes" draw:style-name="gr1" draw:layer="layout" svg:width="16.932cm" svg:height="9.524cm" svg:x="1.059cm" svg:y="1.905cm" draw:page-number="6" presentation:class="page"/>
          <draw:frame draw:name="Google Shape;86;g3acdfc7e991_0_2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integration" draw:style-name="dp1" draw:master-page-name="TITLE_5f_AND_5f_BODY" presentation:presentation-page-layout-name="AL2T1">
        <draw:frame draw:name="Google Shape;95;p19" presentation:style-name="pr17" draw:text-style-name="P7" draw:layer="layout" svg:width="23.667cm" svg:height="10.172cm" svg:x="0.866cm" svg:y="3.201cm" presentation:class="outline" presentation:user-transformed="true">
          <draw:text-box>
            <text:p text:style-name="P19"><text:span text:style-name="T11">Plugins</text:span><text:span text:style-name="T10"> may involve components that use the system or are used by it:</text:span></text:p>
            <text:list text:style-name="L11">
              <text:list-item>
                <text:p text:style-name="P20"><text:span text:style-name="T10">True </text:span><text:span text:style-name="T11">Plugins</text:span><text:span text:style-name="T10"> are registered with the system’s </text:span><text:span text:style-name="T11">core</text:span><text:span text:style-name="T10"> and are called by the </text:span><text:span text:style-name="T11">core</text:span><text:span text:style-name="T10">. Each plugin has a single function in the system and is usually a third party product.</text:span></text:p>
              </text:list-item>
              <text:list-item>
                <text:p text:style-name="P19"><text:span text:style-name="T11">Add-ins</text:span><text:span text:style-name="T10"> come from the component’s authors and have access to its internals. They are like optional but deeply integrated modules that often feature business logic.</text:span></text:p>
              </text:list-item>
              <text:list-item>
                <text:p text:style-name="P19"><text:span text:style-name="T11">Extensions</text:span><text:span text:style-name="T10"> modify business logic by changing existing or adding new use cases but are still called and managed by the </text:span><text:span text:style-name="T11">core</text:span><text:span text:style-name="T10">.</text:span></text:p>
              </text:list-item>
              <text:list-item>
                <text:p text:style-name="P21"><text:span text:style-name="T11">Addons</text:span><text:span text:style-name="T10"> build a layer of indirection on top of the system’s public API.</text:span></text:p>
              </text:list-item>
            </text:list>
          </draw:text-box>
        </draw:frame>
        <draw:frame draw:name="Google Shape;96;p1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lugins – integration</text:span></text:p>
          </draw:text-box>
        </draw:frame>
        <presentation:notes draw:style-name="dp2">
          <draw:page-thumbnail draw:name="Google Shape;92;g3b16c6db887_0_1:notes" draw:style-name="gr1" draw:layer="layout" svg:width="16.932cm" svg:height="9.524cm" svg:x="1.059cm" svg:y="1.905cm" draw:page-number="7" presentation:class="page"/>
          <draw:frame draw:name="Google Shape;93;g3b16c6db887_0_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abstractness" draw:style-name="dp1" draw:master-page-name="TITLE_5f_AND_5f_BODY" presentation:presentation-page-layout-name="AL2T1">
        <draw:frame draw:name="Google Shape;101;p20" presentation:style-name="pr17" draw:text-style-name="P7" draw:layer="layout" svg:width="23.667cm" svg:height="10.04cm" svg:x="0.866cm" svg:y="3.201cm" presentation:class="outline" presentation:user-transformed="true">
          <draw:text-box>
            <text:p text:style-name="P19"><text:span text:style-name="T11">Plugins</text:span><text:span text:style-name="T10"> may be more or less abstract than the system’s </text:span><text:span text:style-name="T11">core</text:span><text:span text:style-name="T10">:</text:span></text:p>
            <text:list text:style-name="L11">
              <text:list-item>
                <text:p text:style-name="P20"><text:span text:style-name="T10">High-level </text:span><text:span text:style-name="T11">plugins</text:span><text:span text:style-name="T10"> or </text:span><text:span text:style-name="T11">addons</text:span><text:span text:style-name="T10"> customize user experience or collect metadata. They may run independently and use the system’s API.</text:span></text:p>
              </text:list-item>
              <text:list-item>
                <text:p text:style-name="P19"><text:span text:style-name="T10">Low-level </text:span><text:span text:style-name="T11">plugins</text:span><text:span text:style-name="T10"> encapsulate algorithms, business rules, or hardware acceleration. They are called by the </text:span><text:span text:style-name="T11">core</text:span><text:span text:style-name="T10"> as a part of its workflow.</text:span></text:p>
              </text:list-item>
              <text:list-item>
                <text:p text:style-name="P21"><text:span text:style-name="T10">A customization may involve a set of both high- and low-level </text:span><text:span text:style-name="T11">plugins</text:span><text:span text:style-name="T10">.</text:span></text:p>
              </text:list-item>
            </text:list>
          </draw:text-box>
        </draw:frame>
        <draw:frame draw:name="Google Shape;102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lugins – abstractness</text:span></text:p>
          </draw:text-box>
        </draw:frame>
        <presentation:notes draw:style-name="dp2">
          <draw:page-thumbnail draw:name="Google Shape;98;g3b16c6db887_0_71:notes" draw:style-name="gr1" draw:layer="layout" svg:width="16.932cm" svg:height="9.524cm" svg:x="1.059cm" svg:y="1.905cm" draw:page-number="8" presentation:class="page"/>
          <draw:frame draw:name="Google Shape;99;g3b16c6db887_0_7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role" draw:style-name="dp1" draw:master-page-name="TITLE_5f_AND_5f_BODY" presentation:presentation-page-layout-name="AL2T1">
        <draw:frame draw:name="Google Shape;107;p21" presentation:style-name="pr17" draw:text-style-name="P7" draw:layer="layout" svg:width="23.667cm" svg:height="10.04cm" svg:x="0.866cm" svg:y="3.201cm" presentation:class="outline" presentation:user-transformed="true">
          <draw:text-box>
            <text:p text:style-name="P19"><text:span text:style-name="T10">A </text:span><text:span text:style-name="T11">plugin</text:span><text:span text:style-name="T10"> may:</text:span></text:p>
            <text:list text:style-name="L11">
              <text:list-item>
                <text:p text:style-name="P20"><text:span text:style-name="T10">Provide input from a UI widget or CLI connection to the </text:span><text:span text:style-name="T11">core</text:span><text:span text:style-name="T10">.</text:span></text:p>
              </text:list-item>
              <text:list-item>
                <text:p text:style-name="P19"><text:span text:style-name="T10">Collect output, such as statistics or logs, from the </text:span><text:span text:style-name="T11">core</text:span><text:span text:style-name="T10">.</text:span></text:p>
              </text:list-item>
              <text:list-item>
                <text:p text:style-name="P19"><text:span text:style-name="T10">Participate in both input and output. Health check belongs here.</text:span></text:p>
              </text:list-item>
              <text:list-item>
                <text:p text:style-name="P19"><text:span text:style-name="T10">Behave as a </text:span><text:span text:style-name="T11">Controller</text:span><text:span text:style-name="T10"> by receiving input from the </text:span><text:span text:style-name="T11">core</text:span><text:span text:style-name="T10"> and deciding on the further </text:span><text:span text:style-name="T11">core</text:span><text:span text:style-name="T10">’s actions.</text:span></text:p>
              </text:list-item>
              <text:list-item>
                <text:p text:style-name="P21"><text:span text:style-name="T10">Be a data processor for the </text:span><text:span text:style-name="T11">core</text:span><text:span text:style-name="T10"> by implementing a step of its main algorithm. Examples include codecs and the use of SIMD / DSP / cryptoprocessors.</text:span></text:p>
              </text:list-item>
            </text:list>
          </draw:text-box>
        </draw:frame>
        <draw:frame draw:name="Google Shape;108;p2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lugins – role</text:span></text:p>
          </draw:text-box>
        </draw:frame>
        <presentation:notes draw:style-name="dp2">
          <draw:page-thumbnail draw:name="Google Shape;104;g3b16c6db887_0_66:notes" draw:style-name="gr1" draw:layer="layout" svg:width="16.932cm" svg:height="9.524cm" svg:x="1.059cm" svg:y="1.905cm" draw:page-number="9" presentation:class="page"/>
          <draw:frame draw:name="Google Shape;105;g3b16c6db887_0_6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linkage" draw:style-name="dp1" draw:master-page-name="TITLE_5f_AND_5f_BODY" presentation:presentation-page-layout-name="AL2T1">
        <draw:frame draw:name="Google Shape;113;p22" presentation:style-name="pr17" draw:text-style-name="P7" draw:layer="layout" svg:width="23.667cm" svg:height="10.04cm" svg:x="0.866cm" svg:y="3.201cm" presentation:class="outline" presentation:user-transformed="true">
          <draw:text-box>
            <text:p text:style-name="P19"><text:span text:style-name="T11">Plugins</text:span><text:span text:style-name="T10"> may be selected at different stages:</text:span></text:p>
            <text:list text:style-name="L11">
              <text:list-item>
                <text:p text:style-name="P20"><text:span text:style-name="T11">Flavors</text:span><text:span text:style-name="T10"> are special builds of a software with functionality customized through different sets of </text:span><text:span text:style-name="T11">plugins</text:span><text:span text:style-name="T10">. A more functional </text:span><text:span text:style-name="T11">flavor</text:span><text:span text:style-name="T10"> is more expensive.</text:span></text:p>
              </text:list-item>
              <text:list-item>
                <text:p text:style-name="P19"><text:span text:style-name="T10">An application may choose </text:span><text:span text:style-name="T11">plugins</text:span><text:span text:style-name="T10"> at startup according to its configuration file.</text:span></text:p>
              </text:list-item>
              <text:list-item>
                <text:p text:style-name="P19"><text:span text:style-name="T10">Some software systems allow for changing </text:span><text:span text:style-name="T11">plugins</text:span><text:span text:style-name="T10"> at runtime.</text:span></text:p>
              </text:list-item>
            </text:list>
          </draw:text-box>
        </draw:frame>
        <draw:frame draw:name="Google Shape;114;p2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lugins – linkage</text:span></text:p>
          </draw:text-box>
        </draw:frame>
        <presentation:notes draw:style-name="dp2">
          <draw:page-thumbnail draw:name="Google Shape;110;g3b16c6db887_0_61:notes" draw:style-name="gr1" draw:layer="layout" svg:width="16.932cm" svg:height="9.524cm" svg:x="1.059cm" svg:y="1.905cm" draw:page-number="10" presentation:class="page"/>
          <draw:frame draw:name="Google Shape;111;g3b16c6db887_0_6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granularity" draw:style-name="dp1" draw:master-page-name="TITLE_5f_AND_5f_BODY" presentation:presentation-page-layout-name="AL2T1">
        <draw:frame draw:name="Google Shape;119;p23" presentation:style-name="pr17" draw:text-style-name="P7" draw:layer="layout" svg:width="23.667cm" svg:height="10.04cm" svg:x="0.866cm" svg:y="3.201cm" presentation:class="outline" presentation:user-transformed="true">
          <draw:text-box>
            <text:p text:style-name="P19"><text:span text:style-name="T10">A </text:span><text:span text:style-name="T11">plugin</text:span><text:span text:style-name="T10"> can be large or tiny:</text:span></text:p>
            <text:list text:style-name="L11">
              <text:list-item>
                <text:p text:style-name="P20"><text:span text:style-name="T10">A small function or class built into the application corresponds to the </text:span><text:span text:style-name="T11">Strategy</text:span><text:span text:style-name="T10"> pattern.</text:span></text:p>
              </text:list-item>
              <text:list-item>
                <text:p text:style-name="P19"><text:span text:style-name="T10">An </text:span><text:span text:style-name="T11">aspect</text:span><text:span text:style-name="T10"> implements some kind of pervasive functionality, such as logging.</text:span></text:p>
              </text:list-item>
              <text:list-item>
                <text:p text:style-name="P19"><text:span text:style-name="T10">An external component (library, application or remote service) may be used by the </text:span><text:span text:style-name="T11">core</text:span><text:span text:style-name="T10"> as a </text:span><text:span text:style-name="T11">plugin</text:span><text:span text:style-name="T10">.</text:span></text:p>
              </text:list-item>
            </text:list>
          </draw:text-box>
        </draw:frame>
        <draw:frame draw:name="Google Shape;120;p2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lugins – granularity</text:span></text:p>
          </draw:text-box>
        </draw:frame>
        <presentation:notes draw:style-name="dp2">
          <draw:page-thumbnail draw:name="Google Shape;116;g3b16c6db887_0_56:notes" draw:style-name="gr1" draw:layer="layout" svg:width="16.932cm" svg:height="9.524cm" svg:x="1.059cm" svg:y="1.905cm" draw:page-number="11" presentation:class="page"/>
          <draw:frame draw:name="Google Shape;117;g3b16c6db887_0_5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multiplicity" draw:style-name="dp1" draw:master-page-name="TITLE_5f_AND_5f_BODY" presentation:presentation-page-layout-name="AL2T1">
        <draw:frame draw:name="Google Shape;125;p24" presentation:style-name="pr17" draw:text-style-name="P7" draw:layer="layout" svg:width="23.667cm" svg:height="10.04cm" svg:x="0.866cm" svg:y="3.201cm" presentation:class="outline" presentation:user-transformed="true">
          <draw:text-box>
            <text:p text:style-name="P19"><text:span text:style-name="T10">A </text:span><text:span text:style-name="T11">plugin</text:span><text:span text:style-name="T10"> can be optional or mandatory:</text:span></text:p>
            <text:list text:style-name="L11">
              <text:list-item>
                <text:p text:style-name="P20"><text:span text:style-name="T10">A </text:span><text:span text:style-name="T11">mandatory</text:span><text:span text:style-name="T10"> </text:span><text:span text:style-name="T11">plugin</text:span><text:span text:style-name="T10">, such as an implementation of an algorithm or business rule, is required for the proper functioning of the core.</text:span></text:p>
              </text:list-item>
              <text:list-item>
                <text:p text:style-name="P19"><text:span text:style-name="T10">An </text:span><text:span text:style-name="T11">optional</text:span><text:span text:style-name="T10"> </text:span><text:span text:style-name="T11">plugin</text:span><text:span text:style-name="T10"> may be absent, in which case the core substitutes an empty or trivial implementation. This is common with logging or statistics.</text:span></text:p>
              </text:list-item>
              <text:list-item>
                <text:p text:style-name="P19"><text:span text:style-name="T10">It can also be </text:span><text:span text:style-name="T11">subscriptional</text:span><text:span text:style-name="T10">, in which case multiple instances of an </text:span><text:span text:style-name="T11">optional</text:span><text:span text:style-name="T10"> </text:span><text:span text:style-name="T11">plugin</text:span><text:span text:style-name="T10"> are allowed. This helps if you want your logs to be both saved to the local file system and sent over the network.</text:span></text:p>
              </text:list-item>
            </text:list>
          </draw:text-box>
        </draw:frame>
        <draw:frame draw:name="Google Shape;126;p2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lugins – multiplicity</text:span></text:p>
          </draw:text-box>
        </draw:frame>
        <presentation:notes draw:style-name="dp2">
          <draw:page-thumbnail draw:name="Google Shape;122;g3b16c6db887_0_51:notes" draw:style-name="gr1" draw:layer="layout" svg:width="16.932cm" svg:height="9.524cm" svg:x="1.059cm" svg:y="1.905cm" draw:page-number="12" presentation:class="page"/>
          <draw:frame draw:name="Google Shape;123;g3b16c6db887_0_5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 – execution" draw:style-name="dp1" draw:master-page-name="TITLE_5f_AND_5f_BODY" presentation:presentation-page-layout-name="AL2T1">
        <draw:frame draw:name="Google Shape;131;p25" presentation:style-name="pr17" draw:text-style-name="P7" draw:layer="layout" svg:width="23.667cm" svg:height="10.04cm" svg:x="0.866cm" svg:y="3.201cm" presentation:class="outline" presentation:user-transformed="true">
          <draw:text-box>
            <text:p text:style-name="P19"><text:span text:style-name="T10">A </text:span><text:span text:style-name="T11">plugin</text:span><text:span text:style-name="T10"> can be executed in a variety of ways:</text:span></text:p>
            <text:list text:style-name="L11">
              <text:list-item>
                <text:p text:style-name="P20"><text:span text:style-name="T10">It can be a selectable part of the </text:span><text:span text:style-name="T11">core</text:span><text:span text:style-name="T10">, or a statically or dynamically linked library.</text:span></text:p>
              </text:list-item>
              <text:list-item>
                <text:p text:style-name="P19"><text:span text:style-name="T10">It can be written in a </text:span><text:span text:style-name="T11">domain-specific language</text:span><text:span text:style-name="T10"> (</text:span><text:span text:style-name="T11">DSL</text:span><text:span text:style-name="T10">) which is interpreted or compiled by the </text:span><text:span text:style-name="T11">core</text:span><text:span text:style-name="T10">.</text:span></text:p>
              </text:list-item>
              <text:list-item>
                <text:p text:style-name="P19"><text:span text:style-name="T10">It can reside on a remote server or in a hardware device accessible via RPC or messaging.</text:span></text:p>
              </text:list-item>
            </text:list>
          </draw:text-box>
        </draw:frame>
        <draw:frame draw:name="Google Shape;132;p2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Plugins – execution</text:span></text:p>
          </draw:text-box>
        </draw:frame>
        <presentation:notes draw:style-name="dp2">
          <draw:page-thumbnail draw:name="Google Shape;128;g3b16c6db887_0_76:notes" draw:style-name="gr1" draw:layer="layout" svg:width="16.932cm" svg:height="9.524cm" svg:x="1.059cm" svg:y="1.905cm" draw:page-number="13" presentation:class="page"/>
          <draw:frame draw:name="Google Shape;129;g3b16c6db887_0_7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" draw:style-name="dp1" draw:master-page-name="SECTION_5f_HEADER">
        <draw:frame draw:name="Google Shape;137;p26" presentation:style-name="pr8" draw:text-style-name="P11" draw:layer="layout" svg:width="23.667cm" svg:height="2.337cm" svg:x="0.866cm" svg:y="4.805cm" presentation:class="title" presentation:user-transformed="true">
          <draw:text-box>
            <text:p text:style-name="P1"><text:span text:style-name="T8">Hexagonal Architecture</text:span></text:p>
          </draw:text-box>
        </draw:frame>
        <draw:frame draw:name="Google Shape;138;p26" presentation:style-name="pr9" draw:text-style-name="P13" draw:layer="layout" svg:width="23.667cm" svg:height="2.201cm" svg:x="0.866cm" svg:y="7.144cm" presentation:class="subtitle" presentation:user-transformed="true">
          <draw:text-box>
            <text:p text:style-name="P12"><text:span text:style-name="T9">Isolation from dependencies</text:span></text:p>
          </draw:text-box>
        </draw:frame>
        <presentation:notes draw:style-name="dp2">
          <draw:page-thumbnail draw:name="Google Shape;134;g3ad3d35e571_0_0:notes" draw:style-name="gr1" draw:layer="layout" svg:width="16.932cm" svg:height="9.524cm" svg:x="1.059cm" svg:y="1.905cm" draw:page-number="14" presentation:class="page"/>
          <draw:frame draw:name="Google Shape;135;g3ad3d35e571_0_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 – overview" draw:style-name="dp1" draw:master-page-name="TITLE_5f_AND_5f_BODY" presentation:presentation-page-layout-name="AL2T1">
        <draw:frame draw:name="Google Shape;143;p2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Hexagonal Architecture – overview</text:span></text:p>
          </draw:text-box>
        </draw:frame>
        <draw:frame draw:name="Google Shape;144;p27" presentation:style-name="pr11" draw:text-style-name="P7" draw:layer="layout" svg:width="15.564cm" svg:height="6.903cm" svg:x="8.048cm" svg:y="3.201cm" presentation:class="outline" presentation:user-transformed="true">
          <draw:text-box>
            <text:p text:style-name="P14"><text:span text:style-name="T11">Hexagonal Architecture</text:span><text:span text:style-name="T10"> is a variation of </text:span><text:span text:style-name="T11">Plugins</text:span><text:span text:style-name="T10"> designed to isolate business logic from dependencies on external components.</text:span></text:p>
            <text:p text:style-name="P15"><text:span text:style-name="T10">Anything not belonging to the </text:span><text:span text:style-name="T11">core</text:span><text:span text:style-name="T10"> logic is hidden behind an </text:span><text:span text:style-name="T11">adapter</text:span><text:span text:style-name="T10"> which translates between the SPI of the core and the API of the plugged-in component.</text:span></text:p>
          </draw:text-box>
        </draw:frame>
        <draw:frame draw:name="Google Shape;145;p27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6"><text:span text:style-name="T12">Hexagonal Architecture</text:span><text:span text:style-name="T13"> is mandatory for long-lived products.</text:span></text:p>
            <text:p text:style-name="P17"><text:span text:style-name="T14">It does not benefit small components or proofs of concept.</text:span></text:p>
          </draw:text-box>
        </draw:frame>
        <draw:custom-shape draw:name="Google Shape;146;p27" draw:style-name="gr3" draw:text-style-name="P18" draw:layer="layout" svg:width="7.314cm" svg:height="1.271cm" svg:x="0.753cm" svg:y="9.373cm">
          <text:p text:style-name="P1"><text:span text:style-name="T16">Hexagonal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7" draw:style-name="gr2" draw:text-style-name="P10" draw:layer="layout" svg:width="4.448cm" svg:height="5.746cm" svg:x="2.186cm" svg:y="3.625cm">
          <draw:image xlink:href="Pictures/1000020100000232000002D6DF77A539256BD9AC.png" xlink:type="simple" xlink:show="embed" xlink:actuate="onLoad">
            <text:p/>
          </draw:image>
        </draw:frame>
        <presentation:notes draw:style-name="dp2">
          <draw:page-thumbnail draw:name="Google Shape;140;g3ad3d35e571_0_5:notes" draw:style-name="gr1" draw:layer="layout" svg:width="16.932cm" svg:height="9.524cm" svg:x="1.059cm" svg:y="1.905cm" draw:page-number="15" presentation:class="page"/>
          <draw:frame draw:name="Google Shape;141;g3ad3d35e571_0_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 – trade-offs" draw:style-name="dp1" draw:master-page-name="TITLE_5f_AND_5f_TWO_5f_COLUMNS" presentation:presentation-page-layout-name="AL3T3">
        <draw:frame draw:name="Google Shape;152;p28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Hexagonal Architecture – trade-offs</text:span></text:p>
          </draw:text-box>
        </draw:frame>
        <draw:frame draw:name="Google Shape;153;p28" presentation:style-name="pr14" draw:text-style-name="P18" draw:layer="layout" svg:width="11.11cm" svg:height="9.061cm" svg:x="0.866cm" svg:y="3.201cm" presentation:class="outline" presentation:user-transformed="true">
          <draw:text-box>
            <text:p text:style-name="P19"><text:span text:style-name="T17">Protects the business logic from external influences</text:span></text:p>
            <text:p text:style-name="P20"><text:span text:style-name="T17">Protects business logic programmers from the need to learn technologies</text:span></text:p>
            <text:p text:style-name="P15"><text:span text:style-name="T17">Facilitates the use of stubs / mocks</text:span></text:p>
          </draw:text-box>
        </draw:frame>
        <draw:frame draw:name="Google Shape;154;p28" presentation:style-name="pr15" draw:text-style-name="P18" draw:layer="layout" svg:width="11.341cm" svg:height="9.061cm" svg:x="13.192cm" svg:y="3.201cm" presentation:class="outline" presentation:user-transformed="true">
          <draw:text-box>
            <text:p text:style-name="P19"><text:span text:style-name="T18">The performance is suboptimal</text:span></text:p>
            <text:p text:style-name="P15"><text:span text:style-name="T18">Extra APIs need to be designed and maintained</text:span></text:p>
          </draw:text-box>
        </draw:frame>
        <presentation:notes draw:style-name="dp2">
          <draw:page-thumbnail draw:name="Google Shape;149;g3ad3d35e571_0_13:notes" draw:style-name="gr1" draw:layer="layout" svg:width="16.932cm" svg:height="9.524cm" svg:x="1.059cm" svg:y="1.905cm" draw:page-number="16" presentation:class="page"/>
          <draw:frame draw:name="Google Shape;150;g3ad3d35e571_0_1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 – variants" draw:style-name="dp1" draw:master-page-name="TITLE_5f_AND_5f_BODY" presentation:presentation-page-layout-name="AL2T1">
        <draw:frame draw:name="Google Shape;159;p29" presentation:style-name="pr17" draw:text-style-name="P7" draw:layer="layout" svg:width="10.481cm" svg:height="9.156cm" svg:x="7.459cm" svg:y="3.356cm" presentation:class="outline" presentation:user-transformed="true">
          <draw:text-box>
            <text:p text:style-name="P19"><text:span text:style-name="T10">The true </text:span><text:span text:style-name="T11">Hexagonal Architecture</text:span><text:span text:style-name="T10"> isolates the application’s business logic from all its dependencies.</text:span></text:p>
            <text:p text:style-name="P15"><text:span text:style-name="T10">Its older sibling, </text:span><text:span text:style-name="T11">Separated Presentation</text:span><text:span text:style-name="T10">, decouples the core application from its user interface.</text:span></text:p>
          </draw:text-box>
        </draw:frame>
        <draw:custom-shape draw:name="Google Shape;160;p29" draw:style-name="gr3" draw:text-style-name="P18" draw:layer="layout" svg:width="4.494cm" svg:height="2.033cm" svg:x="18.964cm" svg:y="9.782cm">
          <text:p text:style-name="P1"><text:span text:style-name="T16">Separated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9" draw:style-name="gr3" draw:text-style-name="P18" draw:layer="layout" svg:width="4.807cm" svg:height="2.033cm" svg:x="1.523cm" svg:y="10.073cm">
          <text:p text:style-name="P1"><text:span text:style-name="T16">Hexagonal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Hexagonal Architecture – variants</text:span></text:p>
          </draw:text-box>
        </draw:frame>
        <draw:frame draw:name="Google Shape;163;p29" draw:style-name="gr2" draw:text-style-name="P10" draw:layer="layout" svg:width="4.849cm" svg:height="6.199cm" svg:x="1.502cm" svg:y="3.582cm">
          <draw:image xlink:href="Pictures/1000020100000238000002D6F2457AC8C9CB91B0.png" xlink:type="simple" xlink:show="embed" xlink:actuate="onLoad">
            <text:p/>
          </draw:image>
        </draw:frame>
        <draw:frame draw:name="Google Shape;164;p29" draw:style-name="gr2" draw:text-style-name="P10" draw:layer="layout" svg:width="4.849cm" svg:height="4.857cm" svg:x="18.786cm" svg:y="3.582cm">
          <draw:image xlink:href="Pictures/100002010000028600000287037642A698E8CD1F.png" xlink:type="simple" xlink:show="embed" xlink:actuate="onLoad">
            <text:p/>
          </draw:image>
        </draw:frame>
        <presentation:notes draw:style-name="dp2">
          <draw:page-thumbnail draw:name="Google Shape;156;g3b16c6db887_0_81:notes" draw:style-name="gr1" draw:layer="layout" svg:width="16.932cm" svg:height="9.524cm" svg:x="1.059cm" svg:y="1.905cm" draw:page-number="17" presentation:class="page"/>
          <draw:frame draw:name="Google Shape;157;g3b16c6db887_0_8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 – examples" draw:style-name="dp1" draw:master-page-name="TITLE_5f_AND_5f_BODY" presentation:presentation-page-layout-name="AL2T1">
        <draw:frame draw:name="Google Shape;169;p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Hexagonal Architecture – examples</text:span></text:p>
          </draw:text-box>
        </draw:frame>
        <draw:frame draw:name="Google Shape;170;p30" presentation:style-name="pr11" draw:text-style-name="P7" draw:layer="layout" svg:width="15.647cm" svg:height="10.272cm" svg:x="8.579cm" svg:y="3.201cm" presentation:class="outline" presentation:user-transformed="true">
          <draw:text-box>
            <text:p text:style-name="P14"><text:span text:style-name="T11">Ports and Adapters</text:span><text:span text:style-name="T10"> is the original </text:span><text:span text:style-name="T11">Hexagonal Architecture</text:span><text:span text:style-name="T10">. It inserts </text:span><text:span text:style-name="T11">adapters</text:span><text:span text:style-name="T10"> between the business logic </text:span><text:span text:style-name="T11">core</text:span><text:span text:style-name="T10"> and any </text:span><text:span text:style-name="T11">external components</text:span><text:span text:style-name="T10">, such as third party services, libraries or databases.</text:span></text:p>
            <text:p text:style-name="P20"><text:span text:style-name="T10">If the interface of an external component changes, or even the whole component needs to be replaced by an incompatible one from another vendor, its </text:span><text:span text:style-name="T11">adapter</text:span><text:span text:style-name="T10"> absorbs the change, leaving the business logic intact.</text:span></text:p>
            <text:p text:style-name="P20"><text:span text:style-name="T10">As the result, the business logic lives on its own terms, while anything outside of it is dispensable.</text:span></text:p>
            <text:p text:style-name="P15"><text:span text:style-name="T10"/></text:p>
          </draw:text-box>
        </draw:frame>
        <draw:custom-shape draw:name="Google Shape;171;p30" draw:style-name="gr3" draw:text-style-name="P18" draw:layer="layout" svg:width="6.285cm" svg:height="2.795cm" svg:x="1.185cm" svg:y="10.222cm">
          <text:p text:style-name="P1"><text:span text:style-name="T16">Ports and Adapters, Hexagonal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30" draw:style-name="gr2" draw:text-style-name="P10" draw:layer="layout" svg:width="5.07cm" svg:height="6.481cm" svg:x="1.793cm" svg:y="3.624cm">
          <draw:image xlink:href="Pictures/1000020100000238000002D6F2457AC8C9CB91B0.png" xlink:type="simple" xlink:show="embed" xlink:actuate="onLoad">
            <text:p/>
          </draw:image>
        </draw:frame>
        <presentation:notes draw:style-name="dp2">
          <draw:page-thumbnail draw:name="Google Shape;166;g3ad3d35e571_0_100:notes" draw:style-name="gr1" draw:layer="layout" svg:width="16.932cm" svg:height="9.524cm" svg:x="1.059cm" svg:y="1.905cm" draw:page-number="18" presentation:class="page"/>
          <draw:frame draw:name="Google Shape;167;g3ad3d35e571_0_10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gonal Architecture – examples" draw:style-name="dp1" draw:master-page-name="TITLE_5f_AND_5f_BODY" presentation:presentation-page-layout-name="AL2T1">
        <draw:frame draw:name="Google Shape;177;p3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Hexagonal Architecture – examples</text:span></text:p>
          </draw:text-box>
        </draw:frame>
        <draw:frame draw:name="Google Shape;178;p31" presentation:style-name="pr11" draw:text-style-name="P7" draw:layer="layout" svg:width="15.681cm" svg:height="8.513cm" svg:x="8.546cm" svg:y="3.201cm" presentation:class="outline" presentation:user-transformed="true">
          <draw:text-box>
            <text:p text:style-name="P14"><text:span text:style-name="T11">Onion Architecture</text:span><text:span text:style-name="T10"> delves into the structure of the </text:span><text:span text:style-name="T11">Hexagonal Architecture</text:span><text:span text:style-name="T10">’s </text:span><text:span text:style-name="T11">core</text:span><text:span text:style-name="T10">, dividing it into </text:span><text:span text:style-name="T11">Layers</text:span><text:span text:style-name="T10"> by the canons of </text:span><text:span text:style-name="T11">Domain-Driven Design</text:span><text:span text:style-name="T10">.</text:span></text:p>
            <text:p text:style-name="P15"><text:span text:style-name="T11">Clean Architecture</text:span><text:span text:style-name="T10"> is a later generalization or redesign of </text:span><text:span text:style-name="T11">Onion Architecture</text:span><text:span text:style-name="T10">.</text:span></text:p>
          </draw:text-box>
        </draw:frame>
        <draw:custom-shape draw:name="Google Shape;179;p31" draw:style-name="gr3" draw:text-style-name="P18" draw:layer="layout" svg:width="6.797cm" svg:height="2.033cm" svg:x="0.984cm" svg:y="10.189cm">
          <text:p text:style-name="P1"><text:span text:style-name="T16">Onion Architecture,</text:span></text:p>
          <text:p text:style-name="P1"><text:span text:style-name="T16">Clea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1" draw:style-name="gr2" draw:text-style-name="P10" draw:layer="layout" svg:width="4.474cm" svg:height="6.527cm" svg:x="2.146cm" svg:y="3.559cm">
          <draw:image xlink:href="Pictures/10000201000002440000034E2EC5E89D19C2E7B0.png" xlink:type="simple" xlink:show="embed" xlink:actuate="onLoad">
            <text:p/>
          </draw:image>
        </draw:frame>
        <presentation:notes draw:style-name="dp2">
          <draw:page-thumbnail draw:name="Google Shape;174;g3b16c6db887_0_135:notes" draw:style-name="gr1" draw:layer="layout" svg:width="16.932cm" svg:height="9.524cm" svg:x="1.059cm" svg:y="1.905cm" draw:page-number="19" presentation:class="page"/>
          <draw:frame draw:name="Google Shape;175;g3b16c6db887_0_13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parated Presentation – examples" draw:style-name="dp1" draw:master-page-name="TITLE_5f_AND_5f_BODY" presentation:presentation-page-layout-name="AL2T1">
        <draw:frame draw:name="Google Shape;185;p3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parated Presentation – examples</text:span></text:p>
          </draw:text-box>
        </draw:frame>
        <draw:frame draw:name="Google Shape;186;p32" presentation:style-name="pr11" draw:text-style-name="P7" draw:layer="layout" svg:width="15.988cm" svg:height="8.513cm" svg:x="8.546cm" svg:y="3.201cm" presentation:class="outline" presentation:user-transformed="true">
          <draw:text-box>
            <text:p text:style-name="P14"><text:span text:style-name="T11">Model-View-Presenter</text:span><text:span text:style-name="T10"> (</text:span><text:span text:style-name="T11">MVP</text:span><text:span text:style-name="T10">) and the related </text:span><text:span text:style-name="T11">MVA</text:span><text:span text:style-name="T10">, </text:span><text:span text:style-name="T11">MVVM</text:span><text:span text:style-name="T10">, </text:span><text:span text:style-name="T11">Model 1</text:span><text:span text:style-name="T10">, and </text:span><text:span text:style-name="T11">Document-View</text:span><text:span text:style-name="T10"> insert one or two layers of indirection between the main application, called </text:span><text:span text:style-name="T11">model</text:span><text:span text:style-name="T10">, and its user interface, usually built with an OS GUI or a web framework.</text:span></text:p>
            <text:p text:style-name="P15"><text:span text:style-name="T10">The indirection allows for replacing or editing the UI without affecting the core, supporting cross-platform development and look and feel upgrades.</text:span></text:p>
          </draw:text-box>
        </draw:frame>
        <draw:custom-shape draw:name="Google Shape;187;p32" draw:style-name="gr3" draw:text-style-name="P18" draw:layer="layout" svg:width="7.045cm" svg:height="1.271cm" svg:x="0.9cm" svg:y="10.433cm">
          <text:p text:style-name="P1"><text:span text:style-name="T16">Model-View-Pres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2" draw:style-name="gr2" draw:text-style-name="P10" draw:layer="layout" svg:width="5.613cm" svg:height="6.647cm" svg:x="1.617cm" svg:y="3.674cm">
          <draw:image xlink:href="Pictures/1000020100000286000002FDAEC64F6F04BC2903.png" xlink:type="simple" xlink:show="embed" xlink:actuate="onLoad">
            <text:p/>
          </draw:image>
        </draw:frame>
        <presentation:notes draw:style-name="dp2">
          <draw:page-thumbnail draw:name="Google Shape;182;g3b0ad707ea8_0_122:notes" draw:style-name="gr1" draw:layer="layout" svg:width="16.932cm" svg:height="9.524cm" svg:x="1.059cm" svg:y="1.905cm" draw:page-number="20" presentation:class="page"/>
          <draw:frame draw:name="Google Shape;183;g3b0ad707ea8_0_122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parated Presentation – examples" draw:style-name="dp1" draw:master-page-name="TITLE_5f_AND_5f_BODY" presentation:presentation-page-layout-name="AL2T1">
        <draw:frame draw:name="Google Shape;193;p3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Separated Presentation – examples</text:span></text:p>
          </draw:text-box>
        </draw:frame>
        <draw:frame draw:name="Google Shape;194;p33" presentation:style-name="pr11" draw:text-style-name="P7" draw:layer="layout" svg:width="15.988cm" svg:height="8.513cm" svg:x="8.546cm" svg:y="3.201cm" presentation:class="outline" presentation:user-transformed="true">
          <draw:text-box>
            <text:p text:style-name="P14"><text:span text:style-name="T11">Model-View-Controller</text:span><text:span text:style-name="T10"> (</text:span><text:span text:style-name="T11">MVC</text:span><text:span text:style-name="T10">) and the related </text:span><text:span text:style-name="T11">ADR</text:span><text:span text:style-name="T10">, </text:span><text:span text:style-name="T11">RMR</text:span><text:span text:style-name="T10">, and </text:span><text:span text:style-name="T11">Model 2</text:span><text:span text:style-name="T10"> separate the model’s input from its output. These patterns process raw mouse clicks (or HTTP requests) and draw home-made windows (or send XML responses).</text:span></text:p>
            <text:p text:style-name="P15"><text:span text:style-name="T10">This makes sense when well-established GUI or web frameworks are unavailable or don’t match the system’s requirements.</text:span></text:p>
          </draw:text-box>
        </draw:frame>
        <draw:custom-shape draw:name="Google Shape;195;p33" draw:style-name="gr3" draw:text-style-name="P18" draw:layer="layout" svg:width="7.045cm" svg:height="1.271cm" svg:x="0.919cm" svg:y="9.442cm">
          <text:p text:style-name="P1"><text:span text:style-name="T16">Model-View-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33" draw:style-name="gr2" draw:text-style-name="P10" draw:layer="layout" svg:width="5.651cm" svg:height="5.659cm" svg:x="1.617cm" svg:y="3.665cm">
          <draw:image xlink:href="Pictures/100002010000028600000287037642A698E8CD1F.png" xlink:type="simple" xlink:show="embed" xlink:actuate="onLoad">
            <text:p/>
          </draw:image>
        </draw:frame>
        <presentation:notes draw:style-name="dp2">
          <draw:page-thumbnail draw:name="Google Shape;190;g3b16c6db887_0_141:notes" draw:style-name="gr1" draw:layer="layout" svg:width="16.932cm" svg:height="9.524cm" svg:x="1.059cm" svg:y="1.905cm" draw:page-number="21" presentation:class="page"/>
          <draw:frame draw:name="Google Shape;191;g3b16c6db887_0_141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" draw:style-name="dp1" draw:master-page-name="SECTION_5f_HEADER">
        <draw:frame draw:name="Google Shape;201;p34" presentation:style-name="pr8" draw:text-style-name="P11" draw:layer="layout" svg:width="23.667cm" svg:height="2.337cm" svg:x="0.866cm" svg:y="4.805cm" presentation:class="title" presentation:user-transformed="true">
          <draw:text-box>
            <text:p text:style-name="P1"><text:span text:style-name="T8">Microkernel</text:span></text:p>
          </draw:text-box>
        </draw:frame>
        <draw:frame draw:name="Google Shape;202;p34" presentation:style-name="pr9" draw:text-style-name="P13" draw:layer="layout" svg:width="23.667cm" svg:height="2.201cm" svg:x="0.866cm" svg:y="7.144cm" presentation:class="subtitle" presentation:user-transformed="true">
          <draw:text-box>
            <text:p text:style-name="P12"><text:span text:style-name="T9">Management of shared resources</text:span></text:p>
          </draw:text-box>
        </draw:frame>
        <presentation:notes draw:style-name="dp2">
          <draw:page-thumbnail draw:name="Google Shape;198;g3ad72b8a13e_0_0:notes" draw:style-name="gr1" draw:layer="layout" svg:width="16.932cm" svg:height="9.524cm" svg:x="1.059cm" svg:y="1.905cm" draw:page-number="22" presentation:class="page"/>
          <draw:frame draw:name="Google Shape;199;g3ad72b8a13e_0_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overview" draw:style-name="dp1" draw:master-page-name="TITLE_5f_AND_5f_BODY" presentation:presentation-page-layout-name="AL2T1">
        <draw:frame draw:name="Google Shape;207;p3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icrokernel – overview</text:span></text:p>
          </draw:text-box>
        </draw:frame>
        <draw:frame draw:name="Google Shape;208;p35" presentation:style-name="pr11" draw:text-style-name="P7" draw:layer="layout" svg:width="15.215cm" svg:height="6.903cm" svg:x="8.894cm" svg:y="3.201cm" presentation:class="outline" presentation:user-transformed="true">
          <draw:text-box>
            <text:p text:style-name="P14"><text:span text:style-name="T11">Microkernel</text:span><text:span text:style-name="T10"> is another variation of </text:span><text:span text:style-name="T11">Plugins</text:span><text:span text:style-name="T10"> with a rudimentary </text:span><text:span text:style-name="T11">core</text:span><text:span text:style-name="T10">, called </text:span><text:span text:style-name="T11">microkernel</text:span><text:span text:style-name="T10">, which mediates between </text:span><text:span text:style-name="T11">resource providers</text:span><text:span text:style-name="T10"> and </text:span><text:span text:style-name="T11">resource consumers </text:span><text:span text:style-name="T10">(applications).</text:span></text:p>
            <text:p text:style-name="P20"><text:span text:style-name="T10">The </text:span><text:span text:style-name="T11">microkernel</text:span><text:span text:style-name="T10"> is a </text:span><text:span text:style-name="T11">Middleware</text:span><text:span text:style-name="T10"> for the </text:span><text:span text:style-name="T11">applications</text:span><text:span text:style-name="T10"> and an </text:span><text:span text:style-name="T11">Orchestrator</text:span><text:span text:style-name="T10"> for the </text:span><text:span text:style-name="T11">resource providers</text:span><text:span text:style-name="T10">.</text:span></text:p>
            <text:p text:style-name="P15"><text:span text:style-name="T10"/></text:p>
          </draw:text-box>
        </draw:frame>
        <draw:frame draw:name="Google Shape;209;p35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6"><text:span text:style-name="T12">Microkernel</text:span><text:span text:style-name="T13"> is found in frameworks with complex behavior.</text:span></text:p>
            <text:p text:style-name="P17"><text:span text:style-name="T14">It is ill-suited if the </text:span><text:span text:style-name="T15">providers</text:span><text:span text:style-name="T14"> are coupled to each other.</text:span></text:p>
          </draw:text-box>
        </draw:frame>
        <draw:custom-shape draw:name="Google Shape;210;p35" draw:style-name="gr3" draw:text-style-name="P18" draw:layer="layout" svg:width="5.607cm" svg:height="1.271cm" svg:x="1.801cm" svg:y="9.641cm">
          <text:p text:style-name="P1"><text:span text:style-name="T16">Micro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5" draw:style-name="gr2" draw:text-style-name="P10" draw:layer="layout" svg:width="5.606cm" svg:height="5.967cm" svg:x="1.801cm" svg:y="3.716cm">
          <draw:image xlink:href="Pictures/100002010000025F0000028677B0215C186861AA.png" xlink:type="simple" xlink:show="embed" xlink:actuate="onLoad">
            <text:p/>
          </draw:image>
        </draw:frame>
        <presentation:notes draw:style-name="dp2">
          <draw:page-thumbnail draw:name="Google Shape;204;g3ad72b8a13e_0_5:notes" draw:style-name="gr1" draw:layer="layout" svg:width="16.932cm" svg:height="9.524cm" svg:x="1.059cm" svg:y="1.905cm" draw:page-number="23" presentation:class="page"/>
          <draw:frame draw:name="Google Shape;205;g3ad72b8a13e_0_5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trade-offs" draw:style-name="dp1" draw:master-page-name="TITLE_5f_AND_5f_TWO_5f_COLUMNS" presentation:presentation-page-layout-name="AL3T3">
        <draw:frame draw:name="Google Shape;216;p36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icrokernel – trade-offs</text:span></text:p>
          </draw:text-box>
        </draw:frame>
        <draw:frame draw:name="Google Shape;217;p36" presentation:style-name="pr14" draw:text-style-name="P18" draw:layer="layout" svg:width="11.11cm" svg:height="9.061cm" svg:x="0.866cm" svg:y="3.201cm" presentation:class="outline" presentation:user-transformed="true">
          <draw:text-box>
            <text:p text:style-name="P19"><text:span text:style-name="T17">Microkernel tackles system complexity by distributing it across multiple roles</text:span></text:p>
            <text:p text:style-name="P20"><text:span text:style-name="T17">Polymorphic components, often from unknown vendors, are supported</text:span></text:p>
            <text:p text:style-name="P15"><text:span text:style-name="T17">The applications are sandboxed and platform-agnostic</text:span></text:p>
          </draw:text-box>
        </draw:frame>
        <draw:frame draw:name="Google Shape;218;p36" presentation:style-name="pr15" draw:text-style-name="P18" draw:layer="layout" svg:width="11.11cm" svg:height="9.061cm" svg:x="13.423cm" svg:y="3.201cm" presentation:class="outline" presentation:user-transformed="true">
          <draw:text-box>
            <text:p text:style-name="P19"><text:span text:style-name="T18">Microkernel’s APIs and SPIs are hard to change after the initial release</text:span></text:p>
            <text:p text:style-name="P20"><text:span text:style-name="T18">Indirection degrades performance</text:span></text:p>
            <text:p text:style-name="P20"><text:span text:style-name="T18">The latency is unpredictable because of resource contention</text:span></text:p>
            <text:p text:style-name="P15"><text:span text:style-name="T18"/></text:p>
          </draw:text-box>
        </draw:frame>
        <presentation:notes draw:style-name="dp2">
          <draw:page-thumbnail draw:name="Google Shape;213;g3ad72b8a13e_0_13:notes" draw:style-name="gr1" draw:layer="layout" svg:width="16.932cm" svg:height="9.524cm" svg:x="1.059cm" svg:y="1.905cm" draw:page-number="24" presentation:class="page"/>
          <draw:frame draw:name="Google Shape;214;g3ad72b8a13e_0_13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23;p3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24;p37" presentation:style-name="pr11" draw:text-style-name="P7" draw:layer="layout" svg:width="13.357cm" svg:height="9.699cm" svg:x="10.77cm" svg:y="3.277cm" presentation:class="outline" presentation:user-transformed="true">
          <draw:text-box>
            <text:p text:style-name="P14"><text:span text:style-name="T10">This is the original inspiration for </text:span><text:span text:style-name="T11">Microkernel</text:span><text:span text:style-name="T10">.</text:span></text:p>
            <text:p text:style-name="P20"><text:span text:style-name="T10">Though not “micro-”, the kernel of an operating system is exactly this thing – it sandboxes user space applications and provides them access to system resources owned by </text:span><text:span text:style-name="T11">device drivers</text:span><text:span text:style-name="T10">.</text:span></text:p>
            <text:p text:style-name="P15"><text:span text:style-name="T10">Drivers for each kind of hardware devices are polymorphic towards the kernel, allowing it to support any combination of hardware components.</text:span></text:p>
          </draw:text-box>
        </draw:frame>
        <draw:custom-shape draw:name="Google Shape;225;p37" draw:style-name="gr3" draw:text-style-name="P18" draw:layer="layout" svg:width="7.488cm" svg:height="1.271cm" svg:x="1.166cm" svg:y="10.621cm">
          <text:p text:style-name="P1"><text:span text:style-name="T16">Operating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37" draw:style-name="gr2" draw:text-style-name="P10" draw:layer="layout" svg:width="8.257cm" svg:height="6.218cm" svg:x="1.643cm" svg:y="4.169cm">
          <draw:image xlink:href="Pictures/10000201000003C4000002D6673560290FD932AB.png" xlink:type="simple" xlink:show="embed" xlink:actuate="onLoad">
            <text:p/>
          </draw:image>
        </draw:frame>
        <presentation:notes draw:style-name="dp2">
          <draw:page-thumbnail draw:name="Google Shape;220;g3af9f17ed48_0_37:notes" draw:style-name="gr1" draw:layer="layout" svg:width="16.932cm" svg:height="9.524cm" svg:x="1.059cm" svg:y="1.905cm" draw:page-number="25" presentation:class="page"/>
          <draw:frame draw:name="Google Shape;221;g3af9f17ed48_0_37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31;p3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32;p38" presentation:style-name="pr11" draw:text-style-name="P7" draw:layer="layout" svg:width="13.341cm" svg:height="9.699cm" svg:x="10.786cm" svg:y="3.277cm" presentation:class="outline" presentation:user-transformed="true">
          <draw:text-box>
            <text:p text:style-name="P14"><text:span text:style-name="T10">Software frameworks often feature a </text:span><text:span text:style-name="T11">Facade</text:span><text:span text:style-name="T10"> which integrates the framework’s internals and provides a stable API to its clients, matching the role of microkernel.</text:span></text:p>
            <text:p text:style-name="P20"><text:span text:style-name="T10">In this case the functionality provided by the framework’s internal components is a kind of resource needed by the application.</text:span></text:p>
            <text:p text:style-name="P15"><text:span text:style-name="T19"/></text:p>
          </draw:text-box>
        </draw:frame>
        <draw:custom-shape draw:name="Google Shape;233;p38" draw:style-name="gr3" draw:text-style-name="P18" draw:layer="layout" svg:width="7.488cm" svg:height="1.271cm" svg:x="1.161cm" svg:y="10.504cm">
          <text:p text:style-name="P1"><text:span text:style-name="T16">Software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8" draw:style-name="gr2" draw:text-style-name="P10" draw:layer="layout" svg:width="6.051cm" svg:height="6.041cm" svg:x="1.88cm" svg:y="4.148cm">
          <draw:image xlink:href="Pictures/100002010000025F0000025E59FB719AED0770E5.png" xlink:type="simple" xlink:show="embed" xlink:actuate="onLoad">
            <text:p/>
          </draw:image>
        </draw:frame>
        <presentation:notes draw:style-name="dp2">
          <draw:page-thumbnail draw:name="Google Shape;228;g3b16c6db887_0_147:notes" draw:style-name="gr1" draw:layer="layout" svg:width="16.932cm" svg:height="9.524cm" svg:x="1.059cm" svg:y="1.905cm" draw:page-number="26" presentation:class="page"/>
          <draw:frame draw:name="Google Shape;229;g3b16c6db887_0_147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39;p3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40;p39" presentation:style-name="pr11" draw:text-style-name="P7" draw:layer="layout" svg:width="13.324cm" svg:height="9.699cm" svg:x="10.803cm" svg:y="3.277cm" presentation:class="outline" presentation:user-transformed="true">
          <draw:text-box>
            <text:p text:style-name="P14"><text:span text:style-name="T11">Virtualizers</text:span><text:span text:style-name="T10">, </text:span><text:span text:style-name="T11">Hypervisors</text:span><text:span text:style-name="T10">, and </text:span><text:span text:style-name="T11">Distributed Runtimes</text:span><text:span text:style-name="T10"> use the resources of underlying hardware to run guest applications.</text:span></text:p>
            <text:p text:style-name="P20"><text:span text:style-name="T10">A </text:span><text:span text:style-name="T11">Hypervisor</text:span><text:span text:style-name="T10"> runs on a single computer while a </text:span><text:span text:style-name="T11">Distributed Runtime</text:span><text:span text:style-name="T10">, such as common actor frameworks, distributes a client application over a pool of servers.</text:span></text:p>
            <text:p text:style-name="P15"><text:span text:style-name="T19"/></text:p>
          </draw:text-box>
        </draw:frame>
        <draw:custom-shape draw:name="Google Shape;241;p39" draw:style-name="gr3" draw:text-style-name="P18" draw:layer="layout" svg:width="7.488cm" svg:height="2.033cm" svg:x="1.581cm" svg:y="10.72cm">
          <text:p text:style-name="P1"><text:span text:style-name="T16">Virtualizer, </text:span></text:p>
          <text:p text:style-name="P1"><text:span text:style-name="T16">Distributed Run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39" draw:style-name="gr2" draw:text-style-name="P10" draw:layer="layout" svg:width="3.975cm" svg:height="6.827cm" svg:x="3.338cm" svg:y="3.658cm">
          <draw:image xlink:href="Pictures/10000201000001BE000002FE137FA8C7455D98ED.png" xlink:type="simple" xlink:show="embed" xlink:actuate="onLoad">
            <text:p/>
          </draw:image>
        </draw:frame>
        <presentation:notes draw:style-name="dp2">
          <draw:page-thumbnail draw:name="Google Shape;236;g3b16c6db887_0_177:notes" draw:style-name="gr1" draw:layer="layout" svg:width="16.932cm" svg:height="9.524cm" svg:x="1.059cm" svg:y="1.905cm" draw:page-number="27" presentation:class="page"/>
          <draw:frame draw:name="Google Shape;237;g3b16c6db887_0_177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47;p4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48;p40" presentation:style-name="pr11" draw:text-style-name="P7" draw:layer="layout" svg:width="13.357cm" svg:height="9.699cm" svg:x="10.77cm" svg:y="3.277cm" presentation:class="outline" presentation:user-transformed="true">
          <draw:text-box>
            <text:p text:style-name="P14"><text:span text:style-name="T10">An </text:span><text:span text:style-name="T11">Interpreter</text:span><text:span text:style-name="T10"> executes a client </text:span><text:span text:style-name="T11">script</text:span><text:span text:style-name="T10"> in a sandboxed environment with access to libraries and resources registered with the </text:span><text:span text:style-name="T11">Interpreter</text:span><text:span text:style-name="T10">.</text:span></text:p>
            <text:p text:style-name="P15"><text:span text:style-name="T19"/></text:p>
          </draw:text-box>
        </draw:frame>
        <draw:custom-shape draw:name="Google Shape;249;p40" draw:style-name="gr3" draw:text-style-name="P18" draw:layer="layout" svg:width="7.488cm" svg:height="1.271cm" svg:x="1.628cm" svg:y="9.857cm">
          <text:p text:style-name="P1"><text:span text:style-name="T16">Interpr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40" draw:style-name="gr2" draw:text-style-name="P10" draw:layer="layout" svg:width="5.881cm" svg:height="5.871cm" svg:x="2.432cm" svg:y="3.653cm">
          <draw:image xlink:href="Pictures/100002010000025F0000025E20BC8891B9B8879B.png" xlink:type="simple" xlink:show="embed" xlink:actuate="onLoad">
            <text:p/>
          </draw:image>
        </draw:frame>
        <presentation:notes draw:style-name="dp2">
          <draw:page-thumbnail draw:name="Google Shape;244;g3b16c6db887_0_171:notes" draw:style-name="gr1" draw:layer="layout" svg:width="16.932cm" svg:height="9.524cm" svg:x="1.059cm" svg:y="1.905cm" draw:page-number="28" presentation:class="page"/>
          <draw:frame draw:name="Google Shape;245;g3b16c6db887_0_171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55;p4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56;p41" presentation:style-name="pr11" draw:text-style-name="P7" draw:layer="layout" svg:width="13.357cm" svg:height="9.699cm" svg:x="10.77cm" svg:y="3.277cm" presentation:class="outline" presentation:user-transformed="true">
          <draw:text-box>
            <text:p text:style-name="P14"><text:span text:style-name="T10">A </text:span><text:span text:style-name="T11">Configurator</text:span><text:span text:style-name="T10"> is a short-lived component which runs once on the application’s startup. It’s task is to set up the application’s internal components in accordance to the instructions in the input </text:span><text:span text:style-name="T11">configuration file</text:span><text:span text:style-name="T10">.</text:span></text:p>
            <text:p text:style-name="P20"><text:span text:style-name="T10">Surprisingly, the </text:span><text:span text:style-name="T11">Configurator</text:span><text:span text:style-name="T10"> is an </text:span><text:span text:style-name="T11">Interpreter</text:span><text:span text:style-name="T10"> for the configuration file, and its creation of the software components is similar to initialization of library classes for use by a script.</text:span></text:p>
            <text:p text:style-name="P15"><text:span text:style-name="T19"/></text:p>
          </draw:text-box>
        </draw:frame>
        <draw:custom-shape draw:name="Google Shape;257;p41" draw:style-name="gr3" draw:text-style-name="P18" draw:layer="layout" svg:width="7.488cm" svg:height="1.271cm" svg:x="1.647cm" svg:y="10.919cm">
          <text:p text:style-name="P1"><text:span text:style-name="T16">Configu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41" draw:style-name="gr2" draw:text-style-name="P10" draw:layer="layout" svg:width="6.516cm" svg:height="6.896cm" svg:x="2.133cm" svg:y="3.64cm">
          <draw:image xlink:href="Pictures/10000201000002AE000002D66C1F289604020D65.png" xlink:type="simple" xlink:show="embed" xlink:actuate="onLoad">
            <text:p/>
          </draw:image>
        </draw:frame>
        <presentation:notes draw:style-name="dp2">
          <draw:page-thumbnail draw:name="Google Shape;252;g3b16c6db887_0_165:notes" draw:style-name="gr1" draw:layer="layout" svg:width="16.932cm" svg:height="9.524cm" svg:x="1.059cm" svg:y="1.905cm" draw:page-number="29" presentation:class="page"/>
          <draw:frame draw:name="Google Shape;253;g3b16c6db887_0_165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63;p4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64;p42" presentation:style-name="pr11" draw:text-style-name="P7" draw:layer="layout" svg:width="13.357cm" svg:height="9.699cm" svg:x="10.77cm" svg:y="3.277cm" presentation:class="outline" presentation:user-transformed="true">
          <draw:text-box>
            <text:p text:style-name="P14"><text:span text:style-name="T10">A </text:span><text:span text:style-name="T11">Saga Engine</text:span><text:span text:style-name="T10"> executes </text:span><text:span text:style-name="T11">Sagas</text:span><text:span text:style-name="T10"> to change states of multiple services in a consistent way. </text:span></text:p>
            <text:p text:style-name="P20"><text:span text:style-name="T10">The </text:span><text:span text:style-name="T11">Sagas</text:span><text:span text:style-name="T10"> are often written in a domain-specific language (DSL) which makes the </text:span><text:span text:style-name="T11">Saga Engine</text:span><text:span text:style-name="T10"> an </text:span><text:span text:style-name="T11">Interpreter</text:span><text:span text:style-name="T10">.</text:span></text:p>
            <text:p text:style-name="P15"><text:span text:style-name="T19"/></text:p>
          </draw:text-box>
        </draw:frame>
        <draw:custom-shape draw:name="Google Shape;265;p42" draw:style-name="gr3" draw:text-style-name="P18" draw:layer="layout" svg:width="7.488cm" svg:height="1.271cm" svg:x="1.676cm" svg:y="11.035cm">
          <text:p text:style-name="P1"><text:span text:style-name="T16">Saga 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42" draw:style-name="gr2" draw:text-style-name="P10" draw:layer="layout" svg:width="5.778cm" svg:height="6.9cm" svg:x="2.531cm" svg:y="3.599cm">
          <draw:image xlink:href="Pictures/1000020100000260000002D68C556EB31DBE6315.png" xlink:type="simple" xlink:show="embed" xlink:actuate="onLoad">
            <text:p/>
          </draw:image>
        </draw:frame>
        <presentation:notes draw:style-name="dp2">
          <draw:page-thumbnail draw:name="Google Shape;260;g3b16c6db887_0_159:notes" draw:style-name="gr1" draw:layer="layout" svg:width="16.932cm" svg:height="9.524cm" svg:x="1.059cm" svg:y="1.905cm" draw:page-number="30" presentation:class="page"/>
          <draw:frame draw:name="Google Shape;261;g3b16c6db887_0_159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kernel – examples" draw:style-name="dp1" draw:master-page-name="TITLE_5f_AND_5f_BODY" presentation:presentation-page-layout-name="AL2T1">
        <draw:frame draw:name="Google Shape;271;p4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icrokernel – examples</text:span></text:p>
          </draw:text-box>
        </draw:frame>
        <draw:frame draw:name="Google Shape;272;p43" presentation:style-name="pr11" draw:text-style-name="P7" draw:layer="layout" svg:width="12.427cm" svg:height="9.699cm" svg:x="11.699cm" svg:y="3.277cm" presentation:class="outline" presentation:user-transformed="true">
          <draw:text-box>
            <text:p text:style-name="P14"><text:span text:style-name="T11">AUTOSAR Classic</text:span><text:span text:style-name="T10">, the automotive standard, looks exactly like a </text:span><text:span text:style-name="T11">Microkernel</text:span><text:span text:style-name="T10">, though it was written and marketed as a </text:span><text:span text:style-name="T11">Service-Oriented Architecture</text:span><text:span text:style-name="T10"> (</text:span><text:span text:style-name="T11">SOA</text:span><text:span text:style-name="T10">).</text:span></text:p>
            <text:p text:style-name="P20"><text:span text:style-name="T10">There is a distributed </text:span><text:span text:style-name="T11">Virtual Functional Bus</text:span><text:span text:style-name="T10"> which connects all the car’s components together by allowing every </text:span><text:span text:style-name="T11">application</text:span><text:span text:style-name="T10"> to access any </text:span><text:span text:style-name="T11">service</text:span><text:span text:style-name="T10"> which may run on any of the hundreds chips present in a modern car.</text:span></text:p>
            <text:p text:style-name="P15"><text:span text:style-name="T19"/></text:p>
          </draw:text-box>
        </draw:frame>
        <draw:custom-shape draw:name="Google Shape;273;p43" draw:style-name="gr3" draw:text-style-name="P18" draw:layer="layout" svg:width="7.488cm" svg:height="1.271cm" svg:x="2.398cm" svg:y="10.654cm">
          <text:p text:style-name="P1"><text:span text:style-name="T16">AUTOSAR Clas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p43" draw:style-name="gr2" draw:text-style-name="P10" draw:layer="layout" svg:width="10.689cm" svg:height="5.039cm" svg:x="0.798cm" svg:y="5.188cm">
          <draw:image xlink:href="Pictures/10000201000007AC0000039E3ADAFDDDA50DF1C9.png" xlink:type="simple" xlink:show="embed" xlink:actuate="onLoad">
            <text:p/>
          </draw:image>
        </draw:frame>
        <presentation:notes draw:style-name="dp2">
          <draw:page-thumbnail draw:name="Google Shape;268;g3b16c6db887_0_153:notes" draw:style-name="gr1" draw:layer="layout" svg:width="16.932cm" svg:height="9.524cm" svg:x="1.059cm" svg:y="1.905cm" draw:page-number="31" presentation:class="page"/>
          <draw:frame draw:name="Google Shape;269;g3b16c6db887_0_153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" draw:style-name="dp1" draw:master-page-name="SECTION_5f_HEADER">
        <draw:frame draw:name="Google Shape;279;p44" presentation:style-name="pr8" draw:text-style-name="P11" draw:layer="layout" svg:width="23.667cm" svg:height="2.337cm" svg:x="0.866cm" svg:y="4.805cm" presentation:class="title" presentation:user-transformed="true">
          <draw:text-box>
            <text:p text:style-name="P1"><text:span text:style-name="T8">Mesh</text:span></text:p>
          </draw:text-box>
        </draw:frame>
        <draw:frame draw:name="Google Shape;280;p44" presentation:style-name="pr9" draw:text-style-name="P13" draw:layer="layout" svg:width="23.667cm" svg:height="2.201cm" svg:x="0.866cm" svg:y="7.144cm" presentation:class="subtitle" presentation:user-transformed="true">
          <draw:text-box>
            <text:p text:style-name="P12"><text:span text:style-name="T9">Decentralized communication</text:span></text:p>
          </draw:text-box>
        </draw:frame>
        <presentation:notes draw:style-name="dp2">
          <draw:page-thumbnail draw:name="Google Shape;276;g3ada4842c12_0_0:notes" draw:style-name="gr1" draw:layer="layout" svg:width="16.932cm" svg:height="9.524cm" svg:x="1.059cm" svg:y="1.905cm" draw:page-number="32" presentation:class="page"/>
          <draw:frame draw:name="Google Shape;277;g3ada4842c12_0_0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overview" draw:style-name="dp1" draw:master-page-name="TITLE_5f_AND_5f_BODY" presentation:presentation-page-layout-name="AL2T1">
        <draw:frame draw:name="Google Shape;285;p4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esh – overview</text:span></text:p>
          </draw:text-box>
        </draw:frame>
        <draw:frame draw:name="Google Shape;286;p45" presentation:style-name="pr11" draw:text-style-name="P7" draw:layer="layout" svg:width="15.225cm" svg:height="7.169cm" svg:x="9.309cm" svg:y="3.201cm" presentation:class="outline" presentation:user-transformed="true">
          <draw:text-box>
            <text:p text:style-name="P14"><text:span text:style-name="T10">A </text:span><text:span text:style-name="T11">Mesh</text:span><text:span text:style-name="T10"> or </text:span><text:span text:style-name="T11">Grid</text:span><text:span text:style-name="T10"> is a decentralized network. It is extremely fault-tolerant and elastic thanks to dynamic connectivity.</text:span></text:p>
            <text:p text:style-name="P15"><text:span text:style-name="T10">A </text:span><text:span text:style-name="T11">Mesh</text:span><text:span text:style-name="T10"> usually implements a virtual distributed </text:span><text:span text:style-name="T11">Middleware</text:span><text:span text:style-name="T10"> and/or </text:span><text:span text:style-name="T11">Shared Repository</text:span><text:span text:style-name="T10">.</text:span></text:p>
          </draw:text-box>
        </draw:frame>
        <draw:frame draw:name="Google Shape;287;p45" presentation:style-name="pr4" draw:text-style-name="P7" draw:layer="layout" svg:width="23.667cm" svg:height="3.001cm" svg:x="0.866cm" svg:y="10.572cm" presentation:class="outline" presentation:user-transformed="true">
          <draw:text-box>
            <text:p text:style-name="P16"><text:span text:style-name="T12">Mesh</text:span><text:span text:style-name="T13"> is perfect for dynamic scaling and high availability.</text:span></text:p>
            <text:p text:style-name="P17"><text:span text:style-name="T14">It does not work for low latency or security-critical systems.</text:span></text:p>
          </draw:text-box>
        </draw:frame>
        <draw:custom-shape draw:name="Google Shape;288;p45" draw:style-name="gr3" draw:text-style-name="P18" draw:layer="layout" svg:width="5.82cm" svg:height="1.271cm" svg:x="1.392cm" svg:y="8.028cm">
          <text:p text:style-name="P1"><text:span text:style-name="T16">M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5" draw:style-name="gr2" draw:text-style-name="P10" draw:layer="layout" svg:width="7.368cm" svg:height="3.919cm" svg:x="1.182cm" svg:y="3.959cm">
          <draw:image xlink:href="Pictures/100002010000034C000001C130BEA01337E0F356.png" xlink:type="simple" xlink:show="embed" xlink:actuate="onLoad">
            <text:p/>
          </draw:image>
        </draw:frame>
        <presentation:notes draw:style-name="dp2">
          <draw:page-thumbnail draw:name="Google Shape;282;g3ada4842c12_0_5:notes" draw:style-name="gr1" draw:layer="layout" svg:width="16.932cm" svg:height="9.524cm" svg:x="1.059cm" svg:y="1.905cm" draw:page-number="33" presentation:class="page"/>
          <draw:frame draw:name="Google Shape;283;g3ada4842c12_0_5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trade-offs" draw:style-name="dp1" draw:master-page-name="TITLE_5f_AND_5f_TWO_5f_COLUMNS" presentation:presentation-page-layout-name="AL3T3">
        <draw:frame draw:name="Google Shape;294;p46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esh – trade-offs</text:span></text:p>
          </draw:text-box>
        </draw:frame>
        <draw:frame draw:name="Google Shape;295;p46" presentation:style-name="pr14" draw:text-style-name="P18" draw:layer="layout" svg:width="11.11cm" svg:height="9.061cm" svg:x="0.866cm" svg:y="3.201cm" presentation:class="outline" presentation:user-transformed="true">
          <draw:text-box>
            <text:p text:style-name="P19"><text:span text:style-name="T17">The system is elastic and self-healing with no single point of failure</text:span></text:p>
            <text:p text:style-name="P15"><text:span text:style-name="T17">Mesh implementations are available off the shelf</text:span></text:p>
          </draw:text-box>
        </draw:frame>
        <draw:frame draw:name="Google Shape;296;p46" presentation:style-name="pr15" draw:text-style-name="P18" draw:layer="layout" svg:width="11.11cm" svg:height="9.061cm" svg:x="13.423cm" svg:y="3.201cm" presentation:class="outline" presentation:user-transformed="true">
          <draw:text-box>
            <text:p text:style-name="P19"><text:span text:style-name="T18">There is administration and security overhead</text:span></text:p>
            <text:p text:style-name="P20"><text:span text:style-name="T18">Unstable connections degrade performance</text:span></text:p>
            <text:p text:style-name="P20"><text:span text:style-name="T18">The business logic may need to account for unreliable communication of split brain conditions</text:span></text:p>
            <text:p text:style-name="P15"><text:span text:style-name="T18">The Mesh engine is hard to debug</text:span></text:p>
          </draw:text-box>
        </draw:frame>
        <presentation:notes draw:style-name="dp2">
          <draw:page-thumbnail draw:name="Google Shape;291;g3ada4842c12_0_13:notes" draw:style-name="gr1" draw:layer="layout" svg:width="16.932cm" svg:height="9.524cm" svg:x="1.059cm" svg:y="1.905cm" draw:page-number="34" presentation:class="page"/>
          <draw:frame draw:name="Google Shape;292;g3ada4842c12_0_13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structure" draw:style-name="dp1" draw:master-page-name="TITLE_5f_AND_5f_BODY" presentation:presentation-page-layout-name="AL2T1">
        <draw:frame draw:name="Google Shape;301;p47" presentation:style-name="pr17" draw:text-style-name="P7" draw:layer="layout" svg:width="23.667cm" svg:height="10.04cm" svg:x="0.866cm" svg:y="3.201cm" presentation:class="outline" presentation:user-transformed="true">
          <draw:text-box>
            <text:p text:style-name="P19"><text:span text:style-name="T10">Connections between </text:span><text:span text:style-name="T11">Mesh</text:span><text:span text:style-name="T10"> nodes can be:</text:span></text:p>
            <text:list text:style-name="L11">
              <text:list-item>
                <text:p text:style-name="P20"><text:span text:style-name="T11">Structured</text:span><text:span text:style-name="T10"> or </text:span><text:span text:style-name="T11">pre-defined</text:span><text:span text:style-name="T10">. This kind of </text:span><text:span text:style-name="T11">Meshes</text:span><text:span text:style-name="T10"> provides redundancy but not elasticity as no nodes can be added or removed at run time.</text:span></text:p>
              </text:list-item>
              <text:list-item>
                <text:p text:style-name="P19"><text:span text:style-name="T11">Unstructured</text:span><text:span text:style-name="T10"> or </text:span><text:span text:style-name="T11">ad-hoc</text:span><text:span text:style-name="T10">. Nodes can be freely added or removed, but the topology of the </text:span><text:span text:style-name="T11">Mesh</text:span><text:span text:style-name="T10"> may be hard to predict, resulting in latency spikes.</text:span></text:p>
              </text:list-item>
            </text:list>
          </draw:text-box>
        </draw:frame>
        <draw:frame draw:name="Google Shape;302;p4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esh – structure</text:span></text:p>
          </draw:text-box>
        </draw:frame>
        <presentation:notes draw:style-name="dp2">
          <draw:page-thumbnail draw:name="Google Shape;298;g3b16c6db887_0_183:notes" draw:style-name="gr1" draw:layer="layout" svg:width="16.932cm" svg:height="9.524cm" svg:x="1.059cm" svg:y="1.905cm" draw:page-number="35" presentation:class="page"/>
          <draw:frame draw:name="Google Shape;299;g3b16c6db887_0_183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connectivity" draw:style-name="dp1" draw:master-page-name="TITLE_5f_AND_5f_BODY" presentation:presentation-page-layout-name="AL2T1">
        <draw:frame draw:name="Google Shape;307;p48" presentation:style-name="pr17" draw:text-style-name="P7" draw:layer="layout" svg:width="23.667cm" svg:height="10.04cm" svg:x="0.866cm" svg:y="3.201cm" presentation:class="outline" presentation:user-transformed="true">
          <draw:text-box>
            <text:p text:style-name="P19"><text:span text:style-name="T10">Each </text:span><text:span text:style-name="T11">node</text:span><text:span text:style-name="T10"> can be:</text:span></text:p>
            <text:list text:style-name="L11">
              <text:list-item>
                <text:p text:style-name="P20"><text:span text:style-name="T10">Connected to every other </text:span><text:span text:style-name="T11">node</text:span><text:span text:style-name="T10">, making a </text:span><text:span text:style-name="T11">fully connected Mesh</text:span><text:span text:style-name="T10">. Such </text:span><text:span text:style-name="T11">Meshes</text:span><text:span text:style-name="T10"> are limited in size because of the number of connections, but deliver the best performance and fault tolerance.</text:span></text:p>
              </text:list-item>
              <text:list-item>
                <text:p text:style-name="P21"><text:span text:style-name="T10">Connected to some other </text:span><text:span text:style-name="T11">nodes</text:span><text:span text:style-name="T10">. The exact rules for making connections define the internal </text:span><text:span text:style-name="T11">topology</text:span><text:span text:style-name="T10"> of the </text:span><text:span text:style-name="T11">Mesh</text:span><text:span text:style-name="T10">.</text:span></text:p>
              </text:list-item>
            </text:list>
          </draw:text-box>
        </draw:frame>
        <draw:frame draw:name="Google Shape;308;p4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esh – connectivity</text:span></text:p>
          </draw:text-box>
        </draw:frame>
        <presentation:notes draw:style-name="dp2">
          <draw:page-thumbnail draw:name="Google Shape;304;g3b16c6db887_0_188:notes" draw:style-name="gr1" draw:layer="layout" svg:width="16.932cm" svg:height="9.524cm" svg:x="1.059cm" svg:y="1.905cm" draw:page-number="36" presentation:class="page"/>
          <draw:frame draw:name="Google Shape;305;g3b16c6db887_0_188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layering" draw:style-name="dp1" draw:master-page-name="TITLE_5f_AND_5f_BODY" presentation:presentation-page-layout-name="AL2T1">
        <draw:frame draw:name="Google Shape;313;p49" presentation:style-name="pr17" draw:text-style-name="P7" draw:layer="layout" svg:width="23.667cm" svg:height="10.04cm" svg:x="0.866cm" svg:y="3.201cm" presentation:class="outline" presentation:user-transformed="true">
          <draw:text-box>
            <text:p text:style-name="P19"><text:span text:style-name="T10">The interconnected </text:span><text:span text:style-name="T11">nodes</text:span><text:span text:style-name="T10"> of the </text:span><text:span text:style-name="T11">Mesh</text:span><text:span text:style-name="T10"> can be:</text:span></text:p>
            <text:list text:style-name="L11">
              <text:list-item>
                <text:p text:style-name="P20"><text:span text:style-name="T11">Identical</text:span><text:span text:style-name="T10"> in a </text:span><text:span text:style-name="T11">one-layer Mesh</text:span><text:span text:style-name="T10">.</text:span></text:p>
              </text:list-item>
              <text:list-item>
                <text:p text:style-name="P21"><text:span text:style-name="T11">Specialized</text:span><text:span text:style-name="T10"> in a </text:span><text:span text:style-name="T11">multi-layer Mesh</text:span><text:span text:style-name="T10">. In most cases there are </text:span><text:span text:style-name="T11">trunk nodes</text:span><text:span text:style-name="T10"> that maintain the </text:span><text:span text:style-name="T11">Mesh</text:span><text:span text:style-name="T10">’s </text:span><text:span text:style-name="T11">topology</text:span><text:span text:style-name="T10"> and connectivity, and </text:span><text:span text:style-name="T11">leaf nodes</text:span><text:span text:style-name="T10"> that carry end user applications.</text:span></text:p>
              </text:list-item>
            </text:list>
          </draw:text-box>
        </draw:frame>
        <draw:frame draw:name="Google Shape;314;p4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esh – layering</text:span></text:p>
          </draw:text-box>
        </draw:frame>
        <presentation:notes draw:style-name="dp2">
          <draw:page-thumbnail draw:name="Google Shape;310;g3b16c6db887_0_193:notes" draw:style-name="gr1" draw:layer="layout" svg:width="16.932cm" svg:height="9.524cm" svg:x="1.059cm" svg:y="1.905cm" draw:page-number="37" presentation:class="page"/>
          <draw:frame draw:name="Google Shape;311;g3b16c6db887_0_193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examples" draw:style-name="dp1" draw:master-page-name="TITLE_5f_AND_5f_BODY" presentation:presentation-page-layout-name="AL2T1">
        <draw:frame draw:name="Google Shape;319;p5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esh – examples</text:span></text:p>
          </draw:text-box>
        </draw:frame>
        <draw:frame draw:name="Google Shape;320;p50" presentation:style-name="pr11" draw:text-style-name="P7" draw:layer="layout" svg:width="14.427cm" svg:height="8.786cm" svg:x="10.106cm" svg:y="3.692cm" presentation:class="outline" presentation:user-transformed="true">
          <draw:text-box>
            <text:p text:style-name="P14"><text:span text:style-name="T11">Peer-to-peer Networks</text:span><text:span text:style-name="T10"> share resources (files, CPU time or even Internet access) over unstable connections.</text:span></text:p>
            <text:p text:style-name="P15"><text:span text:style-name="T10">Such a </text:span><text:span text:style-name="T11">Mesh</text:span><text:span text:style-name="T10"> is usually an unstructured (nodes are free to join and leave) two-layer (there are dedicated registrar servers) network that runs on top of the Internet infrastructure and protocols.</text:span></text:p>
          </draw:text-box>
        </draw:frame>
        <draw:custom-shape draw:name="Google Shape;321;p50" draw:style-name="gr3" draw:text-style-name="P18" draw:layer="layout" svg:width="8.385cm" svg:height="1.271cm" svg:x="1.104cm" svg:y="9.254cm">
          <text:p text:style-name="P1"><text:span text:style-name="T16">Peer-to-Pee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50" draw:style-name="gr2" draw:text-style-name="P10" draw:layer="layout" svg:width="5.633cm" svg:height="4.362cm" svg:x="2.48cm" svg:y="4.47cm">
          <draw:image xlink:href="Pictures/100002010000023C000001BB9A4FE41566E12D83.png" xlink:type="simple" xlink:show="embed" xlink:actuate="onLoad">
            <text:p/>
          </draw:image>
        </draw:frame>
        <presentation:notes draw:style-name="dp2">
          <draw:page-thumbnail draw:name="Google Shape;316;g3ada4842c12_0_35:notes" draw:style-name="gr1" draw:layer="layout" svg:width="16.932cm" svg:height="9.524cm" svg:x="1.059cm" svg:y="1.905cm" draw:page-number="38" presentation:class="page"/>
          <draw:frame draw:name="Google Shape;317;g3ada4842c12_0_35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examples" draw:style-name="dp1" draw:master-page-name="TITLE_5f_AND_5f_BODY" presentation:presentation-page-layout-name="AL2T1">
        <draw:frame draw:name="Google Shape;327;p5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esh – examples</text:span></text:p>
          </draw:text-box>
        </draw:frame>
        <draw:frame draw:name="Google Shape;328;p51" presentation:style-name="pr11" draw:text-style-name="P7" draw:layer="layout" svg:width="14.427cm" svg:height="8.786cm" svg:x="10.106cm" svg:y="3.692cm" presentation:class="outline" presentation:user-transformed="true">
          <draw:text-box>
            <text:p text:style-name="P14"><text:span text:style-name="T10">A system of </text:span><text:span text:style-name="T11">Actors</text:span><text:span text:style-name="T10"> models a fully connected </text:span><text:span text:style-name="T11">Mesh</text:span><text:span text:style-name="T10"> because every </text:span><text:span text:style-name="T11">Actor</text:span><text:span text:style-name="T10"> can send a message to any other </text:span><text:span text:style-name="T11">Actor</text:span><text:span text:style-name="T10"> in the system.</text:span></text:p>
            <text:p text:style-name="P15"><text:span text:style-name="T10">The </text:span><text:span text:style-name="T11">message queues</text:span><text:span text:style-name="T10"> of the </text:span><text:span text:style-name="T11">actors</text:span><text:span text:style-name="T10">, being their only means of communication, take the role of </text:span><text:span text:style-name="T11">Mesh</text:span><text:span text:style-name="T10"> nodes.</text:span></text:p>
          </draw:text-box>
        </draw:frame>
        <draw:custom-shape draw:name="Google Shape;329;p51" draw:style-name="gr3" draw:text-style-name="P18" draw:layer="layout" svg:width="5.45cm" svg:height="1.271cm" svg:x="2.435cm" svg:y="9.254cm">
          <text:p text:style-name="P1"><text:span text:style-name="T16">A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51" draw:style-name="gr2" draw:text-style-name="P10" draw:layer="layout" svg:width="5.355cm" svg:height="4.286cm" svg:x="2.482cm" svg:y="4.455cm">
          <draw:image xlink:href="Pictures/1000020100000236000001C56580A95572D3B94B.png" xlink:type="simple" xlink:show="embed" xlink:actuate="onLoad">
            <text:p/>
          </draw:image>
        </draw:frame>
        <presentation:notes draw:style-name="dp2">
          <draw:page-thumbnail draw:name="Google Shape;324;g3b16c6db887_0_210:notes" draw:style-name="gr1" draw:layer="layout" svg:width="16.932cm" svg:height="9.524cm" svg:x="1.059cm" svg:y="1.905cm" draw:page-number="39" presentation:class="page"/>
          <draw:frame draw:name="Google Shape;325;g3b16c6db887_0_210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examples" draw:style-name="dp1" draw:master-page-name="TITLE_5f_AND_5f_BODY" presentation:presentation-page-layout-name="AL2T1">
        <draw:frame draw:name="Google Shape;335;p5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esh – examples</text:span></text:p>
          </draw:text-box>
        </draw:frame>
        <draw:frame draw:name="Google Shape;336;p52" presentation:style-name="pr11" draw:text-style-name="P7" draw:layer="layout" svg:width="14.427cm" svg:height="9.666cm" svg:x="10.106cm" svg:y="3.343cm" presentation:class="outline" presentation:user-transformed="true">
          <draw:text-box>
            <text:p text:style-name="P14"><text:span text:style-name="T11">Service Mesh</text:span><text:span text:style-name="T10"> is a distributed </text:span><text:span text:style-name="T11">Middleware</text:span><text:span text:style-name="T10"> for </text:span><text:span text:style-name="T11">Microservices</text:span><text:span text:style-name="T10">.</text:span></text:p>
            <text:p text:style-name="P20"><text:span text:style-name="T10">Every instance of a user service is colocated with a </text:span><text:span text:style-name="T11">Sidecar</text:span><text:span text:style-name="T10"> that contains both shared libraries and a </text:span><text:span text:style-name="T11">Mesh</text:span><text:span text:style-name="T10"> node, which maintains the system’s connectivity and is governed by a centralized </text:span><text:span text:style-name="T11">control</text:span><text:span text:style-name="T10"> service.</text:span></text:p>
            <text:p text:style-name="P15"><text:span text:style-name="T10">The Mesh nature makes Microservices elastic – new instances can be easily created and added to the network.</text:span></text:p>
          </draw:text-box>
        </draw:frame>
        <draw:custom-shape draw:name="Google Shape;337;p52" draw:style-name="gr3" draw:text-style-name="P18" draw:layer="layout" svg:width="8.385cm" svg:height="1.271cm" svg:x="0.988cm" svg:y="10.997cm">
          <text:p text:style-name="P1"><text:span text:style-name="T16">Service M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52" draw:style-name="gr2" draw:text-style-name="P10" draw:layer="layout" svg:width="8.628cm" svg:height="6.741cm" svg:x="0.866cm" svg:y="3.889cm">
          <draw:image xlink:href="Pictures/100002010000046E000003766B5F88F6BB876F7B.png" xlink:type="simple" xlink:show="embed" xlink:actuate="onLoad">
            <text:p/>
          </draw:image>
        </draw:frame>
        <presentation:notes draw:style-name="dp2">
          <draw:page-thumbnail draw:name="Google Shape;332;g3b16c6db887_0_204:notes" draw:style-name="gr1" draw:layer="layout" svg:width="16.932cm" svg:height="9.524cm" svg:x="1.059cm" svg:y="1.905cm" draw:page-number="40" presentation:class="page"/>
          <draw:frame draw:name="Google Shape;333;g3b16c6db887_0_204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– examples" draw:style-name="dp1" draw:master-page-name="TITLE_5f_AND_5f_BODY" presentation:presentation-page-layout-name="AL2T1">
        <draw:frame draw:name="Google Shape;343;p5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Mesh – examples</text:span></text:p>
          </draw:text-box>
        </draw:frame>
        <draw:frame draw:name="Google Shape;344;p53" presentation:style-name="pr11" draw:text-style-name="P7" draw:layer="layout" svg:width="14.427cm" svg:height="9.964cm" svg:x="10.106cm" svg:y="3.293cm" presentation:class="outline" presentation:user-transformed="true">
          <draw:text-box>
            <text:p text:style-name="P14"><text:span text:style-name="T11">Space-Based Architecture</text:span><text:span text:style-name="T10"> is a kind of </text:span><text:span text:style-name="T11">Service Mesh</text:span><text:span text:style-name="T10"> whose </text:span><text:span text:style-name="T11">Sidecars</text:span><text:span text:style-name="T10"> carry nodes of a </text:span><text:span text:style-name="T11">Distributed Cache</text:span><text:span text:style-name="T10"> called </text:span><text:span text:style-name="T11">Data Grid</text:span><text:span text:style-name="T10">.</text:span></text:p>
            <text:p text:style-name="P20"><text:span text:style-name="T10">The nodes exchange information, ensuring that writes to one node quickly propagate to every other node. As the result, every services has an in-memory copy of the entire system’s state.</text:span></text:p>
            <text:p text:style-name="P15"><text:span text:style-name="T10">This architecture provides elasticity at both processing (service instances) and data access level.</text:span></text:p>
          </draw:text-box>
        </draw:frame>
        <draw:custom-shape draw:name="Google Shape;345;p53" draw:style-name="gr3" draw:text-style-name="P18" draw:layer="layout" svg:width="8.385cm" svg:height="1.271cm" svg:x="0.867cm" svg:y="12.075cm">
          <text:p text:style-name="P1"><text:span text:style-name="T16">Space-Bas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p53" draw:style-name="gr2" draw:text-style-name="P10" draw:layer="layout" svg:width="4.939cm" svg:height="8.08cm" svg:x="2.59cm" svg:y="3.833cm">
          <draw:image xlink:href="Pictures/10000201000002360000039E39EF17ED20F2F858.png" xlink:type="simple" xlink:show="embed" xlink:actuate="onLoad">
            <text:p/>
          </draw:image>
        </draw:frame>
        <presentation:notes draw:style-name="dp2">
          <draw:page-thumbnail draw:name="Google Shape;340;g3b16c6db887_0_198:notes" draw:style-name="gr1" draw:layer="layout" svg:width="16.932cm" svg:height="9.524cm" svg:x="1.059cm" svg:y="1.905cm" draw:page-number="41" presentation:class="page"/>
          <draw:frame draw:name="Google Shape;341;g3b16c6db887_0_198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HEADER">
        <draw:frame draw:name="Google Shape;351;p54" presentation:style-name="pr8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8">Conclusion</text:span></text:p>
          </draw:text-box>
        </draw:frame>
        <presentation:notes draw:style-name="dp2">
          <draw:page-thumbnail draw:name="Google Shape;348;g39ecdd5df51_0_44:notes" draw:style-name="gr1" draw:layer="layout" svg:width="16.932cm" svg:height="9.524cm" svg:x="1.059cm" svg:y="1.905cm" draw:page-number="42" presentation:class="page"/>
          <draw:frame draw:name="Google Shape;349;g39ecdd5df51_0_44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way of patterns" draw:style-name="dp1" draw:master-page-name="TITLE_5f_AND_5f_BODY" presentation:presentation-page-layout-name="AL2T1">
        <draw:frame draw:name="Google Shape;356;p55" presentation:style-name="pr17" draw:text-style-name="P7" draw:layer="layout" svg:width="23.667cm" svg:height="10.04cm" svg:x="0.866cm" svg:y="3.201cm" presentation:class="outline" presentation:user-transformed="true">
          <draw:text-box>
            <text:p text:style-name="P19"><text:span text:style-name="T10">We can modify the internal design of a system component to achieve flexibility with </text:span><text:span text:style-name="T11">Plugins</text:span><text:span text:style-name="T10"> or stability with </text:span><text:span text:style-name="T11">Hexagonal Architecture</text:span><text:span text:style-name="T10">.</text:span></text:p>
            <text:p text:style-name="P20"><text:span text:style-name="T10">We can share or coordinate resources by employing a </text:span><text:span text:style-name="T11">Microkernel</text:span><text:span text:style-name="T10">.</text:span></text:p>
            <text:p text:style-name="P20"><text:span text:style-name="T10">We can make our system elastic and fault tolerant by running it in a </text:span><text:span text:style-name="T11">Mesh</text:span><text:span text:style-name="T10">.</text:span></text:p>
            <text:p text:style-name="P20"><text:span text:style-name="T10">Patterns are like data structures: any system can be implemented with only vectors, or lists, or hash tables. Still, its performance will be better if you use an appropriate algorithm for each data processing task.</text:span></text:p>
            <text:p text:style-name="P15"><text:span text:style-name="T10">Likewise, any business logic can be implemented without patterns, but making prudent use of them will improve both the structure and performance of the code.</text:span></text:p>
          </draw:text-box>
        </draw:frame>
        <draw:frame draw:name="Google Shape;357;p5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The way of patterns</text:span></text:p>
          </draw:text-box>
        </draw:frame>
        <presentation:notes draw:style-name="dp2">
          <draw:page-thumbnail draw:name="Google Shape;353;g3afbd97c74f_0_0:notes" draw:style-name="gr1" draw:layer="layout" svg:width="16.932cm" svg:height="9.524cm" svg:x="1.059cm" svg:y="1.905cm" draw:page-number="43" presentation:class="page"/>
          <draw:frame draw:name="Google Shape;354;g3afbd97c74f_0_0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362;p5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6">Links</text:span></text:p>
          </draw:text-box>
        </draw:frame>
        <draw:frame draw:name="Google Shape;363;p56" presentation:style-name="pr17" draw:text-style-name="P7" draw:layer="layout" svg:width="23.667cm" svg:height="6.506cm" svg:x="0.866cm" svg:y="3.201cm" presentation:class="outline" presentation:user-transformed="true">
          <draw:text-box>
            <text:p text:style-name="P14"><text:span text:style-name="T10">This was an overview of patterns revisited in part 5 of </text:span><text:span text:style-name="T11">Architectural Metapatterns</text:span><text:span text:style-name="T10">. You can:</text:span></text:p>
            <text:p text:style-name="P20"><text:span text:style-name="T10">– </text:span><text:span text:style-name="T10">read the book online at </text:span><text:span text:style-name="T20"><text:a xlink:href="https://metapatterns.io/" xlink:type="simple">metapatterns.io</text:a></text:span></text:p>
            <text:p text:style-name="P20"><text:span text:style-name="T10">– </text:span><text:span text:style-name="T10">download it from </text:span><text:span text:style-name="T20"><text:a xlink:href="https://leanpub.com/metapatterns" xlink:type="simple">leanpub.com/metapatterns</text:a></text:span></text:p>
            <text:p text:style-name="P15"><text:span text:style-name="T10">The diagrams and the ODT source file are available under the CC BY license.</text:span></text:p>
          </draw:text-box>
        </draw:frame>
        <draw:frame draw:name="Google Shape;364;p56" presentation:style-name="pr4" draw:text-style-name="P7" draw:layer="layout" svg:width="23.667cm" svg:height="3.218cm" svg:x="0.866cm" svg:y="9.708cm" presentation:class="outline" presentation:user-transformed="true">
          <draw:text-box>
            <text:p text:style-name="P16"><text:span text:style-name="T21">The book also contains analytics not covered by these slides.</text:span></text:p>
          </draw:text-box>
        </draw:frame>
        <presentation:notes draw:style-name="dp2">
          <draw:page-thumbnail draw:name="Google Shape;359;g39ecdd5df51_0_53:notes" draw:style-name="gr1" draw:layer="layout" svg:width="16.932cm" svg:height="9.524cm" svg:x="1.059cm" svg:y="1.905cm" draw:page-number="44" presentation:class="page"/>
          <draw:frame draw:name="Google Shape;360;g39ecdd5df51_0_53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4"/>
    <meta:generator>LibreOfficeDev/6.0.5.2$Linux_X86_64 LibreOffice_project/</meta:generator>
  </office:meta>
</office:document-meta>
</file>