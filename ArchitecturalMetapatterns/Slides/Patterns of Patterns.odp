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D800000338381ACD4259AACEAA.png" manifest:media-type="image/png"/>
  <manifest:file-entry manifest:full-path="Pictures/10000201000002D80000033A4217E916DFA57B95.png" manifest:media-type="image/png"/>
  <manifest:file-entry manifest:full-path="Pictures/100002010000042800000338A7BE94E48A0E7F15.png" manifest:media-type="image/png"/>
  <manifest:file-entry manifest:full-path="Pictures/100002010000042800000338C516AFF2D07AB9BF.png" manifest:media-type="image/png"/>
  <manifest:file-entry manifest:full-path="Pictures/10000201000002D800000338329CC534AA61838C.png" manifest:media-type="image/png"/>
  <manifest:file-entry manifest:full-path="Pictures/10000201000004280000033BEFBA33C2BDD9E9D2.png" manifest:media-type="image/png"/>
  <manifest:file-entry manifest:full-path="Pictures/1000020100000368000002DAF4AA6AD5D3F8F90C.png" manifest:media-type="image/png"/>
  <manifest:file-entry manifest:full-path="Pictures/1000020100000368000002D843FD9E1836C86E2F.png" manifest:media-type="image/png"/>
  <manifest:file-entry manifest:full-path="Pictures/1000020100000368000002D8A2BE6187220BDC61.png" manifest:media-type="image/png"/>
  <manifest:file-entry manifest:full-path="Pictures/1000020100000368000002DA1F748DE430DA62B4.png" manifest:media-type="image/png"/>
  <manifest:file-entry manifest:full-path="Pictures/1000020100000368000002DAB61413CE8B37DF4B.png" manifest:media-type="image/png"/>
  <manifest:file-entry manifest:full-path="Pictures/TablePreview3.svm" manifest:media-type=""/>
  <manifest:file-entry manifest:full-path="Pictures/10000201000001E6000002AE9A7D44083973D73C.png" manifest:media-type="image/png"/>
  <manifest:file-entry manifest:full-path="Pictures/100002010000036E00000248292D0F24516EC77D.png" manifest:media-type="image/png"/>
  <manifest:file-entry manifest:full-path="Pictures/10000201000001E6000002AE3371865D29404F71.png" manifest:media-type="image/png"/>
  <manifest:file-entry manifest:full-path="Pictures/1000020100000238000003765D898AC781932078.png" manifest:media-type="image/png"/>
  <manifest:file-entry manifest:full-path="Pictures/100002010000025E000002B0B403ED53E54CACDB.png" manifest:media-type="image/png"/>
  <manifest:file-entry manifest:full-path="Pictures/10000201000002D90000033876F83EFC09F3E364.png" manifest:media-type="image/png"/>
  <manifest:file-entry manifest:full-path="Pictures/100002010000036800000248E1C38877B19AF6DB.png" manifest:media-type="image/png"/>
  <manifest:file-entry manifest:full-path="Pictures/TablePreview4.svm" manifest:media-type=""/>
  <manifest:file-entry manifest:full-path="Pictures/100002010000025E000002AEFEACCE1E7E49A2D7.png" manifest:media-type="image/png"/>
  <manifest:file-entry manifest:full-path="Pictures/100002010000027500000237085ECC0C5AA8F1AF.png" manifest:media-type="image/png"/>
  <manifest:file-entry manifest:full-path="Pictures/10000201000000E6000000E11DD17722323A745A.png" manifest:media-type="image/png"/>
  <manifest:file-entry manifest:full-path="Pictures/10000201000002EF000002D67A2AEE6182D8FD5C.png" manifest:media-type="image/png"/>
  <manifest:file-entry manifest:full-path="Pictures/1000020100000428000003387B57918175A62B01.png" manifest:media-type="image/png"/>
  <manifest:file-entry manifest:full-path="Pictures/100002010000042800000333B635666B69BDAFB5.png" manifest:media-type="image/png"/>
  <manifest:file-entry manifest:full-path="Pictures/10000201000003680000024EADC46E96DF6B24B2.png" manifest:media-type="image/png"/>
  <manifest:file-entry manifest:full-path="Pictures/10000201000003E8000003E8B7900D9D1BD2E609.png" manifest:media-type="image/png"/>
  <manifest:file-entry manifest:full-path="Pictures/100002010000036B0000024866FD1D1C968D06C2.png" manifest:media-type="image/png"/>
  <manifest:file-entry manifest:full-path="Pictures/10000201000002D600000326E908F7AF883C0C4F.png" manifest:media-type="image/png"/>
  <manifest:file-entry manifest:full-path="Pictures/10000201000002D6000003264C4883E29B6D72CC.png" manifest:media-type="image/png"/>
  <manifest:file-entry manifest:full-path="Pictures/10000201000007D8000007AFE4E66A7784409AFE.png" manifest:media-type="image/png"/>
  <manifest:file-entry manifest:full-path="Pictures/10000201000001E70000023BA047846FBDDF441C.png" manifest:media-type="image/png"/>
  <manifest:file-entry manifest:full-path="Pictures/10000201000003680000024C71EF9C01601D40B0.png" manifest:media-type="image/png"/>
  <manifest:file-entry manifest:full-path="Pictures/1000020100000354000001960FB647B62585239A.png" manifest:media-type="image/png"/>
  <manifest:file-entry manifest:full-path="Pictures/100002010000034E0000019CCFE2489CDDA13ADD.png" manifest:media-type="image/png"/>
  <manifest:file-entry manifest:full-path="Pictures/TablePreview1.svm" manifest:media-type=""/>
  <manifest:file-entry manifest:full-path="Pictures/TablePreview2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508cm" fo:padding-bottom="0.508cm" fo:padding-left="0.508cm" fo:padding-right="0.508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508cm" fo:padding-bottom="0.508cm" fo:padding-left="0.508cm" fo:padding-right="0.508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508cm" fo:padding-bottom="0.508cm" fo:padding-left="0.508cm" fo:padding-right="0.508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4.772cm" fo:padding-top="0.508cm" fo:padding-bottom="0.508cm" fo:padding-left="0.508cm" fo:padding-right="0.508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middle" draw:auto-grow-height="false" draw:fit-to-size="shrink-to-fit" style:shrink-to-fit="true" fo:min-height="16.322cm" fo:padding-top="0.508cm" fo:padding-bottom="0.508cm" fo:padding-left="0.508cm" fo:padding-right="0.508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4.772cm" fo:padding-top="0.508cm" fo:padding-bottom="0.508cm" fo:padding-left="0.508cm" fo:padding-right="0.508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4.772cm" fo:padding-top="0.508cm" fo:padding-bottom="0.508cm" fo:padding-left="0.508cm" fo:padding-right="0.508cm" fo:wrap-option="wrap"/>
    </style:style>
    <style:style style:name="pr8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4.772cm" fo:padding-top="0.508cm" fo:padding-bottom="0.508cm" fo:padding-left="0.508cm" fo:padding-right="0.508cm" fo:wrap-option="wrap"/>
    </style:style>
    <style:style style:name="pr10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16.322cm" fo:padding-top="0.508cm" fo:padding-bottom="0.508cm" fo:padding-left="0.508cm" fo:padding-right="0.508cm" fo:wrap-option="wrap"/>
    </style:style>
    <style:style style:name="pr11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16.322cm" fo:padding-top="0.508cm" fo:padding-bottom="0.508cm" fo:padding-left="0.508cm" fo:padding-right="0.508cm" fo:wrap-option="wrap"/>
    </style:style>
    <style:style style:name="pr13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16.322cm" fo:padding-top="0.508cm" fo:padding-bottom="0.508cm" fo:padding-left="0.508cm" fo:padding-right="0.508cm" fo:wrap-option="wrap"/>
    </style:style>
    <style:style style:name="pr15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4.772cm" fo:padding-top="0.508cm" fo:padding-bottom="0.508cm" fo:padding-left="0.508cm" fo:padding-right="0.508cm" fo:wrap-option="wrap"/>
    </style:style>
    <style:style style:name="pr16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6.322cm" fo:padding-top="0.508cm" fo:padding-bottom="0.508cm" fo:padding-left="0.508cm" fo:padding-right="0.508cm" fo:wrap-option="wrap"/>
    </style:style>
    <style:style style:name="pr18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4.772cm" fo:padding-top="0.508cm" fo:padding-bottom="0.508cm" fo:padding-left="0.508cm" fo:padding-right="0.508cm" fo:wrap-option="wrap"/>
    </style:style>
    <style:style style:name="pr24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8.043cm" style:use-optimal-column-width="false"/>
    </style:style>
    <style:style style:name="co2" style:family="table-column">
      <style:table-column-properties style:column-width="8.044cm" style:use-optimal-column-width="false"/>
    </style:style>
    <style:style style:name="ro1" style:family="table-row">
      <style:table-row-properties style:row-height="4.96cm"/>
    </style:style>
    <style:style style:name="ro2" style:family="table-row">
      <style:table-row-properties style:row-height="2.281cm"/>
    </style:style>
    <style:style style:name="ro3" style:family="table-row">
      <style:table-row-properties style:row-height="10.663cm"/>
    </style:style>
    <style:style style:name="ro4" style:family="table-row">
      <style:table-row-properties style:row-height="6.733cm"/>
    </style:style>
    <style:style style:name="ro5" style:family="table-row">
      <style:table-row-properties style:row-height="3.507cm"/>
    </style:style>
    <style:style style:name="ro6" style:family="table-row">
      <style:table-row-properties style:row-height="10.47cm"/>
    </style:style>
    <style:style style:name="ro7" style:family="table-row">
      <style:table-row-properties style:row-height="5.886cm"/>
    </style:style>
    <style:style style:name="ro8" style:family="table-row">
      <style:table-row-properties style:row-height="3.56cm"/>
    </style:style>
    <style:style style:name="ro9" style:family="table-row">
      <style:table-row-properties style:row-height="10.546cm"/>
    </style:style>
    <style:style style:name="ro10" style:family="table-row">
      <style:table-row-properties style:row-height="8.473cm"/>
    </style:style>
    <style:style style:name="ro11" style:family="table-row">
      <style:table-row-properties style:row-height="3.547cm"/>
    </style:style>
    <style:style style:name="ro12" style:family="table-row">
      <style:table-row-properties style:row-height="7.469cm"/>
    </style:style>
    <style:style style:name="ce1" style:family="table-cell">
      <loext:graphic-properties draw:fill="none" draw:textarea-vertical-align="top" fo:padding-top="0.507cm" fo:padding-bottom="0.507cm" fo:padding-left="0.507cm" fo:padding-right="0.507cm"/>
      <style:paragraph-properties fo:border="0.74pt solid #adadad"/>
    </style:style>
    <style:style style:name="ce2" style:family="table-cell">
      <loext:graphic-properties draw:fill="none" draw:textarea-vertical-align="top" fo:padding-top="0.507cm" fo:padding-bottom="0.507cm" fo:padding-left="0.507cm" fo:padding-right="0.507cm"/>
      <style:paragraph-properties fo:border-left="0.74pt solid #000000" fo:border-right="0.74pt solid #000000" fo:border-top="0.74pt solid #000000" fo:border-bottom="0.74pt solid #9e9e9e"/>
    </style:style>
    <style:style style:name="ce3" style:family="table-cell">
      <loext:graphic-properties draw:fill="none" draw:textarea-vertical-align="top" fo:padding-top="0.507cm" fo:padding-bottom="0.507cm" fo:padding-left="0.507cm" fo:padding-right="0.507cm"/>
      <style:paragraph-properties fo:border-left="0.74pt solid #000000" fo:border-right="0.74pt solid #000000" fo:border-top="0.74pt solid #9e9e9e" fo:border-bottom="0.74pt solid #9e9e9e"/>
    </style:style>
    <style:style style:name="ce4" style:family="table-cell">
      <loext:graphic-properties draw:fill="none" draw:textarea-vertical-align="top" fo:padding-top="0.507cm" fo:padding-bottom="0.507cm" fo:padding-left="0.507cm" fo:padding-right="0.507cm"/>
      <style:paragraph-properties fo:border-left="0.74pt solid #000000" fo:border-right="0.74pt solid #000000" fo:border-top="0.74pt solid #9e9e9e" fo:border-bottom="0.74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0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5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706cm" fo:margin-bottom="0cm" fo:line-height="105%" fo:text-align="start" fo:text-indent="0cm" style:writing-mode="lr-tb"/>
    </style:style>
    <style:style style:name="P6" style:family="paragraph">
      <style:paragraph-properties fo:margin-left="0cm" fo:margin-right="0cm" fo:margin-top="0.706cm" fo:margin-bottom="0.706cm" fo:line-height="10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9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847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847cm" fo:margin-bottom="0.847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7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706cm" fo:margin-bottom="0.70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.847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.847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706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706cm" fo:margin-bottom="0.706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.706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70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706cm" fo:margin-bottom="0.706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04pt" fo:letter-spacing="normal" fo:font-style="normal" style:text-underline-style="none" fo:font-weight="normal" style:font-name-asian="Arial" style:font-size-asian="104pt" style:font-style-asian="normal" style:font-weight-asian="normal" style:font-name-complex="Arial" style:font-size-complex="104pt" style:font-style-complex="normal" style:font-weight-complex="normal"/>
    </style:style>
    <style:style style:name="T2" style:family="text">
      <style:text-properties fo:font-variant="normal" fo:text-transform="none" fo:color="#eeeeee" style:text-line-through-style="none" style:text-line-through-type="none" style:text-position="0% 100%" style:font-name="Arial" fo:font-size="56pt" fo:letter-spacing="normal" fo:font-style="normal" style:text-underline-style="none" fo:font-weight="normal" style:font-name-asian="Arial" style:font-size-asian="56pt" style:font-style-asian="normal" style:font-weight-asian="normal" style:font-name-complex="Arial" style:font-size-complex="56pt" style:font-style-complex="normal" style:font-weight-complex="normal"/>
    </style:style>
    <style:style style:name="T3" style:family="text">
      <style:text-properties fo:font-variant="normal" fo:text-transform="none" fo:color="#eeeeee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72.4000015258789pt" fo:letter-spacing="normal" fo:font-style="normal" style:text-underline-style="none" fo:font-weight="normal" style:font-name-asian="Arial" style:font-size-asian="72.4000015258789pt" style:font-style-asian="normal" style:font-weight-asian="normal" style:font-name-complex="Arial" style:font-size-complex="72.4000015258789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96pt" fo:letter-spacing="normal" fo:font-style="normal" style:text-underline-style="none" fo:font-weight="normal" style:font-name-asian="Arial" style:font-size-asian="96pt" style:font-style-asian="normal" style:font-weight-asian="normal" style:font-name-complex="Arial" style:font-size-complex="9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64.4000015258789pt" fo:letter-spacing="normal" fo:font-style="normal" style:text-underline-style="none" fo:font-weight="normal" style:font-name-asian="Arial" style:font-size-asian="64.4000015258789pt" style:font-style-asian="normal" style:font-weight-asian="normal" style:font-name-complex="Arial" style:font-size-complex="64.4000015258789pt" style:font-style-complex="normal" style:font-weight-complex="normal"/>
    </style:style>
    <style:style style:name="T7" style:family="text">
      <style:text-properties fo:font-variant="normal" fo:text-transform="none" fo:color="#11dd11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8" style:family="text">
      <style:text-properties fo:font-variant="normal" fo:text-transform="none" fo:color="#ff4455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9" style:family="text">
      <style:text-properties fo:font-variant="normal" fo:text-transform="none" fo:color="#eedd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72pt" fo:letter-spacing="normal" fo:font-style="italic" style:text-underline-style="none" fo:font-weight="normal" style:font-name-asian="Arial" style:font-size-asian="72pt" style:font-style-asian="italic" style:font-weight-asian="normal" style:font-name-complex="Arial" style:font-size-complex="72pt" style:font-style-complex="italic" style:font-weight-complex="normal"/>
    </style:style>
    <style:style style:name="T13" style:family="text">
      <style:text-properties fo:font-variant="normal" fo:text-transform="none" fo:color="#ff4455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4" style:family="text">
      <style:text-properties fo:font-variant="normal" fo:text-transform="none" fo:color="#eedd00" style:text-line-through-style="none" style:text-line-through-type="none" style:text-position="0% 100%" style:font-name="Arial" fo:font-size="32pt" fo:letter-spacing="normal" fo:font-style="italic" style:text-underline-style="none" fo:font-weight="normal" style:font-name-asian="Arial" style:font-size-asian="32pt" style:font-style-asian="italic" style:font-weight-asian="normal" style:font-name-complex="Arial" style:font-size-complex="32pt" style:font-style-complex="italic" style:font-weight-complex="normal"/>
    </style:style>
    <style:style style:name="T15" style:family="text">
      <style:text-properties fo:font-variant="normal" fo:text-transform="none" fo:color="#eedd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6" style:family="text">
      <style:text-properties fo:font-variant="normal" fo:text-transform="none" fo:color="#eeeeee" style:text-line-through-style="none" style:text-line-through-type="none" style:text-position="0% 100%" style:font-name="Arial" fo:font-size="96pt" fo:letter-spacing="normal" fo:font-style="normal" style:text-underline-style="none" fo:font-weight="normal" style:font-name-asian="Arial" style:font-size-asian="96pt" style:font-style-asian="normal" style:font-weight-asian="normal" style:font-name-complex="Arial" style:font-size-complex="9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eeeeee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9" style:family="text">
      <style:text-properties fo:font-variant="normal" fo:text-transform="none" fo:color="#eeeeee" style:text-line-through-style="none" style:text-line-through-type="none" style:text-position="0% 100%" style:font-name="Arial" fo:font-size="32pt" fo:letter-spacing="normal" fo:font-style="italic" style:text-underline-style="none" fo:font-weight="normal" style:font-name-asian="Arial" style:font-size-asian="32pt" style:font-style-asian="italic" style:font-weight-asian="normal" style:font-name-complex="Arial" style:font-size-complex="32pt" style:font-style-complex="italic" style:font-weight-complex="normal"/>
    </style:style>
    <style:style style:name="T20" style:family="text">
      <style:text-properties fo:font-variant="normal" fo:text-transform="none" fo:color="#eeeeee" style:text-line-through-style="none" style:text-line-through-type="none" style:text-position="0% 100%" style:font-name="Arial" fo:font-size="120pt" fo:letter-spacing="normal" fo:font-style="normal" style:text-underline-style="none" fo:font-weight="normal" style:font-name-asian="Arial" style:font-size-asian="120pt" style:font-style-asian="normal" style:font-weight-asian="normal" style:font-name-complex="Arial" style:font-size-complex="120pt" style:font-style-complex="normal" style:font-weight-complex="normal"/>
    </style:style>
    <style:style style:name="T21" style:family="text">
      <style:text-properties fo:font-variant="normal" fo:text-transform="none" fo:color="#eeeeee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" fo:font-size="66pt" fo:letter-spacing="normal" fo:font-style="normal" style:text-underline-style="none" fo:font-weight="normal" style:font-name-asian="Arial" style:font-size-asian="66pt" style:font-style-asian="normal" style:font-weight-asian="normal" style:font-name-complex="Arial" style:font-size-complex="66pt" style:font-style-complex="normal" style:font-weight-complex="normal"/>
    </style:style>
    <style:style style:name="T23" style:family="text">
      <style:text-properties fo:font-variant="normal" fo:text-transform="none" fo:color="#eeeeee" style:text-line-through-style="none" style:text-line-through-type="none" style:text-position="0% 100%" style:font-name="Arial" fo:font-size="40pt" fo:letter-spacing="normal" fo:font-style="italic" style:text-underline-style="none" fo:font-weight="normal" style:font-name-asian="Arial" style:font-size-asian="40pt" style:font-style-asian="italic" style:font-weight-asian="normal" style:font-name-complex="Arial" style:font-size-complex="40pt" style:font-style-complex="italic" style:font-weight-complex="normal"/>
    </style:style>
    <style:style style:name="T24" style:family="text">
      <style:text-properties fo:font-variant="normal" fo:text-transform="none" fo:color="#eeeeee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5" style:family="text">
      <style:text-properties fo:font-variant="normal" fo:text-transform="none" fo:color="#eeeeee" style:text-line-through-style="none" style:text-line-through-type="none" style:text-position="0% 100%" style:font-name="Arial" fo:font-size="30pt" fo:letter-spacing="normal" fo:font-style="italic" style:text-underline-style="none" fo:font-weight="normal" style:font-name-asian="Arial" style:font-size-asian="30pt" style:font-style-asian="italic" style:font-weight-asian="normal" style:font-name-complex="Arial" style:font-size-complex="30pt" style:font-style-complex="italic" style:font-weight-complex="normal"/>
    </style:style>
    <style:style style:name="T26" style:family="text">
      <style:text-properties fo:font-variant="normal" fo:text-transform="none" fo:color="#eedd00" style:text-line-through-style="none" style:text-line-through-type="none" style:text-position="0% 100%" style:font-name="Arial" fo:font-size="36pt" fo:letter-spacing="normal" fo:font-style="italic" style:text-underline-style="none" fo:font-weight="normal" style:font-name-asian="Ari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" fo:font-size="60pt" fo:letter-spacing="normal" fo:font-style="italic" style:text-underline-style="none" fo:font-weight="normal" style:font-name-asian="Arial" style:font-size-asian="60pt" style:font-style-asian="italic" style:font-weight-asian="normal" style:font-name-complex="Arial" style:font-size-complex="60pt" style:font-style-complex="italic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29" style:family="text">
      <style:text-properties fo:font-variant="normal" fo:text-transform="none" fo:color="#11dd11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30" style:family="text">
      <style:text-properties fo:font-variant="normal" fo:text-transform="none" fo:color="#eeeeee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31" style:family="text">
      <style:text-properties fo:font-variant="normal" fo:text-transform="none" fo:color="#11dd11" style:text-line-through-style="none" style:text-line-through-type="none" style:text-position="0% 100%" style:font-name="Arial" fo:font-size="48pt" fo:letter-spacing="normal" fo:font-style="italic" style:text-underline-style="none" fo:font-weight="normal" style:font-name-asian="Arial" style:font-size-asian="48pt" style:font-style-asian="italic" style:font-weight-asian="normal" style:font-name-complex="Arial" style:font-size-complex="48pt" style:font-style-complex="italic" style:font-weight-complex="normal"/>
    </style:style>
    <style:style style:name="T32" style:family="text">
      <style:text-properties fo:font-variant="normal" fo:text-transform="none" fo:color="#eeeeee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33" style:family="text">
      <style:text-properties fo:font-variant="normal" fo:text-transform="none" fo:color="#eeeeee" style:text-line-through-style="none" style:text-line-through-type="none" style:text-position="0% 100%" style:font-name="Arial" fo:font-size="60pt" fo:letter-spacing="normal" fo:font-style="italic" style:text-underline-style="none" fo:font-weight="normal" style:font-name-asian="Arial" style:font-size-asian="60pt" style:font-style-asian="italic" style:font-weight-asian="normal" style:font-name-complex="Arial" style:font-size-complex="60pt" style:font-style-complex="italic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Arial" fo:font-size="64pt" fo:letter-spacing="normal" fo:font-style="normal" style:text-underline-style="none" fo:font-weight="normal" style:font-name-asian="Arial" style:font-size-asian="64pt" style:font-style-asian="normal" style:font-weight-asian="normal" style:font-name-complex="Arial" style:font-size-complex="64pt" style:font-style-complex="normal" style:font-weight-complex="normal"/>
    </style:style>
    <style:style style:name="T35" style:family="text">
      <style:text-properties fo:font-variant="normal" fo:text-transform="none" fo:color="#11dd11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36" style:family="text">
      <style:text-properties fo:font-variant="normal" fo:text-transform="none" fo:color="#eeeeee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7" style:family="text">
      <style:text-properties fo:font-variant="normal" fo:text-transform="none" fo:color="#eeeeee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38" style:family="text">
      <style:text-properties fo:font-variant="normal" fo:text-transform="none" fo:color="#eedd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39" style:family="text">
      <style:text-properties fo:font-variant="normal" fo:text-transform="none" fo:color="#eeeeee" style:text-line-through-style="none" style:text-line-through-type="none" style:text-position="0% 100%" style:font-name="Arial" fo:font-size="36pt" fo:letter-spacing="normal" fo:font-style="italic" style:text-underline-style="none" fo:font-weight="normal" style:font-name-asian="Ari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40" style:family="text">
      <style:text-properties fo:font-variant="normal" fo:text-transform="none" fo:color="#4dd0e1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1" style:family="text">
      <style:text-properties fo:font-variant="normal" fo:text-transform="none" fo:color="#eedd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36cm" text:min-label-width="1.904cm"/>
        <style:text-properties style:font-name="Arial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47.336cm" svg:height="11.402cm" svg:x="1.732cm" svg:y="4.137cm" presentation:class="title" presentation:user-transformed="true">
          <draw:text-box>
            <text:p text:style-name="P1"><text:span text:style-name="T1">Patterns of Patterns</text:span></text:p>
          </draw:text-box>
        </draw:frame>
        <draw:frame draw:name="Google Shape;55;p13" presentation:style-name="pr2" draw:text-style-name="P3" draw:layer="layout" svg:width="47.336cm" svg:height="4.402cm" svg:x="1.732cm" svg:y="15.745cm" presentation:class="subtitle" presentation:user-transformed="true">
          <draw:text-box>
            <text:p text:style-name="P1"><text:span text:style-name="T2">And why we need them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peek inside" draw:style-name="dp1" draw:master-page-name="TITLE_5f_AND_5f_BODY" presentation:presentation-page-layout-name="AL2T1">
        <draw:frame draw:name="Google Shape;60;p14" presentation:style-name="pr4" draw:text-style-name="P7" draw:layer="layout" svg:width="47.336cm" svg:height="18.286cm" svg:x="1.732cm" svg:y="8.032cm" presentation:class="outline" presentation:user-transformed="true">
          <draw:text-box>
            <text:list text:style-name="L3">
              <text:list-item>
                <text:p text:style-name="P5"><text:span text:style-name="T3">The misery of having thousands of patterns.</text:span></text:p>
              </text:list-item>
              <text:list-item>
                <text:p text:style-name="P5"><text:span text:style-name="T3">Local and distributed architectures are not dissimilar.</text:span></text:p>
              </text:list-item>
              <text:list-item>
                <text:p text:style-name="P5"><text:span text:style-name="T3">Structure determines function.</text:span></text:p>
              </text:list-item>
              <text:list-item>
                <text:p text:style-name="P5"><text:span text:style-name="T3">There are only so many elementary geometries.</text:span></text:p>
              </text:list-item>
              <text:list-item>
                <text:p text:style-name="P6"><text:span text:style-name="T3">Which means that hundreds of patterns condense into several metapatterns.</text:span></text:p>
              </text:list-item>
            </text:list>
          </draw:text-box>
        </draw:frame>
        <draw:frame draw:name="Google Shape;61;p14" presentation:style-name="pr5" draw:text-style-name="P8" draw:layer="layout" svg:width="47.336cm" svg:height="5.014cm" svg:x="1.731cm" svg:y="2.472cm" presentation:class="title" presentation:user-transformed="true">
          <draw:text-box>
            <text:p text:style-name="P1"><text:span text:style-name="T4">A peek inside</text:span></text:p>
          </draw:text-box>
        </draw:frame>
        <presentation:notes draw:style-name="dp2">
          <draw:page-thumbnail draw:name="Google Shape;57;g36fa2bd9aed_0_190:notes" draw:style-name="gr1" draw:layer="layout" svg:width="16.932cm" svg:height="9.524cm" svg:x="1.059cm" svg:y="1.905cm" draw:page-number="2" presentation:class="page"/>
          <draw:frame draw:name="Google Shape;58;g36fa2bd9aed_0_19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ctation vs Reality" draw:style-name="dp1" draw:master-page-name="SECTION_5f_HEADER">
        <draw:frame draw:name="Google Shape;66;p15" presentation:style-name="pr7" draw:text-style-name="P9" draw:layer="layout" svg:width="47.336cm" svg:height="4.676cm" svg:x="1.732cm" svg:y="11.949cm" presentation:class="title" presentation:user-transformed="true">
          <draw:text-box>
            <text:p text:style-name="P1"><text:span text:style-name="T5">Expectation vs Reality</text:span></text:p>
          </draw:text-box>
        </draw:frame>
        <presentation:notes draw:style-name="dp2">
          <draw:page-thumbnail draw:name="Google Shape;63;g36fa2bd9aed_0_185:notes" draw:style-name="gr1" draw:layer="layout" svg:width="16.932cm" svg:height="9.524cm" svg:x="1.059cm" svg:y="1.905cm" draw:page-number="3" presentation:class="page"/>
          <draw:frame draw:name="Google Shape;64;g36fa2bd9aed_0_18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we were promised 30 years ago" draw:style-name="dp1" draw:master-page-name="TITLE_5f_AND_5f_TWO_5f_COLUMNS" presentation:presentation-page-layout-name="AL3T3">
        <draw:frame draw:name="Google Shape;71;p16" presentation:style-name="pr9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6">What we were promised 30 years ago</text:span></text:p>
          </draw:text-box>
        </draw:frame>
        <draw:frame draw:name="Google Shape;72;p16" presentation:style-name="pr10" draw:text-style-name="P13" draw:layer="layout" svg:width="18.114cm" svg:height="18.979cm" svg:x="1.732cm" svg:y="6.403cm" presentation:class="outline" presentation:user-transformed="true">
          <draw:text-box>
            <text:p text:style-name="P10"><text:span text:style-name="T7">Patterns as a ubiquitous language of software architecture.</text:span></text:p>
            <text:p text:style-name="P11"><text:span text:style-name="T7">Patterns as vessels for sharing and recording experience.</text:span><text:span text:style-name="T7"><text:line-break/></text:span><text:span text:style-name="T7"/></text:p>
            <text:p text:style-name="P12"><text:span text:style-name="T7">A pattern language as a construction set for software engineering.</text:span></text:p>
          </draw:text-box>
        </draw:frame>
        <draw:frame draw:name="Google Shape;73;p16" presentation:style-name="pr10" draw:text-style-name="P13" draw:layer="layout" svg:width="27.759cm" svg:height="18.979cm" svg:x="21.307cm" svg:y="6.403cm" presentation:class="outline" presentation:user-transformed="true">
          <draw:text-box>
            <text:p text:style-name="P10"><text:span text:style-name="T8">There are too many patterns for any person to remember. Some patterns names are ambiguous.</text:span></text:p>
            <text:p text:style-name="P11"><text:span text:style-name="T8">Patterns are regularly reinvented or plagiarized, breaking the continuity of experience and debarring the sharing of knowledge between domains.</text:span></text:p>
            <text:p text:style-name="P12"><text:span text:style-name="T9">A few specialized pattern languages became widespread. </text:span><text:span text:style-name="T8">No attempt at a generic pattern language has ever succeeded.</text:span></text:p>
          </draw:text-box>
        </draw:frame>
        <presentation:notes draw:style-name="dp2">
          <draw:page-thumbnail draw:name="Google Shape;68;g36fa2bd9aed_0_196:notes" draw:style-name="gr1" draw:layer="layout" svg:width="16.932cm" svg:height="9.524cm" svg:x="1.059cm" svg:y="1.905cm" draw:page-number="4" presentation:class="page"/>
          <draw:frame draw:name="Google Shape;69;g36fa2bd9aed_0_196:notes" presentation:style-name="pr11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0">The promises were taken from the Gang of Four book and first volumes of Pattern-Oriented Software Architecture. </text:span><text:span text:style-name="T10"><text:line-break/></text:span><text:span text:style-name="T10">The successful specialized pattern languages are the Gang of Four Design Patterns (a mix of GUI and general-use patterns), Enterprise Integration Patterns (communication in complex asynchronous distributed systems), and Domain-Driven Design (organization of development for enterprises).</text:span></text:p>
            </draw:text-box>
          </draw:frame>
        </presentation:notes>
      </draw:page>
      <draw:page draw:name="Which is the Front Controller" draw:style-name="dp1" draw:master-page-name="TITLE_5f_AND_5f_BODY" presentation:presentation-page-layout-name="AL2T1">
        <draw:frame draw:name="Google Shape;78;p17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11">Which is the </text:span><text:span text:style-name="T12">Front Controller</text:span></text:p>
          </draw:text-box>
        </draw:frame>
        <draw:frame draw:name="Google Shape;79;p17" presentation:style-name="pr12" draw:text-style-name="P7" draw:layer="layout" svg:width="47.336cm" svg:height="6.206cm" svg:x="1.732cm" svg:y="20.61cm" presentation:class="outline" presentation:user-transformed="true">
          <draw:text-box>
            <text:p text:style-name="P10"><text:span text:style-name="T3">Is Mark Richards wrong? He is the author of the most modern anthology of architectural styles!</text:span></text:p>
            <text:p text:style-name="P12"><text:span text:style-name="T13">There are over 2000 patterns! No one can remember them!</text:span></text:p>
          </draw:text-box>
        </draw:frame>
        <draw:custom-shape draw:name="Google Shape;80;p17" draw:style-name="gr2" draw:text-style-name="P16" draw:layer="layout" svg:width="18.346cm" svg:height="5.079cm" svg:x="1.732cm" svg:y="14.736cm">
          <text:p text:style-name="P1"><text:span text:style-name="T9">A service that tracks the status of requests by receiving notifications from a </text:span><text:span text:style-name="T14">Pipeline</text:span><text:span text:style-name="T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7" draw:style-name="gr2" draw:text-style-name="P16" draw:layer="layout" svg:width="17.272cm" svg:height="5.079cm" svg:x="31.794cm" svg:y="14.736cm">
          <text:p text:style-name="P1"><text:span text:style-name="T9">A part of a backend </text:span><text:span text:style-name="T14">MVC</text:span><text:span text:style-name="T9"> which parses client requests and calls page class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7" draw:style-name="gr2" draw:text-style-name="P16" draw:layer="layout" svg:width="9.032cm" svg:height="3.049cm" svg:x="10.846cm" svg:y="6.273cm">
          <text:p text:style-name="P14"><text:span text:style-name="T15">Neal Ford and </text:span></text:p>
          <text:p text:style-name="P14"><text:span text:style-name="T15">Mark Richards, 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17" draw:style-name="gr3" draw:text-style-name="P17" draw:layer="layout" svg:width="5.659cm" svg:height="5.536cm" svg:x="12.367cm" svg:y="9.066cm">
          <draw:image xlink:href="Pictures/10000201000000E6000000E11DD17722323A745A.png" xlink:type="simple" xlink:show="embed" xlink:actuate="onLoad">
            <text:p/>
          </draw:image>
        </draw:frame>
        <draw:custom-shape draw:name="Google Shape;84;p17" draw:style-name="gr2" draw:text-style-name="P16" draw:layer="layout" svg:width="8.582cm" svg:height="3.049cm" svg:x="32.144cm" svg:y="6.273cm">
          <text:p text:style-name="P18"><text:span text:style-name="T15">Martin Fowler at al., 20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7" draw:style-name="gr3" draw:text-style-name="P17" draw:layer="layout" svg:width="5.384cm" svg:height="5.384cm" svg:x="34.042cm" svg:y="9.478cm">
          <draw:image xlink:href="Pictures/10000201000003E8000003E8B7900D9D1BD2E609.png" xlink:type="simple" xlink:show="embed" xlink:actuate="onLoad">
            <text:p/>
          </draw:image>
        </draw:frame>
        <draw:custom-shape draw:name="Google Shape;86;p17" draw:style-name="gr4" draw:text-style-name="P16" draw:layer="layout" svg:width="3.417cm" svg:height="5.129cm" svg:x="23.691cm" svg:y="9.606cm">
          <text:p text:style-name="P1"><text:span text:style-name="T16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7" draw:style-name="gr3" draw:text-style-name="P17" draw:layer="layout" svg:width="7.968cm" svg:height="7.183cm" svg:x="2.157cm" svg:y="7.419cm">
          <draw:image xlink:href="Pictures/100002010000027500000237085ECC0C5AA8F1AF.png" xlink:type="simple" xlink:show="embed" xlink:actuate="onLoad">
            <text:p/>
          </draw:image>
        </draw:frame>
        <draw:frame draw:name="Google Shape;88;p17" draw:style-name="gr3" draw:text-style-name="P17" draw:layer="layout" svg:width="6.126cm" svg:height="7.183cm" svg:x="41.682cm" svg:y="7.419cm">
          <draw:image xlink:href="Pictures/10000201000001E70000023BA047846FBDDF441C.png" xlink:type="simple" xlink:show="embed" xlink:actuate="onLoad">
            <text:p/>
          </draw:image>
        </draw:frame>
        <presentation:notes draw:style-name="dp2">
          <draw:page-thumbnail draw:name="Google Shape;75;g39e9ce6f541_0_0:notes" draw:style-name="gr1" draw:layer="layout" svg:width="16.932cm" svg:height="9.524cm" svg:x="1.059cm" svg:y="1.905cm" draw:page-number="5" presentation:class="page"/>
          <draw:frame draw:name="Google Shape;76;g39e9ce6f541_0_0:notes" presentation:style-name="pr13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7"><text:a xlink:href="https://metapatterns.io/analytics/ambiguous-patterns/#front-controller" xlink:type="simple">https://metapatterns.io/analytics/ambiguous-patterns/#front-controller</text:a></text:span></text:p>
            </draw:text-box>
          </draw:frame>
        </presentation:notes>
      </draw:page>
      <draw:page draw:name="Patterns are reinvented…" draw:style-name="dp1" draw:master-page-name="TITLE_5f_AND_5f_BODY" presentation:presentation-page-layout-name="AL2T1">
        <draw:frame draw:name="Google Shape;93;p18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11">Patterns are reinvented…</text:span></text:p>
          </draw:text-box>
        </draw:frame>
        <draw:custom-shape draw:name="Google Shape;94;p18" draw:style-name="gr2" draw:text-style-name="P16" draw:layer="layout" svg:width="18.844cm" svg:height="9.199cm" svg:x="1.732cm" svg:y="14.736cm">
          <text:p text:style-name="P14"><text:span text:style-name="T18">Allows for running the same </text:span><text:span text:style-name="T19">core</text:span><text:span text:style-name="T18"> logic in different setups.</text:span></text:p>
          <text:p text:style-name="P19"><text:span text:style-name="T18">The external components can be changed without affecting the </text:span><text:span text:style-name="T19">core</text:span><text:span text:style-name="T18">.</text:span></text:p>
          <text:p text:style-name="P20"><text:span text:style-name="T18">Protection from vendor lock-i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8" draw:style-name="gr2" draw:text-style-name="P16" draw:layer="layout" svg:width="18.772cm" svg:height="9.199cm" svg:x="30.295cm" svg:y="14.736cm">
          <text:p text:style-name="P14"><text:span text:style-name="T18">Supports multiple views of a single </text:span><text:span text:style-name="T19">model</text:span><text:span text:style-name="T18">.</text:span></text:p>
          <text:p text:style-name="P19"><text:span text:style-name="T18">The UI can be changed without affecting the </text:span><text:span text:style-name="T19">model</text:span><text:span text:style-name="T18">.</text:span></text:p>
          <text:p text:style-name="P20"><text:span text:style-name="T18">Is easy to port to new platform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8" draw:style-name="gr5" draw:text-style-name="P16" draw:layer="layout" svg:width="10.287cm" svg:height="8.019cm" svg:x="10.056cm" svg:y="5.677cm">
          <text:p text:style-name="P14"><text:span text:style-name="T15">Hexagonal Architecture</text:span></text:p>
          <text:p text:style-name="P14"><text:span text:style-name="T15">(Ports and Adapters), Alistair Cockburn, </text:span></text:p>
          <text:p text:style-name="P14"><text:span text:style-name="T15">20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8" draw:style-name="gr5" draw:text-style-name="P16" draw:layer="layout" svg:width="9.762cm" svg:height="8.019cm" svg:x="30.295cm" svg:y="5.654cm">
          <text:p text:style-name="P18"><text:span text:style-name="T15">Model-View-Controller</text:span></text:p>
          <text:p text:style-name="P18"><text:span text:style-name="T15">(MVC), </text:span></text:p>
          <text:p text:style-name="P18"><text:span text:style-name="T15">Trygve Reenskaug, 1979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8" draw:style-name="gr4" draw:text-style-name="P16" draw:layer="layout" svg:width="10.991cm" svg:height="6.236cm" svg:x="19.33cm" svg:y="5.677cm">
          <text:p text:style-name="P1"><text:span text:style-name="T20">⇔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9;p18" draw:style-name="gr3" draw:text-style-name="P17" draw:layer="layout" svg:width="7.083cm" svg:height="8.018cm" svg:x="40.723cm" svg:y="5.654cm">
          <draw:image xlink:href="Pictures/100002010000025E000002AEFEACCE1E7E49A2D7.png" xlink:type="simple" xlink:show="embed" xlink:actuate="onLoad">
            <text:p/>
          </draw:image>
        </draw:frame>
        <draw:frame draw:name="Google Shape;100;p18" draw:style-name="gr3" draw:text-style-name="P17" draw:layer="layout" svg:width="7.083cm" svg:height="8.042cm" svg:x="2.23cm" svg:y="5.643cm">
          <draw:image xlink:href="Pictures/100002010000025E000002B0B403ED53E54CACDB.png" xlink:type="simple" xlink:show="embed" xlink:actuate="onLoad">
            <text:p/>
          </draw:image>
        </draw:frame>
        <presentation:notes draw:style-name="dp2">
          <draw:page-thumbnail draw:name="Google Shape;90;g39eb482cd5a_0_15:notes" draw:style-name="gr1" draw:layer="layout" svg:width="16.932cm" svg:height="9.524cm" svg:x="1.059cm" svg:y="1.905cm" draw:page-number="6" presentation:class="page"/>
          <draw:frame draw:name="Google Shape;91;g39eb482cd5a_0_15:notes" presentation:style-name="pr13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7"><text:a xlink:href="https://metapatterns.io/implementation-metapatterns/hexagonal-architecture/#examples--separated-presentation" xlink:type="simple">https://metapatterns.io/implementation-metapatterns/hexagonal-architecture/#examples--separated-presentation</text:a></text:span></text:p>
            </draw:text-box>
          </draw:frame>
        </presentation:notes>
      </draw:page>
      <draw:page draw:name="… or plagiarized?" draw:style-name="dp1" draw:master-page-name="TITLE_5f_AND_5f_BODY" presentation:presentation-page-layout-name="AL2T1">
        <draw:frame draw:name="Google Shape;105;p19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11">… </text:span><text:span text:style-name="T11">or plagiarized?</text:span></text:p>
          </draw:text-box>
        </draw:frame>
        <draw:frame draw:name="Google Shape;106;p19" presentation:style-name="pr14" draw:text-style-name="P7" draw:layer="layout" svg:width="23.264cm" svg:height="18.651cm" svg:x="2.954cm" svg:y="6.969cm" presentation:class="outline" presentation:user-transformed="true">
          <draw:text-box>
            <text:p text:style-name="P10"><text:span text:style-name="T21">Please find 3 differences between:</text:span></text:p>
            <text:p text:style-name="P11"><text:span text:style-name="T21">– </text:span><text:span text:style-name="T21">Ports and Adapters (2005) with a DDD-style (2003) layered core.</text:span></text:p>
            <text:p text:style-name="P11"><text:span text:style-name="T21">– </text:span><text:span text:style-name="T21">Onion Architecture (2008).</text:span></text:p>
            <text:p text:style-name="P12"><text:span text:style-name="T21">– </text:span><text:span text:style-name="T21">Clean Architecture (2012).</text:span></text:p>
          </draw:text-box>
        </draw:frame>
        <draw:frame draw:name="Google Shape;107;p19" draw:style-name="gr3" draw:text-style-name="P17" draw:layer="layout" svg:width="11.956cm" svg:height="18.651cm" svg:x="35.35cm" svg:y="6.969cm">
          <draw:image xlink:href="Pictures/1000020100000238000003765D898AC781932078.png" xlink:type="simple" xlink:show="embed" xlink:actuate="onLoad">
            <text:p/>
          </draw:image>
        </draw:frame>
        <presentation:notes draw:style-name="dp2">
          <draw:page-thumbnail draw:name="Google Shape;102;g39eb482cd5a_0_10:notes" draw:style-name="gr1" draw:layer="layout" svg:width="16.932cm" svg:height="9.524cm" svg:x="1.059cm" svg:y="1.905cm" draw:page-number="7" presentation:class="page"/>
          <draw:frame draw:name="Google Shape;103;g39eb482cd5a_0_10:notes" presentation:style-name="pr13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7"><text:a xlink:href="https://metapatterns.io/implementation-metapatterns/hexagonal-architecture/#ddd-style-hexagonal-architecture-onion-architecture-clean-architecture" xlink:type="simple">https://metapatterns.io/implementation-metapatterns/hexagonal-architecture/#ddd-style-hexagonal-architecture-onion-architecture-clean-architecture</text:a></text:span></text:p>
            </draw:text-box>
          </draw:frame>
        </presentation:notes>
      </draw:page>
      <draw:page draw:name="Patterns change their meanings over time" draw:style-name="dp1" draw:master-page-name="TITLE_5f_AND_5f_BODY" presentation:presentation-page-layout-name="AL2T1">
        <draw:frame draw:name="Google Shape;112;p20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22">Patterns change their meanings over time</text:span></text:p>
          </draw:text-box>
        </draw:frame>
        <draw:frame draw:name="Google Shape;113;p20" presentation:style-name="pr4" draw:text-style-name="P7" draw:layer="layout" svg:width="23.961cm" svg:height="18.479cm" svg:x="2.489cm" svg:y="6.903cm" presentation:class="outline" presentation:user-transformed="true">
          <draw:text-box>
            <text:p text:style-name="P10"><text:span text:style-name="T21">What is a </text:span><text:span text:style-name="T23">Monolith</text:span><text:span text:style-name="T21">?</text:span></text:p>
            <text:p text:style-name="P11"><text:span text:style-name="T21">– </text:span><text:span text:style-name="T21">An unstructured application?</text:span></text:p>
            <text:p text:style-name="P11"><text:span text:style-name="T21">– </text:span><text:span text:style-name="T21">A non-distributed system?</text:span></text:p>
            <text:p text:style-name="P11"><text:span text:style-name="T21">– </text:span><text:span text:style-name="T21">A system with a shared database?</text:span></text:p>
            <text:p text:style-name="P12"><text:span text:style-name="T21">– </text:span><text:span text:style-name="T21">A single unit of deployment?</text:span></text:p>
          </draw:text-box>
        </draw:frame>
        <draw:frame draw:name="Google Shape;114;p20" draw:style-name="gr3" draw:text-style-name="P17" draw:layer="layout" svg:width="18.864cm" svg:height="18.478cm" svg:x="28.598cm" svg:y="6.903cm">
          <draw:image xlink:href="Pictures/10000201000007D8000007AFE4E66A7784409AFE.png" xlink:type="simple" xlink:show="embed" xlink:actuate="onLoad">
            <text:p/>
          </draw:image>
        </draw:frame>
        <presentation:notes draw:style-name="dp2">
          <draw:page-thumbnail draw:name="Google Shape;109;g39eb482cd5a_0_32:notes" draw:style-name="gr1" draw:layer="layout" svg:width="16.932cm" svg:height="9.524cm" svg:x="1.059cm" svg:y="1.905cm" draw:page-number="8" presentation:class="page"/>
          <draw:frame draw:name="Google Shape;110;g39eb482cd5a_0_32:notes" presentation:style-name="pr13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7"><text:a xlink:href="https://metapatterns.io/analytics/ambiguous-patterns/#monolith" xlink:type="simple">https://metapatterns.io/analytics/ambiguous-patterns/#monolith</text:a></text:span></text:p>
            </draw:text-box>
          </draw:frame>
        </presentation:notes>
      </draw:page>
      <draw:page draw:name="Local and Distributed Architectures" draw:style-name="dp1" draw:master-page-name="SECTION_5f_HEADER">
        <draw:frame draw:name="Google Shape;119;p21" presentation:style-name="pr15" draw:text-style-name="P9" draw:layer="layout" svg:width="47.336cm" svg:height="4.676cm" svg:x="1.732cm" svg:y="11.949cm" presentation:class="title" presentation:user-transformed="true">
          <draw:text-box>
            <text:p text:style-name="P1"><text:span text:style-name="T11">Local and Distributed Architectures</text:span></text:p>
          </draw:text-box>
        </draw:frame>
        <presentation:notes draw:style-name="dp2">
          <draw:page-thumbnail draw:name="Google Shape;116;g39eb482cd5a_0_38:notes" draw:style-name="gr1" draw:layer="layout" svg:width="16.932cm" svg:height="9.524cm" svg:x="1.059cm" svg:y="1.905cm" draw:page-number="9" presentation:class="page"/>
          <draw:frame draw:name="Google Shape;117;g39eb482cd5a_0_38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s and Tiers" draw:style-name="dp1" draw:master-page-name="TITLE_5f_AND_5f_BODY" presentation:presentation-page-layout-name="AL2T1">
        <draw:frame draw:name="Google Shape;124;p22" presentation:style-name="pr12" draw:text-style-name="P7" draw:layer="layout" svg:width="25.189cm" svg:height="16.662cm" svg:x="13.176cm" svg:y="5.654cm" presentation:class="outline" presentation:user-transformed="true">
          <draw:text-box>
            <text:p text:style-name="P10"><text:span text:style-name="T24">Both </text:span><text:span text:style-name="T25">Layers</text:span><text:span text:style-name="T24"> and </text:span><text:span text:style-name="T25">Tiers</text:span><text:span text:style-name="T24"> allow for individual components to:</text:span></text:p>
            <text:p text:style-name="P11"><text:span text:style-name="T24">– </text:span><text:span text:style-name="T24">Differ in their properties (e.g. responsiveness).</text:span></text:p>
            <text:p text:style-name="P11"><text:span text:style-name="T24">– </text:span><text:span text:style-name="T24">Differ in technologies (programming language).</text:span></text:p>
            <text:p text:style-name="P11"><text:span text:style-name="T24">– </text:span><text:span text:style-name="T24">Be developed by dedicated teams.</text:span></text:p>
            <text:p text:style-name="P12"><text:span text:style-name="T24">Both architectures allow for a quick start of development but tend to grow unmanageable if not further partitioned by subdomain.</text:span></text:p>
          </draw:text-box>
        </draw:frame>
        <draw:frame draw:name="Google Shape;125;p22" presentation:style-name="pr5" draw:text-style-name="P8" draw:layer="layout" svg:width="47.336cm" svg:height="4.209cm" svg:x="1.732cm" svg:y="1.443cm" presentation:class="title" presentation:user-transformed="true">
          <draw:text-box>
            <text:p text:style-name="P1"><text:span text:style-name="T12">Layers</text:span><text:span text:style-name="T11"> and </text:span><text:span text:style-name="T12">Tiers</text:span></text:p>
          </draw:text-box>
        </draw:frame>
        <draw:frame draw:name="Google Shape;126;p22" presentation:style-name="pr12" draw:text-style-name="P7" draw:layer="layout" svg:width="46.451cm" svg:height="3.866cm" svg:x="1.732cm" svg:y="23.129cm" presentation:class="outline" presentation:user-transformed="true">
          <draw:text-box>
            <text:p text:style-name="P21"><text:span text:style-name="T25">Tiers</text:span><text:span text:style-name="T24">, being a distributed architecture, allow for its components to run on dedicated hardware, scale individually, differ in security, and provide a limited fault tolerance.</text:span></text:p>
          </draw:text-box>
        </draw:frame>
        <draw:custom-shape draw:name="Google Shape;127;p22" draw:style-name="gr2" draw:text-style-name="P16" draw:layer="layout" svg:width="9.439cm" svg:height="2.541cm" svg:x="1.732cm" svg:y="19.753cm">
          <text:p text:style-name="P1"><text:span text:style-name="T26">Lay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2" draw:style-name="gr2" draw:text-style-name="P16" draw:layer="layout" svg:width="9.439cm" svg:height="2.541cm" svg:x="39.628cm" svg:y="19.753cm">
          <text:p text:style-name="P1"><text:span text:style-name="T26">3-T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22" draw:style-name="gr3" draw:text-style-name="P17" draw:layer="layout" svg:width="9.439cm" svg:height="13.324cm" svg:x="1.732cm" svg:y="5.825cm">
          <draw:image xlink:href="Pictures/10000201000001E6000002AE9A7D44083973D73C.png" xlink:type="simple" xlink:show="embed" xlink:actuate="onLoad">
            <text:p/>
          </draw:image>
        </draw:frame>
        <draw:frame draw:name="Google Shape;130;p22" draw:style-name="gr3" draw:text-style-name="P17" draw:layer="layout" svg:width="9.439cm" svg:height="13.324cm" svg:x="39.627cm" svg:y="5.825cm">
          <draw:image xlink:href="Pictures/10000201000001E6000002AE3371865D29404F71.png" xlink:type="simple" xlink:show="embed" xlink:actuate="onLoad">
            <text:p/>
          </draw:image>
        </draw:frame>
        <presentation:notes draw:style-name="dp2">
          <draw:page-thumbnail draw:name="Google Shape;121;g39eb482cd5a_0_43:notes" draw:style-name="gr1" draw:layer="layout" svg:width="16.932cm" svg:height="9.524cm" svg:x="1.059cm" svg:y="1.905cm" draw:page-number="10" presentation:class="page"/>
          <draw:frame draw:name="Google Shape;122;g39eb482cd5a_0_43:notes" presentation:style-name="pr13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7"><text:a xlink:href="https://metapatterns.io/basic-metapatterns/layers/" xlink:type="simple">https://metapatterns.io/basic-metapatterns/layers/</text:a></text:span></text:p>
            </draw:text-box>
          </draw:frame>
        </presentation:notes>
      </draw:page>
      <draw:page draw:name="Device Drivers and Microservices" draw:style-name="dp1" draw:master-page-name="TITLE_5f_AND_5f_BODY" presentation:presentation-page-layout-name="AL2T1">
        <draw:frame draw:name="Google Shape;135;p23" presentation:style-name="pr17" draw:text-style-name="P7" draw:layer="layout" svg:width="24.239cm" svg:height="18.383cm" svg:x="13.28cm" svg:y="5.654cm" presentation:class="outline" presentation:user-transformed="true">
          <draw:text-box>
            <text:p text:style-name="P10"><text:span text:style-name="T24">Each </text:span><text:span text:style-name="T25">device driver</text:span><text:span text:style-name="T24"> and each </text:span><text:span text:style-name="T25">microservice</text:span><text:span text:style-name="T24">:</text:span></text:p>
            <text:p text:style-name="P11"><text:span text:style-name="T24">– </text:span><text:span text:style-name="T24">Covers a whole subdomain.</text:span></text:p>
            <text:p text:style-name="P11"><text:span text:style-name="T24">– </text:span><text:span text:style-name="T24">Is developed by a dedicated team.</text:span></text:p>
            <text:p text:style-name="P11"><text:span text:style-name="T24">– </text:span><text:span text:style-name="T24">Has its own code style and technologies.</text:span></text:p>
            <text:p text:style-name="P11"><text:span text:style-name="T24">– </text:span><text:span text:style-name="T24">Is tested and released independently of others.</text:span></text:p>
            <text:p text:style-name="P12"><text:span text:style-name="T24">Both architectures are dedicated to multi-team development of complex projects but necessarily sacrifice the simplicity and convenience of use cases that involve several subdomains.</text:span></text:p>
          </draw:text-box>
        </draw:frame>
        <draw:frame draw:name="Google Shape;136;p23" presentation:style-name="pr5" draw:text-style-name="P8" draw:layer="layout" svg:width="47.336cm" svg:height="4.242cm" svg:x="1.732cm" svg:y="1.411cm" presentation:class="title" presentation:user-transformed="true">
          <draw:text-box>
            <text:p text:style-name="P1"><text:span text:style-name="T12">Device Drivers</text:span><text:span text:style-name="T11"> and </text:span><text:span text:style-name="T12">Microservices</text:span></text:p>
          </draw:text-box>
        </draw:frame>
        <draw:frame draw:name="Google Shape;137;p23" presentation:style-name="pr17" draw:text-style-name="P7" draw:layer="layout" svg:width="47.336cm" svg:height="17.338cm" svg:x="1.732cm" svg:y="24.526cm" presentation:class="outline" presentation:user-transformed="true">
          <draw:text-box>
            <text:p text:style-name="P22"><text:span text:style-name="T25">Microservices</text:span><text:span text:style-name="T24">, thanks to their distributed nature, are quite scalable and fault tolerant.</text:span></text:p>
          </draw:text-box>
        </draw:frame>
        <draw:custom-shape draw:name="Google Shape;138;p23" draw:style-name="gr2" draw:text-style-name="P16" draw:layer="layout" svg:width="10.062cm" svg:height="2.541cm" svg:x="1.732cm" svg:y="19.753cm">
          <text:p text:style-name="P1"><text:span text:style-name="T26">OS Driv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3" draw:style-name="gr2" draw:text-style-name="P16" draw:layer="layout" svg:width="10.176cm" svg:height="2.541cm" svg:x="38.892cm" svg:y="19.753cm">
          <text:p text:style-name="P1"><text:span text:style-name="T26">Micro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3" draw:style-name="gr3" draw:text-style-name="P17" draw:layer="layout" svg:width="10.175cm" svg:height="11.297cm" svg:x="1.732cm" svg:y="8.455cm">
          <draw:image xlink:href="Pictures/10000201000002D600000326E908F7AF883C0C4F.png" xlink:type="simple" xlink:show="embed" xlink:actuate="onLoad">
            <text:p/>
          </draw:image>
        </draw:frame>
        <draw:frame draw:name="Google Shape;141;p23" draw:style-name="gr3" draw:text-style-name="P17" draw:layer="layout" svg:width="10.175cm" svg:height="11.297cm" svg:x="38.892cm" svg:y="8.455cm">
          <draw:image xlink:href="Pictures/10000201000002D6000003264C4883E29B6D72CC.png" xlink:type="simple" xlink:show="embed" xlink:actuate="onLoad">
            <text:p/>
          </draw:image>
        </draw:frame>
        <presentation:notes draw:style-name="dp2">
          <draw:page-thumbnail draw:name="Google Shape;132;g39eca11a51e_0_12:notes" draw:style-name="gr1" draw:layer="layout" svg:width="16.932cm" svg:height="9.524cm" svg:x="1.059cm" svg:y="1.905cm" draw:page-number="11" presentation:class="page"/>
          <draw:frame draw:name="Google Shape;133;g39eca11a51e_0_12:notes" presentation:style-name="pr13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7"><text:a xlink:href="https://metapatterns.io/basic-metapatterns/services/" xlink:type="simple">https://metapatterns.io/basic-metapatterns/services/</text:a></text:span></text:p>
            </draw:text-box>
          </draw:frame>
        </presentation:notes>
      </draw:page>
      <draw:page draw:name="Pipes and Filters and Event-Driven Architecture" draw:style-name="dp1" draw:master-page-name="TITLE_5f_AND_5f_BODY" presentation:presentation-page-layout-name="AL2T1">
        <draw:frame draw:name="Google Shape;146;p24" presentation:style-name="pr12" draw:text-style-name="P7" draw:layer="layout" svg:width="46.451cm" svg:height="8.814cm" svg:x="1.732cm" svg:y="5.654cm" presentation:class="outline" presentation:user-transformed="true">
          <draw:text-box>
            <text:p text:style-name="P10"><text:span text:style-name="T24">Components of </text:span><text:span text:style-name="T25">Pipes and Filters</text:span><text:span text:style-name="T24"> or </text:span><text:span text:style-name="T25">Choreographed Event-Driven Architecture</text:span><text:span text:style-name="T24">:</text:span></text:p>
            <text:p text:style-name="P11"><text:span text:style-name="T24">– </text:span><text:span text:style-name="T24">Are easy to scale, add or replace without affecting the whole system.</text:span></text:p>
            <text:p text:style-name="P11"><text:span text:style-name="T24">– </text:span><text:span text:style-name="T24">Can be implemented and tested in isolation through event or data stream replay.</text:span></text:p>
            <text:p text:style-name="P12"><text:span text:style-name="T24">– </text:span><text:span text:style-name="T24">May differ in technologies.</text:span></text:p>
          </draw:text-box>
        </draw:frame>
        <draw:frame draw:name="Google Shape;147;p24" presentation:style-name="pr5" draw:text-style-name="P8" draw:layer="layout" svg:width="47.336cm" svg:height="4.374cm" svg:x="1.732cm" svg:y="1.279cm" presentation:class="title" presentation:user-transformed="true">
          <draw:text-box>
            <text:p text:style-name="P1"><text:span text:style-name="T27">Pipes and Filters</text:span><text:span text:style-name="T28"> and </text:span><text:span text:style-name="T27">Event-Driven Architecture</text:span></text:p>
          </draw:text-box>
        </draw:frame>
        <draw:frame draw:name="Google Shape;148;p24" presentation:style-name="pr12" draw:text-style-name="P7" draw:layer="layout" svg:width="46.451cm" svg:height="3.866cm" svg:x="1.732cm" svg:y="23.129cm" presentation:class="outline" presentation:user-transformed="true">
          <draw:text-box>
            <text:p text:style-name="P21"><text:span text:style-name="T25">Choreographed Event-Driven Architecture</text:span><text:span text:style-name="T24"> can utilize resources of multiple servers while </text:span><text:span text:style-name="T25">Pipes and Filters</text:span><text:span text:style-name="T24"> are usually limited to multiple CPU cores of a single workstation.</text:span></text:p>
          </draw:text-box>
        </draw:frame>
        <draw:custom-shape draw:name="Google Shape;149;p24" draw:style-name="gr2" draw:text-style-name="P16" draw:layer="layout" svg:width="13.596cm" svg:height="2.541cm" svg:x="2.119cm" svg:y="21.021cm">
          <text:p text:style-name="P1"><text:span text:style-name="T26">Pipes and Fil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4" draw:style-name="gr2" draw:text-style-name="P16" draw:layer="layout" svg:width="16.089cm" svg:height="2.541cm" svg:x="32.226cm" svg:y="21.021cm">
          <text:p text:style-name="P1"><text:span text:style-name="T26">Event-Driven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24" draw:style-name="gr3" draw:text-style-name="P17" draw:layer="layout" svg:width="13.441cm" svg:height="6.404cm" svg:x="2.196cm" svg:y="14.887cm">
          <draw:image xlink:href="Pictures/1000020100000354000001960FB647B62585239A.png" xlink:type="simple" xlink:show="embed" xlink:actuate="onLoad">
            <text:p/>
          </draw:image>
        </draw:frame>
        <draw:custom-shape draw:name="Google Shape;152;p24" draw:style-name="gr2" draw:text-style-name="P16" draw:layer="layout" svg:width="13.441cm" svg:height="6.851cm" svg:x="18.237cm" svg:y="14.723cm">
          <text:p text:style-name="P21"><text:span text:style-name="T24">Both architectures specialize in processing streams of closely related data packets or even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24" draw:style-name="gr3" draw:text-style-name="P17" draw:layer="layout" svg:width="13.152cm" svg:height="6.404cm" svg:x="34.199cm" svg:y="14.615cm">
          <draw:image xlink:href="Pictures/100002010000034E0000019CCFE2489CDDA13ADD.png" xlink:type="simple" xlink:show="embed" xlink:actuate="onLoad">
            <text:p/>
          </draw:image>
        </draw:frame>
        <presentation:notes draw:style-name="dp2">
          <draw:page-thumbnail draw:name="Google Shape;143;g39eca11a51e_0_20:notes" draw:style-name="gr1" draw:layer="layout" svg:width="16.932cm" svg:height="9.524cm" svg:x="1.059cm" svg:y="1.905cm" draw:page-number="12" presentation:class="page"/>
          <draw:frame draw:name="Google Shape;144;g39eca11a51e_0_20:notes" presentation:style-name="pr13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7"><text:a xlink:href="https://metapatterns.io/basic-metapatterns/pipeline/" xlink:type="simple">https://metapatterns.io/basic-metapatterns/pipeline/</text:a></text:span></text:p>
            </draw:text-box>
          </draw:frame>
        </presentation:notes>
      </draw:page>
      <draw:page draw:name="What have we done?" draw:style-name="dp1" draw:master-page-name="TITLE_5f_AND_5f_BODY" presentation:presentation-page-layout-name="AL2T1">
        <draw:frame draw:name="Google Shape;158;p25" presentation:style-name="pr5" draw:text-style-name="P8" draw:layer="layout" svg:width="47.336cm" svg:height="3.384cm" svg:x="1.732cm" svg:y="3.018cm" presentation:class="title" presentation:user-transformed="true">
          <draw:text-box>
            <text:p text:style-name="P1"><text:span text:style-name="T11">What have we done?</text:span></text:p>
          </draw:text-box>
        </draw:frame>
        <draw:frame draw:name="Google Shape;159;p25" presentation:style-name="pr4" draw:text-style-name="P7" draw:layer="layout" svg:width="47.336cm" svg:height="18.979cm" svg:x="1.732cm" svg:y="6.403cm" presentation:class="outline" presentation:user-transformed="true">
          <draw:text-box>
            <text:p text:style-name="P23"><text:span text:style-name="T29">As we see, once the system properties rooted </text:span></text:p>
            <text:p text:style-name="P24"><text:span text:style-name="T29">in distribution are segregated, whatever remains </text:span></text:p>
            <text:p text:style-name="P24"><text:span text:style-name="T29">of a distributed architecture is identical to </text:span></text:p>
            <text:p text:style-name="P25"><text:span text:style-name="T29">a decades-old pattern for local applications.</text:span></text:p>
          </draw:text-box>
        </draw:frame>
        <presentation:notes draw:style-name="dp2">
          <draw:page-thumbnail draw:name="Google Shape;155;g39eca11a51e_0_27:notes" draw:style-name="gr1" draw:layer="layout" svg:width="16.932cm" svg:height="9.524cm" svg:x="1.059cm" svg:y="1.905cm" draw:page-number="13" presentation:class="page"/>
          <draw:frame draw:name="Google Shape;156;g39eca11a51e_0_27:notes" presentation:style-name="pr13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0">The continuity of architectures between an unstructured monolithic and distributed systems </text:span><text:span text:style-name="T17"><text:a xlink:href="https://metapatterns.io/basic-metapatterns/monolith/#relations" xlink:type="simple">https://metapatterns.io/basic-metapatterns/monolith/#relations</text:a></text:span></text:p>
            </draw:text-box>
          </draw:frame>
        </presentation:notes>
      </draw:page>
      <draw:page draw:name="Patterns of Patterns" draw:style-name="dp1" draw:master-page-name="SECTION_5f_HEADER">
        <draw:frame draw:name="Google Shape;164;p26" presentation:style-name="pr15" draw:text-style-name="P9" draw:layer="layout" svg:width="47.336cm" svg:height="4.676cm" svg:x="1.732cm" svg:y="11.949cm" presentation:class="title" presentation:user-transformed="true">
          <draw:text-box>
            <text:p text:style-name="P1"><text:span text:style-name="T11">Patterns of Patterns</text:span></text:p>
          </draw:text-box>
        </draw:frame>
        <presentation:notes draw:style-name="dp2">
          <draw:page-thumbnail draw:name="Google Shape;161;g39eca11a51e_0_33:notes" draw:style-name="gr1" draw:layer="layout" svg:width="16.932cm" svg:height="9.524cm" svg:x="1.059cm" svg:y="1.905cm" draw:page-number="14" presentation:class="page"/>
          <draw:frame draw:name="Google Shape;162;g39eca11a51e_0_33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id we compare architectures?" draw:style-name="dp1" draw:master-page-name="TITLE_5f_AND_5f_BODY" presentation:presentation-page-layout-name="AL2T1">
        <draw:frame draw:name="Google Shape;169;p27" presentation:style-name="pr4" draw:text-style-name="P7" draw:layer="layout" svg:width="24.629cm" svg:height="16.662cm" svg:x="1.732cm" svg:y="5.654cm" presentation:class="outline" presentation:user-transformed="true">
          <draw:text-box>
            <text:p text:style-name="P10"><text:span text:style-name="T30">We drew them with a common system of coordinates:</text:span></text:p>
            <text:p text:style-name="P11"><text:span text:style-name="T30">– </text:span><text:span text:style-name="T30">Abstractness</text:span></text:p>
            <text:p text:style-name="P11"><text:span text:style-name="T30">– </text:span><text:span text:style-name="T30">Subdomain</text:span></text:p>
            <text:p text:style-name="P12"><text:span text:style-name="T30">– </text:span><text:span text:style-name="T30">Sharding</text:span></text:p>
          </draw:text-box>
        </draw:frame>
        <draw:frame draw:name="Google Shape;170;p27" presentation:style-name="pr5" draw:text-style-name="P8" draw:layer="layout" svg:width="47.336cm" svg:height="4.242cm" svg:x="1.732cm" svg:y="1.411cm" presentation:class="title" presentation:user-transformed="true">
          <draw:text-box>
            <text:p text:style-name="P1"><text:span text:style-name="T11">How did we compare architectures?</text:span></text:p>
          </draw:text-box>
        </draw:frame>
        <draw:frame draw:name="Google Shape;171;p27" presentation:style-name="pr12" draw:text-style-name="P7" draw:layer="layout" svg:width="46.451cm" svg:height="3.866cm" svg:x="1.732cm" svg:y="23.129cm" presentation:class="outline" presentation:user-transformed="true">
          <draw:text-box>
            <text:p text:style-name="P22"><text:span text:style-name="T31">Structure determines function!</text:span></text:p>
          </draw:text-box>
        </draw:frame>
        <draw:frame draw:name="Google Shape;172;p27" draw:style-name="gr3" draw:text-style-name="P17" draw:layer="layout" svg:width="16.324cm" svg:height="15.781cm" svg:x="28.436cm" svg:y="6.095cm">
          <draw:image xlink:href="Pictures/10000201000002EF000002D67A2AEE6182D8FD5C.png" xlink:type="simple" xlink:show="embed" xlink:actuate="onLoad">
            <text:p/>
          </draw:image>
        </draw:frame>
        <presentation:notes draw:style-name="dp2">
          <draw:page-thumbnail draw:name="Google Shape;166;g39ecdd5df51_0_0:notes" draw:style-name="gr1" draw:layer="layout" svg:width="16.932cm" svg:height="9.524cm" svg:x="1.059cm" svg:y="1.905cm" draw:page-number="15" presentation:class="page"/>
          <draw:frame draw:name="Google Shape;167;g39ecdd5df51_0_0:notes" presentation:style-name="pr13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7"><text:a xlink:href="https://metapatterns.io/introduction/metapatterns/" xlink:type="simple">https://metapatterns.io/introduction/metapatterns/</text:a></text:span></text:p>
            </draw:text-box>
          </draw:frame>
        </presentation:notes>
      </draw:page>
      <draw:page draw:name="Metapatterns" draw:style-name="dp1" draw:master-page-name="TITLE_5f_AND_5f_BODY" presentation:presentation-page-layout-name="AL2T1">
        <draw:frame draw:name="Google Shape;177;p28" presentation:style-name="pr5" draw:text-style-name="P8" draw:layer="layout" svg:width="47.336cm" svg:height="3.384cm" svg:x="1.732cm" svg:y="3.018cm" presentation:class="title" presentation:user-transformed="true">
          <draw:text-box>
            <text:p text:style-name="P1"><text:span text:style-name="T11">Metapatterns</text:span></text:p>
          </draw:text-box>
        </draw:frame>
        <draw:frame draw:name="Google Shape;178;p28" presentation:style-name="pr4" draw:text-style-name="P7" draw:layer="layout" svg:width="47.336cm" svg:height="18.979cm" svg:x="1.732cm" svg:y="6.403cm" presentation:class="outline" presentation:user-transformed="true">
          <draw:text-box>
            <text:p text:style-name="P26"><text:span text:style-name="T32">A </text:span><text:span text:style-name="T33">metapattern</text:span><text:span text:style-name="T32"> is a cluster of patterns related in their structure and thus also in their properties</text:span></text:p>
          </draw:text-box>
        </draw:frame>
        <presentation:notes draw:style-name="dp2">
          <draw:page-thumbnail draw:name="Google Shape;174;g39ecdd5df51_0_13:notes" draw:style-name="gr1" draw:layer="layout" svg:width="16.932cm" svg:height="9.524cm" svg:x="1.059cm" svg:y="1.905cm" draw:page-number="16" presentation:class="page"/>
          <draw:frame draw:name="Google Shape;175;g39ecdd5df51_0_13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re are few metapatterns" draw:style-name="dp1" draw:master-page-name="TITLE_5f_AND_5f_BODY" presentation:presentation-page-layout-name="AL2T1">
        <draw:frame draw:name="Google Shape;183;p29" presentation:style-name="pr5" draw:text-style-name="P8" draw:layer="layout" svg:width="47.336cm" svg:height="4.742cm" svg:x="1.732cm" svg:y="1.659cm" presentation:class="title" presentation:user-transformed="true">
          <draw:text-box>
            <text:p text:style-name="P1"><text:span text:style-name="T11">There are few metapatterns</text:span></text:p>
          </draw:text-box>
        </draw:frame>
        <draw:frame draw:name="Google Shape;184;p29" presentation:style-name="pr4" draw:text-style-name="P7" draw:layer="layout" svg:width="47.336cm" svg:height="18.979cm" svg:x="1.732cm" svg:y="6.403cm" presentation:class="outline" presentation:user-transformed="true">
          <draw:text-box>
            <text:p text:style-name="P23"><text:span text:style-name="T32">As a metapattern is defined by its structure, </text:span></text:p>
            <text:p text:style-name="P24"><text:span text:style-name="T32">and the structure is a geometry in a 3D space,</text:span></text:p>
            <text:p text:style-name="P24"><text:span text:style-name="T32">there are only so many metapatterns.</text:span></text:p>
            <text:p text:style-name="P24"><text:span text:style-name="T29">Therefore hundreds of patterns are reduced</text:span></text:p>
            <text:p text:style-name="P25"><text:span text:style-name="T29">to several clusters with manifest properties.</text:span></text:p>
          </draw:text-box>
        </draw:frame>
        <presentation:notes draw:style-name="dp2">
          <draw:page-thumbnail draw:name="Google Shape;180;g39ecdd5df51_0_18:notes" draw:style-name="gr1" draw:layer="layout" svg:width="16.932cm" svg:height="9.524cm" svg:x="1.059cm" svg:y="1.905cm" draw:page-number="17" presentation:class="page"/>
          <draw:frame draw:name="Google Shape;181;g39ecdd5df51_0_18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benefits of having a taxonomy of patterns" draw:style-name="dp1" draw:master-page-name="TITLE_5f_AND_5f_BODY" presentation:presentation-page-layout-name="AL2T1">
        <draw:frame draw:name="Google Shape;189;p30" presentation:style-name="pr5" draw:text-style-name="P8" draw:layer="layout" svg:width="47.336cm" svg:height="4.742cm" svg:x="1.732cm" svg:y="1.659cm" presentation:class="title" presentation:user-transformed="true">
          <draw:text-box>
            <text:p text:style-name="P1"><text:span text:style-name="T34">The benefits of having a taxonomy of patterns</text:span></text:p>
          </draw:text-box>
        </draw:frame>
        <draw:frame draw:name="Google Shape;190;p30" presentation:style-name="pr14" draw:text-style-name="P7" draw:layer="layout" svg:width="47.336cm" svg:height="18.979cm" svg:x="1.732cm" svg:y="6.403cm" presentation:class="outline" presentation:user-transformed="true">
          <draw:text-box>
            <text:p text:style-name="P10"><text:span text:style-name="T35">– </text:span><text:span text:style-name="T35">A hierarchical classification is easy to learn and study.</text:span></text:p>
            <text:p text:style-name="P27"><text:span text:style-name="T35">– </text:span><text:span text:style-name="T35">Duplicate or ambiguous entities become obvious.</text:span></text:p>
            <text:p text:style-name="P28"><text:span text:style-name="T35">– </text:span><text:span text:style-name="T35">Novel solutions may be found through mapping architectures between domains.</text:span></text:p>
          </draw:text-box>
        </draw:frame>
        <presentation:notes draw:style-name="dp2">
          <draw:page-thumbnail draw:name="Google Shape;186;g39fdf05ae7b_0_0:notes" draw:style-name="gr1" draw:layer="layout" svg:width="16.932cm" svg:height="9.524cm" svg:x="1.059cm" svg:y="1.905cm" draw:page-number="18" presentation:class="page"/>
          <draw:frame draw:name="Google Shape;187;g39fdf05ae7b_0_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nown Metapatterns" draw:style-name="dp1" draw:master-page-name="SECTION_5f_HEADER">
        <draw:frame draw:name="Google Shape;195;p31" presentation:style-name="pr15" draw:text-style-name="P9" draw:layer="layout" svg:width="47.336cm" svg:height="4.676cm" svg:x="1.732cm" svg:y="11.949cm" presentation:class="title" presentation:user-transformed="true">
          <draw:text-box>
            <text:p text:style-name="P1"><text:span text:style-name="T11">Known Metapatterns</text:span></text:p>
          </draw:text-box>
        </draw:frame>
        <presentation:notes draw:style-name="dp2">
          <draw:page-thumbnail draw:name="Google Shape;192;g39ecdd5df51_0_23:notes" draw:style-name="gr1" draw:layer="layout" svg:width="16.932cm" svg:height="9.524cm" svg:x="1.059cm" svg:y="1.905cm" draw:page-number="19" presentation:class="page"/>
          <draw:frame draw:name="Google Shape;193;g39ecdd5df51_0_23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Metapatterns" draw:style-name="dp1" draw:master-page-name="TITLE_5f_ONLY" presentation:presentation-page-layout-name="AL4T19">
        <draw:frame draw:name="Google Shape;200;p32" draw:style-name="standard" draw:layer="layout" svg:width="40.215cm" svg:height="17.903cm" svg:x="5.292cm" svg:y="5.92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<text:span text:style-name="T14">Monolith</text:span></text:p>
              </table:table-cell>
              <table:table-cell>
                <text:p text:style-name="P1"><text:span text:style-name="T14">Shards</text:span></text:p>
              </table:table-cell>
              <table:table-cell>
                <text:p text:style-name="P1"><text:span text:style-name="T14">Layers</text:span></text:p>
              </table:table-cell>
              <table:table-cell>
                <text:p text:style-name="P1"><text:span text:style-name="T14">Services</text:span></text:p>
              </table:table-cell>
              <table:table-cell>
                <text:p text:style-name="P1"><text:span text:style-name="T14">Pipeline</text:span></text:p>
              </table:table-cell>
            </table:table-row>
            <table:table-row table:style-name="ro3" table:default-cell-style-name="ce1">
              <table:table-cell>
                <text:p text:style-name="P23"><text:span text:style-name="T36">Reactor, Proactor,</text:span></text:p>
                <text:p text:style-name="P23"><text:span text:style-name="T36">Half-Sync / Half-Async,</text:span></text:p>
                <text:p text:style-name="P23"><text:span text:style-name="T36">(Re)Actor-with-</text:span></text:p>
                <text:p text:style-name="P23"><text:span text:style-name="T36">Extractors</text:span></text:p>
              </table:table-cell>
              <table:table-cell>
                <text:p text:style-name="P23"><text:span text:style-name="T36">Shards, Partitions, Instances, Replicas</text:span></text:p>
              </table:table-cell>
              <table:table-cell>
                <text:p text:style-name="P23"><text:span text:style-name="T36">Layers, Tiers</text:span></text:p>
              </table:table-cell>
              <table:table-cell>
                <text:p text:style-name="P23"><text:span text:style-name="T36">Service-Based Architecture, Modular Monolith, Microservices, Actors</text:span></text:p>
              </table:table-cell>
              <table:table-cell>
                <text:p text:style-name="P23"><text:span text:style-name="T36">Pipes and Filters, Choreographed Event-Driven Architecture, Data Mesh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201;p32" presentation:style-name="pr23" draw:text-style-name="P8" draw:layer="layout" svg:width="47.336cm" svg:height="4.287cm" svg:x="1.732cm" svg:y="1.366cm" presentation:class="title" presentation:user-transformed="true">
          <draw:text-box>
            <text:p text:style-name="P1"><text:span text:style-name="T11">Basic Metapatterns</text:span></text:p>
          </draw:text-box>
        </draw:frame>
        <draw:frame draw:name="Google Shape;202;p32" draw:style-name="gr3" draw:text-style-name="P17" draw:layer="layout" svg:width="8.042cm" svg:height="5.386cm" svg:x="5.292cm" svg:y="5.928cm">
          <draw:image xlink:href="Pictures/100002010000036800000248E1C38877B19AF6DB.png" xlink:type="simple" xlink:show="embed" xlink:actuate="onLoad">
            <text:p/>
          </draw:image>
        </draw:frame>
        <draw:frame draw:name="Google Shape;203;p32" draw:style-name="gr3" draw:text-style-name="P17" draw:layer="layout" svg:width="8.042cm" svg:height="5.349cm" svg:x="13.335cm" svg:y="5.928cm">
          <draw:image xlink:href="Pictures/100002010000036E00000248292D0F24516EC77D.png" xlink:type="simple" xlink:show="embed" xlink:actuate="onLoad">
            <text:p/>
          </draw:image>
        </draw:frame>
        <draw:frame draw:name="Google Shape;204;p32" draw:style-name="gr3" draw:text-style-name="P17" draw:layer="layout" svg:width="8.042cm" svg:height="5.423cm" svg:x="21.378cm" svg:y="5.928cm">
          <draw:image xlink:href="Pictures/10000201000003680000024C71EF9C01601D40B0.png" xlink:type="simple" xlink:show="embed" xlink:actuate="onLoad">
            <text:p/>
          </draw:image>
        </draw:frame>
        <draw:frame draw:name="Google Shape;205;p32" draw:style-name="gr3" draw:text-style-name="P17" draw:layer="layout" svg:width="8.073cm" svg:height="5.462cm" svg:x="29.422cm" svg:y="5.928cm">
          <draw:image xlink:href="Pictures/10000201000003680000024EADC46E96DF6B24B2.png" xlink:type="simple" xlink:show="embed" xlink:actuate="onLoad">
            <text:p/>
          </draw:image>
        </draw:frame>
        <draw:frame draw:name="Google Shape;206;p32" draw:style-name="gr3" draw:text-style-name="P17" draw:layer="layout" svg:width="8.073cm" svg:height="5.388cm" svg:x="37.465cm" svg:y="5.928cm">
          <draw:image xlink:href="Pictures/100002010000036B0000024866FD1D1C968D06C2.png" xlink:type="simple" xlink:show="embed" xlink:actuate="onLoad">
            <text:p/>
          </draw:image>
        </draw:frame>
        <presentation:notes draw:style-name="dp2">
          <draw:page-thumbnail draw:name="Google Shape;197;g39ecdd5df51_0_28:notes" draw:style-name="gr1" draw:layer="layout" svg:width="16.932cm" svg:height="9.524cm" svg:x="1.059cm" svg:y="1.905cm" draw:page-number="20" presentation:class="page"/>
          <draw:frame draw:name="Google Shape;198;g39ecdd5df51_0_28:notes" presentation:style-name="pr24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0">These are the building blocks for more complex architectures </text:span><text:span text:style-name="T17"><text:a xlink:href="https://metapatterns.io/basic-metapatterns/" xlink:type="simple">https://metapatterns.io/basic-metapatterns/</text:a></text:span></text:p>
            </draw:text-box>
          </draw:frame>
        </presentation:notes>
      </draw:page>
      <draw:page draw:name="Extension Metapatterns" draw:style-name="dp1" draw:master-page-name="TITLE_5f_ONLY" presentation:presentation-page-layout-name="AL4T19">
        <draw:frame draw:name="Google Shape;211;p33" presentation:style-name="pr23" draw:text-style-name="P8" draw:layer="layout" svg:width="47.336cm" svg:height="4.287cm" svg:x="1.732cm" svg:y="1.366cm" presentation:class="title" presentation:user-transformed="true">
          <draw:text-box>
            <text:p text:style-name="P1"><text:span text:style-name="T11">Extension Metapatterns</text:span></text:p>
          </draw:text-box>
        </draw:frame>
        <draw:frame draw:name="Google Shape;212;p33" draw:style-name="standard" draw:layer="layout" svg:width="40.215cm" svg:height="20.749cm" svg:x="5.292cm" svg:y="5.65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>
                <text:p text:style-name="P1"><text:span text:style-name="T14">Middleware</text:span></text:p>
              </table:table-cell>
              <table:table-cell>
                <text:p text:style-name="P1"><text:span text:style-name="T14">Shared Repository</text:span></text:p>
              </table:table-cell>
              <table:table-cell>
                <text:p text:style-name="P1"><text:span text:style-name="T14">Proxy</text:span></text:p>
              </table:table-cell>
              <table:table-cell>
                <text:p text:style-name="P1"><text:span text:style-name="T14">Orchestrator</text:span></text:p>
              </table:table-cell>
              <table:table-cell>
                <text:p text:style-name="P1"><text:span text:style-name="T14">Combined Component</text:span></text:p>
              </table:table-cell>
            </table:table-row>
            <table:table-row table:style-name="ro6" table:default-cell-style-name="ce4">
              <table:table-cell>
                <text:p text:style-name="P23"><text:span text:style-name="T36">Message Broker, Deployment Manager</text:span></text:p>
              </table:table-cell>
              <table:table-cell>
                <text:p text:style-name="P23"><text:span text:style-name="T36">Shared Database, Shared Memory, Shared FS, Blackboard, Data Grid</text:span></text:p>
              </table:table-cell>
              <table:table-cell>
                <text:p text:style-name="P23"><text:span text:style-name="T36">Firewall, Response Cache, Load Balancer, Reverse Proxy, Adapter, ACL, OAL, HAL, etc.</text:span></text:p>
              </table:table-cell>
              <table:table-cell>
                <text:p text:style-name="P23"><text:span text:style-name="T36">Mediator, Facade, Scatter-Gather,Process Manager, Saga, Transaction Script</text:span></text:p>
              </table:table-cell>
              <table:table-cell>
                <text:p text:style-name="P23"><text:span text:style-name="T36">Message Bus, API Gateway, Event Mediator, ESB, Service Mesh, Space-Based Architectur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213;p33" draw:style-name="gr3" draw:text-style-name="P17" draw:layer="layout" svg:width="8.042cm" svg:height="6.733cm" svg:x="5.292cm" svg:y="5.654cm">
          <draw:image xlink:href="Pictures/1000020100000368000002DAB61413CE8B37DF4B.png" xlink:type="simple" xlink:show="embed" xlink:actuate="onLoad">
            <text:p/>
          </draw:image>
        </draw:frame>
        <draw:frame draw:name="Google Shape;214;p33" draw:style-name="gr3" draw:text-style-name="P17" draw:layer="layout" svg:width="8.042cm" svg:height="6.733cm" svg:x="13.335cm" svg:y="5.654cm">
          <draw:image xlink:href="Pictures/1000020100000368000002DA1F748DE430DA62B4.png" xlink:type="simple" xlink:show="embed" xlink:actuate="onLoad">
            <text:p/>
          </draw:image>
        </draw:frame>
        <draw:frame draw:name="Google Shape;215;p33" draw:style-name="gr3" draw:text-style-name="P17" draw:layer="layout" svg:width="8.042cm" svg:height="6.714cm" svg:x="21.378cm" svg:y="5.654cm">
          <draw:image xlink:href="Pictures/1000020100000368000002D8A2BE6187220BDC61.png" xlink:type="simple" xlink:show="embed" xlink:actuate="onLoad">
            <text:p/>
          </draw:image>
        </draw:frame>
        <draw:frame draw:name="Google Shape;216;p33" draw:style-name="gr3" draw:text-style-name="P17" draw:layer="layout" svg:width="8.042cm" svg:height="6.714cm" svg:x="29.422cm" svg:y="5.654cm">
          <draw:image xlink:href="Pictures/1000020100000368000002D843FD9E1836C86E2F.png" xlink:type="simple" xlink:show="embed" xlink:actuate="onLoad">
            <text:p/>
          </draw:image>
        </draw:frame>
        <draw:frame draw:name="Google Shape;217;p33" draw:style-name="gr3" draw:text-style-name="P17" draw:layer="layout" svg:width="8.02cm" svg:height="6.714cm" svg:x="37.465cm" svg:y="5.654cm">
          <draw:image xlink:href="Pictures/1000020100000368000002DAF4AA6AD5D3F8F90C.png" xlink:type="simple" xlink:show="embed" xlink:actuate="onLoad">
            <text:p/>
          </draw:image>
        </draw:frame>
        <presentation:notes draw:style-name="dp2">
          <draw:page-thumbnail draw:name="Google Shape;208;g39f6524f0af_0_2:notes" draw:style-name="gr1" draw:layer="layout" svg:width="16.932cm" svg:height="9.524cm" svg:x="1.059cm" svg:y="1.905cm" draw:page-number="21" presentation:class="page"/>
          <draw:frame draw:name="Google Shape;209;g39f6524f0af_0_2:notes" presentation:style-name="pr24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0">A system-wide layer implements cross-cutting concerns for other components dedicated to business logic </text:span><text:span text:style-name="T17"><text:a xlink:href="https://metapatterns.io/extension-metapatterns/" xlink:type="simple">https://metapatterns.io/extension-metapatterns/</text:a></text:span></text:p>
            </draw:text-box>
          </draw:frame>
        </presentation:notes>
      </draw:page>
      <draw:page draw:name="Fragmented Metapatterns" draw:style-name="dp1" draw:master-page-name="TITLE_5f_ONLY" presentation:presentation-page-layout-name="AL4T19">
        <draw:frame draw:name="Google Shape;222;p34" presentation:style-name="pr23" draw:text-style-name="P8" draw:layer="layout" svg:width="47.336cm" svg:height="4.287cm" svg:x="1.732cm" svg:y="1.366cm" presentation:class="title" presentation:user-transformed="true">
          <draw:text-box>
            <text:p text:style-name="P1"><text:span text:style-name="T11">Fragmented Metapatterns</text:span></text:p>
          </draw:text-box>
        </draw:frame>
        <draw:frame draw:name="Google Shape;223;p34" draw:style-name="standard" draw:layer="layout" svg:width="40.215cm" svg:height="19.991cm" svg:x="5.292cm" svg:y="5.82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7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3">
              <table:table-cell>
                <text:p text:style-name="P1"><text:span text:style-name="T14">Layered Services</text:span></text:p>
              </table:table-cell>
              <table:table-cell>
                <text:p text:style-name="P1"><text:span text:style-name="T14">Polyglot Persistence</text:span></text:p>
              </table:table-cell>
              <table:table-cell>
                <text:p text:style-name="P1"><text:span text:style-name="T14">Backends for Frontends</text:span></text:p>
              </table:table-cell>
              <table:table-cell>
                <text:p text:style-name="P1"><text:span text:style-name="T14">SOA</text:span></text:p>
              </table:table-cell>
              <table:table-cell>
                <text:p text:style-name="P1"><text:span text:style-name="T14">Hierarchy</text:span></text:p>
              </table:table-cell>
            </table:table-row>
            <table:table-row table:style-name="ro9" table:default-cell-style-name="ce4">
              <table:table-cell>
                <text:p text:style-name="P23"><text:span text:style-name="T37">Orchestrated 3-Layered Services, Choreographed 2-Layered Services, CQRS</text:span></text:p>
              </table:table-cell>
              <table:table-cell>
                <text:p text:style-name="P23"><text:span text:style-name="T37">Specialized Databases, CDN, Read-Only Replicas, Reporting Database</text:span></text:p>
              </table:table-cell>
              <table:table-cell>
                <text:p text:style-name="P23"><text:span text:style-name="T37">Multiple Proxies, Orchestrators or API Gateways</text:span></text:p>
              </table:table-cell>
              <table:table-cell>
                <text:p text:style-name="P23"><text:span text:style-name="T37">Enterprise SOA, Domain- Oriented Microservice Architecture, Distributed Monolith</text:span></text:p>
              </table:table-cell>
              <table:table-cell>
                <text:p text:style-name="P23"><text:span text:style-name="T37">Top-Down Hierarchy, PAC, HMVC, Bus of Buses, WSO2 Cell-Based Architectur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224;p34" draw:style-name="gr3" draw:text-style-name="P17" draw:layer="layout" svg:width="8.042cm" svg:height="6.251cm" svg:x="5.292cm" svg:y="5.928cm">
          <draw:image xlink:href="Pictures/10000201000004280000033BEFBA33C2BDD9E9D2.png" xlink:type="simple" xlink:show="embed" xlink:actuate="onLoad">
            <text:p/>
          </draw:image>
        </draw:frame>
        <draw:frame draw:name="Google Shape;225;p34" draw:style-name="gr3" draw:text-style-name="P17" draw:layer="layout" svg:width="8.042cm" svg:height="6.19cm" svg:x="13.335cm" svg:y="5.928cm">
          <draw:image xlink:href="Pictures/100002010000042800000333B635666B69BDAFB5.png" xlink:type="simple" xlink:show="embed" xlink:actuate="onLoad">
            <text:p/>
          </draw:image>
        </draw:frame>
        <draw:frame draw:name="Google Shape;226;p34" draw:style-name="gr3" draw:text-style-name="P17" draw:layer="layout" svg:width="8.072cm" svg:height="6.251cm" svg:x="21.364cm" svg:y="5.828cm">
          <draw:image xlink:href="Pictures/1000020100000428000003387B57918175A62B01.png" xlink:type="simple" xlink:show="embed" xlink:actuate="onLoad">
            <text:p/>
          </draw:image>
        </draw:frame>
        <draw:frame draw:name="Google Shape;227;p34" draw:style-name="gr3" draw:text-style-name="P17" draw:layer="layout" svg:width="8.072cm" svg:height="6.251cm" svg:x="29.451cm" svg:y="5.928cm">
          <draw:image xlink:href="Pictures/100002010000042800000338C516AFF2D07AB9BF.png" xlink:type="simple" xlink:show="embed" xlink:actuate="onLoad">
            <text:p/>
          </draw:image>
        </draw:frame>
        <draw:frame draw:name="Google Shape;228;p34" draw:style-name="gr3" draw:text-style-name="P17" draw:layer="layout" svg:width="8.072cm" svg:height="6.251cm" svg:x="37.465cm" svg:y="5.928cm">
          <draw:image xlink:href="Pictures/100002010000042800000338A7BE94E48A0E7F15.png" xlink:type="simple" xlink:show="embed" xlink:actuate="onLoad">
            <text:p/>
          </draw:image>
        </draw:frame>
        <presentation:notes draw:style-name="dp2">
          <draw:page-thumbnail draw:name="Google Shape;219;g39f6524f0af_0_8:notes" draw:style-name="gr1" draw:layer="layout" svg:width="16.932cm" svg:height="9.524cm" svg:x="1.059cm" svg:y="1.905cm" draw:page-number="22" presentation:class="page"/>
          <draw:frame draw:name="Google Shape;220;g39f6524f0af_0_8:notes" presentation:style-name="pr24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0">These are architectures built from relatively small components </text:span><text:span text:style-name="T17"><text:a xlink:href="https://metapatterns.io/fragmented-metapatterns/" xlink:type="simple">https://metapatterns.io/fragmented-metapatterns/</text:a></text:span></text:p>
            </draw:text-box>
          </draw:frame>
        </presentation:notes>
      </draw:page>
      <draw:page draw:name="Implementation Metapatterns" draw:style-name="dp1" draw:master-page-name="TITLE_5f_ONLY" presentation:presentation-page-layout-name="AL4T19">
        <draw:frame draw:name="Google Shape;233;p35" presentation:style-name="pr23" draw:text-style-name="P8" draw:layer="layout" svg:width="47.336cm" svg:height="4.287cm" svg:x="1.732cm" svg:y="1.366cm" presentation:class="title" presentation:user-transformed="true">
          <draw:text-box>
            <text:p text:style-name="P1"><text:span text:style-name="T11">Implementation Metapatterns</text:span></text:p>
          </draw:text-box>
        </draw:frame>
        <draw:frame draw:name="Google Shape;234;p35" draw:style-name="standard" draw:layer="layout" svg:width="40.215cm" svg:height="19.488cm" svg:x="5.292cm" svg:y="5.92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0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ce3">
              <table:table-cell>
                <text:p text:style-name="P1"><text:span text:style-name="T14">Plugins</text:span></text:p>
              </table:table-cell>
              <table:table-cell>
                <text:p text:style-name="P1"><text:span text:style-name="T14">Hexagonal Architecture</text:span></text:p>
              </table:table-cell>
              <table:table-cell>
                <text:p text:style-name="P1"><text:span text:style-name="T14">Microkernel</text:span></text:p>
              </table:table-cell>
              <table:table-cell>
                <text:p text:style-name="P1"><text:span text:style-name="T14">Mesh</text:span></text:p>
              </table:table-cell>
              <table:table-cell/>
            </table:table-row>
            <table:table-row table:style-name="ro12" table:default-cell-style-name="ce4">
              <table:table-cell>
                <text:p text:style-name="P23"><text:span text:style-name="T37">Plugins, Addons, Strategy, Hooks, Aspects, Reflection</text:span></text:p>
              </table:table-cell>
              <table:table-cell>
                <text:p text:style-name="P23"><text:span text:style-name="T37">Ports and Adapters, Onion Architecture, MVC family, MVP family</text:span></text:p>
              </table:table-cell>
              <table:table-cell>
                <text:p text:style-name="P23"><text:span text:style-name="T37">OS, Software Framework, Hypervisor, Interpreter, </text:span></text:p>
                <text:p text:style-name="P23"><text:span text:style-name="T37">Saga Engine</text:span></text:p>
              </table:table-cell>
              <table:table-cell>
                <text:p text:style-name="P23"><text:span text:style-name="T37">P2P Network, Actors, </text:span></text:p>
                <text:p text:style-name="P23"><text:span text:style-name="T37">Service Mesh, Space-Based Architecture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draw:name="Google Shape;235;p35" draw:style-name="gr3" draw:text-style-name="P17" draw:layer="layout" svg:width="8.042cm" svg:height="9.125cm" svg:x="13.335cm" svg:y="5.928cm">
          <draw:image xlink:href="Pictures/10000201000002D80000033A4217E916DFA57B95.png" xlink:type="simple" xlink:show="embed" xlink:actuate="onLoad">
            <text:p/>
          </draw:image>
        </draw:frame>
        <draw:frame draw:name="Google Shape;236;p35" draw:style-name="gr3" draw:text-style-name="P17" draw:layer="layout" svg:width="8.042cm" svg:height="9.091cm" svg:x="21.378cm" svg:y="5.928cm">
          <draw:image xlink:href="Pictures/10000201000002D90000033876F83EFC09F3E364.png" xlink:type="simple" xlink:show="embed" xlink:actuate="onLoad">
            <text:p/>
          </draw:image>
        </draw:frame>
        <draw:frame draw:name="Google Shape;237;p35" draw:style-name="gr3" draw:text-style-name="P17" draw:layer="layout" svg:width="8.042cm" svg:height="9.103cm" svg:x="29.422cm" svg:y="5.928cm">
          <draw:image xlink:href="Pictures/10000201000002D800000338329CC534AA61838C.png" xlink:type="simple" xlink:show="embed" xlink:actuate="onLoad">
            <text:p/>
          </draw:image>
        </draw:frame>
        <draw:frame draw:name="Google Shape;238;p35" draw:style-name="gr3" draw:text-style-name="P17" draw:layer="layout" svg:width="8.042cm" svg:height="9.103cm" svg:x="5.292cm" svg:y="5.928cm">
          <draw:image xlink:href="Pictures/10000201000002D800000338381ACD4259AACEAA.png" xlink:type="simple" xlink:show="embed" xlink:actuate="onLoad">
            <text:p/>
          </draw:image>
        </draw:frame>
        <presentation:notes draw:style-name="dp2">
          <draw:page-thumbnail draw:name="Google Shape;230;g39f6524f0af_0_14:notes" draw:style-name="gr1" draw:layer="layout" svg:width="16.932cm" svg:height="9.524cm" svg:x="1.059cm" svg:y="1.905cm" draw:page-number="23" presentation:class="page"/>
          <draw:frame draw:name="Google Shape;231;g39f6524f0af_0_14:notes" presentation:style-name="pr24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0">These architectures take a look inside a system component </text:span><text:span text:style-name="T17"><text:a xlink:href="https://metapatterns.io/implementation-metapatterns/" xlink:type="simple">https://metapatterns.io/implementation-metapatterns/</text:a></text:span></text:p>
            </draw:text-box>
          </draw:frame>
        </presentation:notes>
      </draw:page>
      <draw:page draw:name="Conclusion" draw:style-name="dp1" draw:master-page-name="SECTION_5f_HEADER">
        <draw:frame draw:name="Google Shape;243;p36" presentation:style-name="pr15" draw:text-style-name="P9" draw:layer="layout" svg:width="47.336cm" svg:height="4.676cm" svg:x="1.732cm" svg:y="11.949cm" presentation:class="title" presentation:user-transformed="true">
          <draw:text-box>
            <text:p text:style-name="P1"><text:span text:style-name="T11">Conclusion</text:span></text:p>
          </draw:text-box>
        </draw:frame>
        <presentation:notes draw:style-name="dp2">
          <draw:page-thumbnail draw:name="Google Shape;240;g39ecdd5df51_0_44:notes" draw:style-name="gr1" draw:layer="layout" svg:width="16.932cm" svg:height="9.524cm" svg:x="1.059cm" svg:y="1.905cm" draw:page-number="24" presentation:class="page"/>
          <draw:frame draw:name="Google Shape;241;g39ecdd5df51_0_44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ations" draw:style-name="dp1" draw:master-page-name="TITLE_5f_AND_5f_BODY" presentation:presentation-page-layout-name="AL2T1">
        <draw:frame draw:name="Google Shape;248;p37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11">Limitations</text:span></text:p>
          </draw:text-box>
        </draw:frame>
        <draw:frame draw:name="Google Shape;249;p37" presentation:style-name="pr12" draw:text-style-name="P7" draw:layer="layout" svg:width="47.336cm" svg:height="18.979cm" svg:x="1.732cm" svg:y="6.403cm" presentation:class="outline" presentation:user-transformed="true">
          <draw:text-box>
            <text:p text:style-name="P10"><text:span text:style-name="T13">The structural approach works only for system-wide architectural patterns:</text:span></text:p>
            <text:p text:style-name="P11"><text:span text:style-name="T13">– </text:span><text:span text:style-name="T13">No Gang of Four design patterns</text:span></text:p>
            <text:p text:style-name="P11"><text:span text:style-name="T13">– </text:span><text:span text:style-name="T13">No Enterprise Integration patterns</text:span></text:p>
            <text:p text:style-name="P11"><text:span text:style-name="T13">– </text:span><text:span text:style-name="T13">No TDD organizational patterns</text:span></text:p>
            <text:p text:style-name="P12"><text:span text:style-name="T38">The research is in its early phase and is not supported by any organization.</text:span></text:p>
          </draw:text-box>
        </draw:frame>
        <presentation:notes draw:style-name="dp2">
          <draw:page-thumbnail draw:name="Google Shape;245;g39ecdd5df51_0_48:notes" draw:style-name="gr1" draw:layer="layout" svg:width="16.932cm" svg:height="9.524cm" svg:x="1.059cm" svg:y="1.905cm" draw:page-number="25" presentation:class="page"/>
          <draw:frame draw:name="Google Shape;246;g39ecdd5df51_0_48:notes" presentation:style-name="pr13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0">There is the bus factor and lack of funding.</text:span></text:p>
            </draw:text-box>
          </draw:frame>
        </presentation:notes>
      </draw:page>
      <draw:page draw:name="Links" draw:style-name="dp1" draw:master-page-name="TITLE_5f_AND_5f_BODY" presentation:presentation-page-layout-name="AL2T1">
        <draw:frame draw:name="Google Shape;254;p38" presentation:style-name="pr5" draw:text-style-name="P8" draw:layer="layout" svg:width="47.336cm" svg:height="3.181cm" svg:x="1.732cm" svg:y="2.472cm" presentation:class="title" presentation:user-transformed="true">
          <draw:text-box>
            <text:p text:style-name="P1"><text:span text:style-name="T11">Links</text:span></text:p>
          </draw:text-box>
        </draw:frame>
        <draw:frame draw:name="Google Shape;255;p38" presentation:style-name="pr12" draw:text-style-name="P7" draw:layer="layout" svg:width="47.336cm" svg:height="11.087cm" svg:x="1.732cm" svg:y="6.403cm" presentation:class="outline" presentation:user-transformed="true">
          <draw:text-box>
            <text:p text:style-name="P10"><text:span text:style-name="T3">My book </text:span><text:span text:style-name="T39">Architectural Metapatterns</text:span><text:span text:style-name="T3"> is available:</text:span></text:p>
            <text:p text:style-name="P11"><text:span text:style-name="T3">– </text:span><text:span text:style-name="T3">for reading online at </text:span><text:span text:style-name="T40"><text:a xlink:href="https://metapatterns.io/" xlink:type="simple">metapatterns.io</text:a></text:span></text:p>
            <text:p text:style-name="P11"><text:span text:style-name="T3">– </text:span><text:span text:style-name="T3">as an ebook from </text:span><text:span text:style-name="T40"><text:a xlink:href="https://leanpub.com/metapatterns" xlink:type="simple">leanpub.com/metapatterns</text:a></text:span></text:p>
            <text:p text:style-name="P12"><text:span text:style-name="T3">The diagrams and the ODT source file are provided under the CC BY license.</text:span></text:p>
          </draw:text-box>
        </draw:frame>
        <draw:frame draw:name="Google Shape;256;p38" presentation:style-name="pr4" draw:text-style-name="P7" draw:layer="layout" svg:width="47.336cm" svg:height="8.362cm" svg:x="1.732cm" svg:y="17.491cm" presentation:class="outline" presentation:user-transformed="true">
          <draw:text-box>
            <text:p text:style-name="P23"><text:span text:style-name="T41">This book is a seminal research on reframing patterns. </text:span></text:p>
            <text:p text:style-name="P23"><text:span text:style-name="T41">It’s up to you to see to it being recognized or discarded.</text:span></text:p>
          </draw:text-box>
        </draw:frame>
        <presentation:notes draw:style-name="dp2">
          <draw:page-thumbnail draw:name="Google Shape;251;g39ecdd5df51_0_53:notes" draw:style-name="gr1" draw:layer="layout" svg:width="16.932cm" svg:height="9.524cm" svg:x="1.059cm" svg:y="1.905cm" draw:page-number="26" presentation:class="page"/>
          <draw:frame draw:name="Google Shape;252;g39ecdd5df51_0_53:notes" presentation:style-name="pr13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0">I am out of options to promote the book and its ideas. If you spread the word about it, it may survive and help people see the big picture behind pattern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1212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212121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6.573cm" fo:padding-top="0.508cm" fo:padding-bottom="0.508cm" fo:padding-left="0.508cm" fo:padding-right="0.508cm" fo:wrap-option="wrap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47.336cm" svg:height="11.402cm" svg:x="1.732cm" svg:y="4.137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47.336cm" svg:height="18.979cm" svg:x="1.732cm" svg:y="6.403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2cm" svg:height="9.524cm" svg:x="1.058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47.336cm" svg:height="4.676cm" svg:x="1.732cm" svg:y="11.949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2cm" svg:height="9.524cm" svg:x="1.058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22.221cm" svg:height="18.979cm" svg:x="1.732cm" svg:y="6.403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22.221cm" svg:height="18.979cm" svg:x="26.847cm" svg:y="6.403cm" presentation:class="outline" presentation:placeholder="true" presentation:user-transformed="true">
        <draw:text-box/>
      </draw:frame>
      <draw:frame draw:name="Google Shape;24;p5" presentation:style-name="Mpr10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2cm" svg:height="9.524cm" svg:x="1.058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6;p6" presentation:style-name="TITLE_5f_ONLY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27;p6" presentation:style-name="Mpr13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5f_ONLY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2cm" svg:height="9.524cm" svg:x="1.058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1"/>
    <meta:generator>LibreOfficeDev/6.0.5.2$Linux_X86_64 LibreOffice_project/</meta:generator>
  </office:meta>
</office:document-meta>
</file>