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D800000338381ACD4259AACEAA.png" manifest:media-type="image/png"/>
  <manifest:file-entry manifest:full-path="Pictures/10000201000002D80000033A4217E916DFA57B95.png" manifest:media-type="image/png"/>
  <manifest:file-entry manifest:full-path="Pictures/100002010000042800000338A7BE94E48A0E7F15.png" manifest:media-type="image/png"/>
  <manifest:file-entry manifest:full-path="Pictures/100002010000042800000338C516AFF2D07AB9BF.png" manifest:media-type="image/png"/>
  <manifest:file-entry manifest:full-path="Pictures/10000201000002D800000338329CC534AA61838C.png" manifest:media-type="image/png"/>
  <manifest:file-entry manifest:full-path="Pictures/10000201000004280000033BEFBA33C2BDD9E9D2.png" manifest:media-type="image/png"/>
  <manifest:file-entry manifest:full-path="Pictures/1000020100000368000002DAF4AA6AD5D3F8F90C.png" manifest:media-type="image/png"/>
  <manifest:file-entry manifest:full-path="Pictures/1000020100000368000002D843FD9E1836C86E2F.png" manifest:media-type="image/png"/>
  <manifest:file-entry manifest:full-path="Pictures/1000020100000368000002D8A2BE6187220BDC61.png" manifest:media-type="image/png"/>
  <manifest:file-entry manifest:full-path="Pictures/1000020100000368000002DA1F748DE430DA62B4.png" manifest:media-type="image/png"/>
  <manifest:file-entry manifest:full-path="Pictures/1000020100000368000002DAB61413CE8B37DF4B.png" manifest:media-type="image/png"/>
  <manifest:file-entry manifest:full-path="Pictures/TablePreview3.svm" manifest:media-type=""/>
  <manifest:file-entry manifest:full-path="Pictures/10000201000001E6000002AE9A7D44083973D73C.png" manifest:media-type="image/png"/>
  <manifest:file-entry manifest:full-path="Pictures/100002010000036E00000248292D0F24516EC77D.png" manifest:media-type="image/png"/>
  <manifest:file-entry manifest:full-path="Pictures/1000020100000238000003765D898AC781932078.png" manifest:media-type="image/png"/>
  <manifest:file-entry manifest:full-path="Pictures/10000201000001E6000002AE3371865D29404F71.png" manifest:media-type="image/png"/>
  <manifest:file-entry manifest:full-path="Pictures/10000000000000C1000000DCF12F58653F9DA04D.png" manifest:media-type="image/png"/>
  <manifest:file-entry manifest:full-path="Pictures/100002010000025E000002B0B403ED53E54CACDB.png" manifest:media-type="image/png"/>
  <manifest:file-entry manifest:full-path="Pictures/10000201000002D90000033876F83EFC09F3E364.png" manifest:media-type="image/png"/>
  <manifest:file-entry manifest:full-path="Pictures/100002010000036800000248E1C38877B19AF6DB.png" manifest:media-type="image/png"/>
  <manifest:file-entry manifest:full-path="Pictures/TablePreview4.svm" manifest:media-type=""/>
  <manifest:file-entry manifest:full-path="Pictures/100002010000025E000002AEFEACCE1E7E49A2D7.png" manifest:media-type="image/png"/>
  <manifest:file-entry manifest:full-path="Pictures/10000201000000E6000000E11DD17722323A745A.png" manifest:media-type="image/png"/>
  <manifest:file-entry manifest:full-path="Pictures/10000201000002EF000002D67A2AEE6182D8FD5C.png" manifest:media-type="image/png"/>
  <manifest:file-entry manifest:full-path="Pictures/1000020100000428000003387B57918175A62B01.png" manifest:media-type="image/png"/>
  <manifest:file-entry manifest:full-path="Pictures/100002010000042800000333B635666B69BDAFB5.png" manifest:media-type="image/png"/>
  <manifest:file-entry manifest:full-path="Pictures/10000201000003680000024EADC46E96DF6B24B2.png" manifest:media-type="image/png"/>
  <manifest:file-entry manifest:full-path="Pictures/10000201000003E8000003E8B7900D9D1BD2E609.png" manifest:media-type="image/png"/>
  <manifest:file-entry manifest:full-path="Pictures/100002010000036B0000024866FD1D1C968D06C2.png" manifest:media-type="image/png"/>
  <manifest:file-entry manifest:full-path="Pictures/10000000000000F3000000E00FAF82107E904533.png" manifest:media-type="image/png"/>
  <manifest:file-entry manifest:full-path="Pictures/1000020100000354000001960FB647B62585239A.png" manifest:media-type="image/png"/>
  <manifest:file-entry manifest:full-path="Pictures/10000201000002D600000326E908F7AF883C0C4F.png" manifest:media-type="image/png"/>
  <manifest:file-entry manifest:full-path="Pictures/10000201000002D6000003264C4883E29B6D72CC.png" manifest:media-type="image/png"/>
  <manifest:file-entry manifest:full-path="Pictures/10000201000007D8000007AFE4E66A7784409AFE.png" manifest:media-type="image/png"/>
  <manifest:file-entry manifest:full-path="Pictures/10000201000003680000024C71EF9C01601D40B0.png" manifest:media-type="image/png"/>
  <manifest:file-entry manifest:full-path="Pictures/100002010000034E0000019CCFE2489CDDA13ADD.png" manifest:media-type="image/png"/>
  <manifest:file-entry manifest:full-path="Pictures/TablePreview1.svm" manifest:media-type=""/>
  <manifest:file-entry manifest:full-path="Pictures/TablePreview2.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shrink-to-fit" style:shrink-to-fit="tru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5"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6"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graphic-properties draw:stroke="none" svg:stroke-width="0cm" draw:fill="none" draw:textarea-vertical-align="top" draw:auto-grow-height="true" draw:fit-to-size="false" style:shrink-to-fit="false" fo:min-height="8.036cm" fo:padding-top="0.254cm" fo:padding-bottom="0.254cm" fo:padding-left="0.254cm" fo:padding-right="0.254cm" fo:wrap-option="wrap"/>
    </style:style>
    <style:style style:name="pr18"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021cm" style:use-optimal-column-width="false"/>
    </style:style>
    <style:style style:name="co2" style:family="table-column">
      <style:table-column-properties style:column-width="4.023cm" style:use-optimal-column-width="false"/>
    </style:style>
    <style:style style:name="ro1" style:family="table-row">
      <style:table-row-properties style:row-height="2.482cm"/>
    </style:style>
    <style:style style:name="ro2" style:family="table-row">
      <style:table-row-properties style:row-height="1.134cm"/>
    </style:style>
    <style:style style:name="ro3" style:family="table-row">
      <style:table-row-properties style:row-height="5.335cm"/>
    </style:style>
    <style:style style:name="ro4" style:family="table-row">
      <style:table-row-properties style:row-height="3.363cm"/>
    </style:style>
    <style:style style:name="ro5" style:family="table-row">
      <style:table-row-properties style:row-height="1.761cm"/>
    </style:style>
    <style:style style:name="ro6" style:family="table-row">
      <style:table-row-properties style:row-height="5.23cm"/>
    </style:style>
    <style:style style:name="ro7" style:family="table-row">
      <style:table-row-properties style:row-height="2.943cm"/>
    </style:style>
    <style:style style:name="ro8" style:family="table-row">
      <style:table-row-properties style:row-height="1.78cm"/>
    </style:style>
    <style:style style:name="ro9" style:family="table-row">
      <style:table-row-properties style:row-height="5.272cm"/>
    </style:style>
    <style:style style:name="ro10" style:family="table-row">
      <style:table-row-properties style:row-height="4.243cm"/>
    </style:style>
    <style:style style:name="ro11" style:family="table-row">
      <style:table-row-properties style:row-height="3.74cm"/>
    </style:style>
    <style:style style:name="ce1" style:family="table-cell">
      <loext:graphic-properties draw:fill="none" draw:textarea-vertical-align="top" fo:padding-top="0.253cm" fo:padding-bottom="0.253cm" fo:padding-left="0.253cm" fo:padding-right="0.253cm"/>
      <style:paragraph-properties fo:border="0.37pt solid #adadad"/>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353cm" fo:margin-bottom="0cm" fo:line-height="105%" fo:text-align="start" fo:text-indent="0cm" style:writing-mode="lr-tb"/>
    </style:style>
    <style:style style:name="P6" style:family="paragraph">
      <style:paragraph-properties fo:margin-left="0cm" fo:margin-right="0cm" fo:margin-top="0.353cm" fo:margin-bottom="0.353cm" fo:line-height="10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3" style:family="paragraph">
      <style:paragraph-properties fo:margin-left="0cm" fo:margin-right="0cm" fo:margin-top="0.353cm" fo:margin-bottom="0cm" fo:line-height="115%" fo:text-align="center" fo:text-indent="0cm" style:writing-mode="lr-tb">
        <style:tab-stops>
          <style:tab-stop style:position="0cm"/>
        </style:tab-stops>
      </style:paragraph-properties>
    </style:style>
    <style:style style:name="P24" style:family="paragraph">
      <style:paragraph-properties fo:margin-left="0cm" fo:margin-right="0cm" fo:margin-top="0.353cm" fo:margin-bottom="0.353cm" fo:line-height="115%" fo:text-align="center" fo:text-indent="0cm" style:writing-mode="lr-tb">
        <style:tab-stops>
          <style:tab-stop style:position="0cm"/>
        </style:tab-stops>
      </style:paragraph-properties>
    </style:style>
    <style:style style:name="P25"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P26"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eeeee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eeeee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36.2000007629395pt" fo:letter-spacing="normal" fo:font-style="normal" style:text-underline-style="none" fo:font-weight="normal" style:font-name-asian="Arial" style:font-size-asian="36.2000007629395pt" style:font-style-asian="normal" style:font-weight-asian="normal" style:font-name-complex="Arial" style:font-size-complex="36.200000762939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32.2000007629395pt" fo:letter-spacing="normal" fo:font-style="normal" style:text-underline-style="none" fo:font-weight="normal" style:font-name-asian="Arial" style:font-size-asian="32.2000007629395pt" style:font-style-asian="normal" style:font-weight-asian="normal" style:font-name-complex="Arial" style:font-size-complex="32.2000007629395pt" style:font-style-complex="normal" style:font-weight-complex="normal"/>
    </style:style>
    <style:style style:name="T7" style:family="text">
      <style:text-properties fo:font-variant="normal" fo:text-transform="none" fo:color="#11dd11"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ff4455"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eedd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36pt" fo:letter-spacing="normal" fo:font-style="italic" style:text-underline-style="none" fo:font-weight="normal" style:font-name-asian="Arial" style:font-size-asian="36pt" style:font-style-asian="italic" style:font-weight-asian="normal" style:font-name-complex="Arial" style:font-size-complex="36pt" style:font-style-complex="italic" style:font-weight-complex="normal"/>
    </style:style>
    <style:style style:name="T13" style:family="text">
      <style:text-properties fo:font-variant="normal" fo:text-transform="none" fo:color="#ff4455"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eedd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5" style:family="text">
      <style:text-properties fo:font-variant="normal" fo:text-transform="none" fo:color="#eedd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eeeeee"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1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eeeeee"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fo:font-variant="normal" fo:text-transform="none" fo:color="#eeeeee"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20" style:family="text">
      <style:text-properties fo:font-variant="normal" fo:text-transform="none" fo:color="#eeeeee"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21" style:family="text">
      <style:text-properties fo:font-variant="normal" fo:text-transform="none" fo:color="#eeeeee"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23" style:family="text">
      <style:text-properties fo:font-variant="normal" fo:text-transform="none" fo:color="#eeeeee" style:text-line-through-style="none" style:text-line-through-type="none" style:text-position="0% 100%" style:font-name="Arial" fo:font-size="19pt" fo:letter-spacing="normal" fo:font-style="italic" style:text-underline-style="none" fo:font-weight="normal" style:font-name-asian="Arial" style:font-size-asian="19pt" style:font-style-asian="italic" style:font-weight-asian="normal" style:font-name-complex="Arial" style:font-size-complex="19pt" style:font-style-complex="italic" style:font-weight-complex="normal"/>
    </style:style>
    <style:style style:name="T24" style:family="text">
      <style:text-properties fo:font-variant="normal" fo:text-transform="none" fo:color="#eeeeee"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5" style:family="text">
      <style:text-properties fo:font-variant="normal" fo:text-transform="none" fo:color="#eeeeee"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26" style:family="text">
      <style:text-properties fo:font-variant="normal" fo:text-transform="none" fo:color="#eedd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7" style:family="text">
      <style:text-properties fo:font-variant="normal" fo:text-transform="none" fo:color="#ffffff" style:text-line-through-style="none" style:text-line-through-type="none" style:text-position="0% 100%" style:font-name="Arial" fo:font-size="30pt" fo:letter-spacing="normal"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9" style:family="text">
      <style:text-properties fo:font-variant="normal" fo:text-transform="none" fo:color="#11dd11"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0" style:family="text">
      <style:text-properties fo:font-variant="normal" fo:text-transform="none" fo:color="#eeeee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1" style:family="text">
      <style:text-properties fo:font-variant="normal" fo:text-transform="none" fo:color="#11dd11"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32" style:family="text">
      <style:text-properties fo:font-variant="normal" fo:text-transform="none" fo:color="#eeeee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3" style:family="text">
      <style:text-properties fo:font-variant="normal" fo:text-transform="none" fo:color="#eeeeee" style:text-line-through-style="none" style:text-line-through-type="none" style:text-position="0% 100%" style:font-name="Arial" fo:font-size="30pt" fo:letter-spacing="normal"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34"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5" style:family="text">
      <style:text-properties fo:font-variant="normal" fo:text-transform="none" fo:color="#11dd11"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36" style:family="text">
      <style:text-properties fo:font-variant="normal" fo:text-transform="none" fo:color="#eeeee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eeeeee"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8" style:family="text">
      <style:text-properties fo:font-variant="normal" fo:text-transform="none" fo:color="#eedd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9" style:family="text">
      <style:text-properties fo:font-variant="normal" fo:text-transform="none" fo:color="#eeeeee"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40" style:family="text">
      <style:text-properties fo:font-variant="normal" fo:text-transform="none" fo:color="#4dd0e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41" style:family="text">
      <style:text-properties fo:font-variant="normal" fo:text-transform="none" fo:color="#eedd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atterns of Pattern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And why we need them</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A peek inside" draw:style-name="dp1" draw:master-page-name="TITLE_5f_AND_5f_BODY" presentation:presentation-page-layout-name="AL2T1">
        <draw:frame draw:name="Google Shape;60;p14" presentation:style-name="pr4" draw:text-style-name="P7" draw:layer="layout" svg:width="23.667cm" svg:height="9.142cm" svg:x="0.866cm" svg:y="4.016cm" presentation:class="outline" presentation:user-transformed="true">
          <draw:text-box>
            <text:list text:style-name="L3">
              <text:list-item>
                <text:p text:style-name="P5"><text:span text:style-name="T3">The misery of having thousands of patterns.</text:span></text:p>
              </text:list-item>
              <text:list-item>
                <text:p text:style-name="P5"><text:span text:style-name="T3">Local and distributed architectures are not dissimilar.</text:span></text:p>
              </text:list-item>
              <text:list-item>
                <text:p text:style-name="P5"><text:span text:style-name="T3">Structure determines function.</text:span></text:p>
              </text:list-item>
              <text:list-item>
                <text:p text:style-name="P5"><text:span text:style-name="T3">There are only so many elementary geometries.</text:span></text:p>
              </text:list-item>
              <text:list-item>
                <text:p text:style-name="P6"><text:span text:style-name="T3">Which means that hundreds of patterns condense into several metapatterns.</text:span></text:p>
              </text:list-item>
            </text:list>
          </draw:text-box>
        </draw:frame>
        <draw:frame draw:name="Google Shape;61;p14" presentation:style-name="pr5" draw:text-style-name="P8" draw:layer="layout" svg:width="23.667cm" svg:height="2.507cm" svg:x="0.866cm" svg:y="1.236cm" presentation:class="title" presentation:user-transformed="true">
          <draw:text-box>
            <text:p text:style-name="P1"><text:span text:style-name="T4">A peek inside</text:span></text:p>
          </draw:text-box>
        </draw:frame>
        <presentation:notes draw:style-name="dp2">
          <draw:page-thumbnail draw:name="Google Shape;57;g36fa2bd9aed_0_190:notes" draw:style-name="gr1" draw:layer="layout" svg:width="16.932cm" svg:height="9.524cm" svg:x="1.059cm" svg:y="1.905cm" draw:page-number="2" presentation:class="page"/>
          <draw:frame draw:name="Google Shape;58;g36fa2bd9aed_0_190:notes" presentation:style-name="pr6" draw:text-style-name="P4" draw:layer="layout" svg:width="15.239cm" svg:height="11.429cm" svg:x="1.905cm" svg:y="12.065cm" presentation:class="notes" presentation:placeholder="true" presentation:user-transformed="true">
            <draw:text-box/>
          </draw:frame>
        </presentation:notes>
      </draw:page>
      <draw:page draw:name="Expectation vs Reality" draw:style-name="dp1" draw:master-page-name="SECTION_5f_HEADER">
        <draw:frame draw:name="Google Shape;66;p15" presentation:style-name="pr7" draw:text-style-name="P9" draw:layer="layout" svg:width="23.667cm" svg:height="2.337cm" svg:x="0.866cm" svg:y="5.975cm" presentation:class="title" presentation:user-transformed="true">
          <draw:text-box>
            <text:p text:style-name="P1"><text:span text:style-name="T5">Expectation vs Reality</text:span></text:p>
          </draw:text-box>
        </draw:frame>
        <presentation:notes draw:style-name="dp2">
          <draw:page-thumbnail draw:name="Google Shape;63;g36fa2bd9aed_0_185:notes" draw:style-name="gr1" draw:layer="layout" svg:width="16.932cm" svg:height="9.524cm" svg:x="1.059cm" svg:y="1.905cm" draw:page-number="3" presentation:class="page"/>
          <draw:frame draw:name="Google Shape;64;g36fa2bd9aed_0_185:notes" presentation:style-name="pr8" draw:text-style-name="P4" draw:layer="layout" svg:width="15.239cm" svg:height="11.429cm" svg:x="1.905cm" svg:y="12.065cm" presentation:class="notes" presentation:placeholder="true" presentation:user-transformed="true">
            <draw:text-box/>
          </draw:frame>
        </presentation:notes>
      </draw:page>
      <draw:page draw:name="What we were promised 30 years ago" draw:style-name="dp1" draw:master-page-name="TITLE_5f_AND_5f_TWO_5f_COLUMNS" presentation:presentation-page-layout-name="AL3T3">
        <draw:frame draw:name="Google Shape;71;p16" presentation:style-name="pr9" draw:text-style-name="P8" draw:layer="layout" svg:width="23.667cm" svg:height="1.59cm" svg:x="0.866cm" svg:y="1.236cm" presentation:class="title" presentation:user-transformed="true">
          <draw:text-box>
            <text:p text:style-name="P1"><text:span text:style-name="T6">What we were promised 30 years ago</text:span></text:p>
          </draw:text-box>
        </draw:frame>
        <draw:frame draw:name="Google Shape;72;p16" presentation:style-name="pr10" draw:text-style-name="P13" draw:layer="layout" svg:width="9.057cm" svg:height="9.489cm" svg:x="0.866cm" svg:y="3.201cm" presentation:class="outline" presentation:user-transformed="true">
          <draw:text-box>
            <text:p text:style-name="P10"><text:span text:style-name="T7">Patterns as a ubiquitous language of software architecture.</text:span></text:p>
            <text:p text:style-name="P11"><text:span text:style-name="T7">Patterns as vessels for sharing and recording experience.</text:span><text:span text:style-name="T7"><text:line-break/></text:span><text:span text:style-name="T7"/></text:p>
            <text:p text:style-name="P12"><text:span text:style-name="T7">A pattern language as a construction set for software engineering.</text:span></text:p>
          </draw:text-box>
        </draw:frame>
        <draw:frame draw:name="Google Shape;73;p16" presentation:style-name="pr10" draw:text-style-name="P13" draw:layer="layout" svg:width="13.879cm" svg:height="9.489cm" svg:x="10.653cm" svg:y="3.201cm" presentation:class="outline" presentation:user-transformed="true">
          <draw:text-box>
            <text:p text:style-name="P10"><text:span text:style-name="T8">There are too many patterns for any person to remember. Some patterns names are ambiguous.</text:span></text:p>
            <text:p text:style-name="P11"><text:span text:style-name="T8">Patterns are regularly reinvented or plagiarized, breaking the continuity of experience and debarring the sharing of knowledge between domains.</text:span></text:p>
            <text:p text:style-name="P12"><text:span text:style-name="T9">A few specialized pattern languages became widespread. </text:span><text:span text:style-name="T8">No attempt at a generic pattern language has ever succeeded.</text:span></text:p>
          </draw:text-box>
        </draw:frame>
        <presentation:notes draw:style-name="dp2">
          <draw:page-thumbnail draw:name="Google Shape;68;g36fa2bd9aed_0_196:notes" draw:style-name="gr1" draw:layer="layout" svg:width="16.932cm" svg:height="9.524cm" svg:x="1.059cm" svg:y="1.905cm" draw:page-number="4" presentation:class="page"/>
          <draw:frame draw:name="Google Shape;69;g36fa2bd9aed_0_196:notes" presentation:style-name="pr11" draw:text-style-name="P15" draw:layer="layout" svg:width="15.239cm" svg:height="11.429cm" svg:x="1.905cm" svg:y="12.065cm" presentation:class="notes" presentation:user-transformed="true">
            <draw:text-box>
              <text:p text:style-name="P14"><text:span text:style-name="T10">The promises were taken from the Gang of Four book and first volumes of Pattern-Oriented Software Architecture. </text:span><text:span text:style-name="T10"><text:line-break/></text:span><text:span text:style-name="T10">The successful specialized pattern languages are the Gang of Four Design Patterns (a mix of GUI and general-use patterns), Enterprise Integration Patterns (communication in complex asynchronous distributed systems), and Domain-Driven Design (organization of development for enterprises).</text:span></text:p>
            </draw:text-box>
          </draw:frame>
        </presentation:notes>
        <officeooo:annotation svg:x="26.978cm" svg:y="0cm">
          <dc:creator>Lars Noodén</dc:creator>
          <dc:date>2025-11-01T19:09:06.726000000</dc:date>
          <text:p>You may already know about describing colors as HSL, but that makes it easier to find different colors that have a similar brightness.</text:p>
        </officeooo:annotation>
        <officeooo:annotation svg:x="26.978cm" svg:y="0cm">
          <dc:creator>Denys Poltorak</dc:creator>
          <dc:date>2025-11-01T19:09:06.726000000</dc:date>
          <text:p>I did not think about that. Thank you, I may have to revisit the colors again.</text:p>
          <text:p/>
          <text:p>However, I found out while choosing colors for the dark version of the website, that full green (00ff00) is much brighter than full read or full blue. Therefore HSL may not work as expected.</text:p>
          <text:p/>
          <text:p>Here I have trouble making the red text bright enough - I had to increase G and B channels, meanwhile pure green looks too bright with 0s in other channels.</text:p>
        </officeooo:annotation>
      </draw:page>
      <draw:page draw:name="Which is the Front Controller" draw:style-name="dp1" draw:master-page-name="TITLE_5f_AND_5f_BODY" presentation:presentation-page-layout-name="AL2T1">
        <draw:frame draw:name="Google Shape;78;p17" presentation:style-name="pr5" draw:text-style-name="P8" draw:layer="layout" svg:width="23.667cm" svg:height="1.59cm" svg:x="0.866cm" svg:y="1.236cm" presentation:class="title" presentation:user-transformed="true">
          <draw:text-box>
            <text:p text:style-name="P1"><text:span text:style-name="T11">Which is the </text:span><text:span text:style-name="T12">Front Controller</text:span></text:p>
          </draw:text-box>
        </draw:frame>
        <draw:frame draw:name="Google Shape;79;p17" presentation:style-name="pr12" draw:text-style-name="P7" draw:layer="layout" svg:width="23.667cm" svg:height="3.102cm" svg:x="0.866cm" svg:y="10.305cm" presentation:class="outline" presentation:user-transformed="true">
          <draw:text-box>
            <text:p text:style-name="P10"><text:span text:style-name="T3">Is Mark Richards wrong? He is the author of the most modern anthology of architectural styles!</text:span></text:p>
            <text:p text:style-name="P12"><text:span text:style-name="T13">There are over 2000 patterns! No one can remember them!</text:span></text:p>
          </draw:text-box>
        </draw:frame>
        <draw:frame draw:name="Google Shape;80;p17" draw:style-name="gr2" draw:text-style-name="P16" draw:layer="layout" svg:width="4.291cm" svg:height="3.955cm" svg:x="0.866cm" svg:y="3.412cm">
          <draw:image xlink:href="Pictures/10000000000000F3000000E00FAF82107E904533.png" xlink:type="simple" xlink:show="embed" xlink:actuate="onLoad">
            <text:p/>
          </draw:image>
        </draw:frame>
        <draw:frame draw:name="Google Shape;81;p17" draw:style-name="gr2" draw:text-style-name="P16" draw:layer="layout" svg:width="3.423cm" svg:height="3.902cm" svg:x="21.11cm" svg:y="3.465cm">
          <draw:image xlink:href="Pictures/10000000000000C1000000DCF12F58653F9DA04D.png" xlink:type="simple" xlink:show="embed" xlink:actuate="onLoad">
            <text:p/>
          </draw:image>
        </draw:frame>
        <draw:custom-shape draw:name="Google Shape;82;p17" draw:style-name="gr3" draw:text-style-name="P13" draw:layer="layout" svg:width="9.172cm" svg:height="2.537cm" svg:x="0.866cm" svg:y="7.368cm">
          <text:p text:style-name="P1"><text:span text:style-name="T9">A service that tracks the status of requests by receiving notifications from a </text:span><text:span text:style-name="T14">Pipeline</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7" draw:style-name="gr3" draw:text-style-name="P13" draw:layer="layout" svg:width="8.636cm" svg:height="2.537cm" svg:x="15.897cm" svg:y="7.368cm">
          <text:p text:style-name="P1"><text:span text:style-name="T9">A part of a backend </text:span><text:span text:style-name="T14">MVC</text:span><text:span text:style-name="T9"> which parses client requests and calls page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3" draw:text-style-name="P13" draw:layer="layout" svg:width="4.516cm" svg:height="1.523cm" svg:x="5.157cm" svg:y="3.136cm">
          <text:p text:style-name="P14"><text:span text:style-name="T15">Neal Ford and </text:span></text:p>
          <text:p text:style-name="P14"><text:span text:style-name="T15">Mark Richards,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7" draw:style-name="gr2" draw:text-style-name="P16" draw:layer="layout" svg:width="2.829cm" svg:height="2.767cm" svg:x="6.001cm" svg:y="4.599cm">
          <draw:image xlink:href="Pictures/10000201000000E6000000E11DD17722323A745A.png" xlink:type="simple" xlink:show="embed" xlink:actuate="onLoad">
            <text:p/>
          </draw:image>
        </draw:frame>
        <draw:custom-shape draw:name="Google Shape;86;p17" draw:style-name="gr3" draw:text-style-name="P13" draw:layer="layout" svg:width="4.291cm" svg:height="1.523cm" svg:x="16.819cm" svg:y="3.136cm">
          <text:p text:style-name="P17"><text:span text:style-name="T15">Martin Fowler at al., 2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2" draw:text-style-name="P16" draw:layer="layout" svg:width="2.691cm" svg:height="2.691cm" svg:x="17.618cm" svg:y="4.675cm">
          <draw:image xlink:href="Pictures/10000201000003E8000003E8B7900D9D1BD2E609.png" xlink:type="simple" xlink:show="embed" xlink:actuate="onLoad">
            <text:p/>
          </draw:image>
        </draw:frame>
        <draw:custom-shape draw:name="Google Shape;88;p17" draw:style-name="gr4" draw:text-style-name="P13" draw:layer="layout" svg:width="1.708cm" svg:height="2.564cm" svg:x="11.845cm" svg:y="4.803cm">
          <text:p text:style-name="P1"><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39e9ce6f541_0_0:notes" draw:style-name="gr1" draw:layer="layout" svg:width="16.932cm" svg:height="9.524cm" svg:x="1.059cm" svg:y="1.905cm" draw:page-number="5" presentation:class="page"/>
          <draw:frame draw:name="Google Shape;76;g39e9ce6f541_0_0:notes" presentation:style-name="pr13" draw:text-style-name="P15" draw:layer="layout" svg:width="15.239cm" svg:height="11.429cm" svg:x="1.905cm" svg:y="12.065cm" presentation:class="notes" presentation:user-transformed="true">
            <draw:text-box>
              <text:p text:style-name="P14"><text:span text:style-name="T17"><text:a xlink:href="https://metapatterns.io/analytics/ambiguous-patterns/#front-controller" xlink:type="simple">https://metapatterns.io/analytics/ambiguous-patterns/#front-controller</text:a></text:span></text:p>
            </draw:text-box>
          </draw:frame>
        </presentation:notes>
      </draw:page>
      <draw:page draw:name="Patterns are reinvented…" draw:style-name="dp1" draw:master-page-name="TITLE_5f_AND_5f_BODY" presentation:presentation-page-layout-name="AL2T1">
        <draw:frame draw:name="Google Shape;93;p18" presentation:style-name="pr5" draw:text-style-name="P8" draw:layer="layout" svg:width="23.667cm" svg:height="1.59cm" svg:x="0.866cm" svg:y="1.236cm" presentation:class="title" presentation:user-transformed="true">
          <draw:text-box>
            <text:p text:style-name="P1"><text:span text:style-name="T11">Patterns are reinvented…</text:span></text:p>
          </draw:text-box>
        </draw:frame>
        <draw:custom-shape draw:name="Google Shape;94;p18" draw:style-name="gr3" draw:text-style-name="P13" draw:layer="layout" svg:width="9.422cm" svg:height="4.595cm" svg:x="0.866cm" svg:y="7.368cm">
          <text:p text:style-name="P14"><text:span text:style-name="T18">Allows for running the same </text:span><text:span text:style-name="T19">core</text:span><text:span text:style-name="T18"> logic in different setups.</text:span></text:p>
          <text:p text:style-name="P18"><text:span text:style-name="T18">The external components can be changed without affecting the </text:span><text:span text:style-name="T19">core</text:span><text:span text:style-name="T18">.</text:span></text:p>
          <text:p text:style-name="P19"><text:span text:style-name="T18">Protection from vendor lock-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3" draw:text-style-name="P13" draw:layer="layout" svg:width="9.386cm" svg:height="4.595cm" svg:x="15.147cm" svg:y="7.368cm">
          <text:p text:style-name="P14"><text:span text:style-name="T18">Supports multiple views of a single </text:span><text:span text:style-name="T19">model</text:span><text:span text:style-name="T18">.</text:span></text:p>
          <text:p text:style-name="P18"><text:span text:style-name="T18">The UI can be changed without affecting the </text:span><text:span text:style-name="T19">model</text:span><text:span text:style-name="T18">.</text:span></text:p>
          <text:p text:style-name="P19"><text:span text:style-name="T18">Is easy to port to new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5" draw:text-style-name="P13" draw:layer="layout" svg:width="5.143cm" svg:height="4.009cm" svg:x="5.028cm" svg:y="2.839cm">
          <text:p text:style-name="P14"><text:span text:style-name="T15">Hexagonal Architecture</text:span></text:p>
          <text:p text:style-name="P14"><text:span text:style-name="T15">(Ports and Adapters), Alistair Cockburn, </text:span></text:p>
          <text:p text:style-name="P14"><text:span text:style-name="T15">2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5" draw:text-style-name="P13" draw:layer="layout" svg:width="4.881cm" svg:height="4.009cm" svg:x="15.147cm" svg:y="2.827cm">
          <text:p text:style-name="P17"><text:span text:style-name="T15">Model-View-Controller</text:span></text:p>
          <text:p text:style-name="P17"><text:span text:style-name="T15">(MVC), </text:span></text:p>
          <text:p text:style-name="P17"><text:span text:style-name="T15">Trygve Reenskaug, 197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8" draw:style-name="gr4" draw:text-style-name="P13" draw:layer="layout" svg:width="5.495cm" svg:height="3.117cm" svg:x="9.665cm" svg:y="2.839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8" draw:style-name="gr2" draw:text-style-name="P16" draw:layer="layout" svg:width="3.541cm" svg:height="4.009cm" svg:x="20.361cm" svg:y="2.827cm">
          <draw:image xlink:href="Pictures/100002010000025E000002AEFEACCE1E7E49A2D7.png" xlink:type="simple" xlink:show="embed" xlink:actuate="onLoad">
            <text:p/>
          </draw:image>
        </draw:frame>
        <draw:frame draw:name="Google Shape;100;p18" draw:style-name="gr2" draw:text-style-name="P16" draw:layer="layout" svg:width="3.541cm" svg:height="4.02cm" svg:x="1.115cm" svg:y="2.821cm">
          <draw:image xlink:href="Pictures/100002010000025E000002B0B403ED53E54CACDB.png" xlink:type="simple" xlink:show="embed" xlink:actuate="onLoad">
            <text:p/>
          </draw:image>
        </draw:frame>
        <presentation:notes draw:style-name="dp2">
          <draw:page-thumbnail draw:name="Google Shape;90;g39eb482cd5a_0_15:notes" draw:style-name="gr1" draw:layer="layout" svg:width="16.932cm" svg:height="9.524cm" svg:x="1.059cm" svg:y="1.905cm" draw:page-number="6" presentation:class="page"/>
          <draw:frame draw:name="Google Shape;91;g39eb482cd5a_0_15:notes" presentation:style-name="pr13" draw:text-style-name="P15" draw:layer="layout" svg:width="15.239cm" svg:height="11.429cm" svg:x="1.905cm" svg:y="12.065cm" presentation:class="notes" presentation:user-transformed="true">
            <draw:text-box>
              <text:p text:style-name="P14"><text:span text:style-name="T17"><text:a xlink:href="https://metapatterns.io/implementation-metapatterns/hexagonal-architecture/#examples--separated-presentation" xlink:type="simple">https://metapatterns.io/implementation-metapatterns/hexagonal-architecture/#examples--separated-presentation</text:a></text:span></text:p>
            </draw:text-box>
          </draw:frame>
        </presentation:notes>
      </draw:page>
      <draw:page draw:name="… or plagiarized?" draw:style-name="dp1" draw:master-page-name="TITLE_5f_AND_5f_BODY" presentation:presentation-page-layout-name="AL2T1">
        <draw:frame draw:name="Google Shape;105;p19" presentation:style-name="pr5" draw:text-style-name="P8" draw:layer="layout" svg:width="23.667cm" svg:height="1.59cm" svg:x="0.866cm" svg:y="1.236cm" presentation:class="title" presentation:user-transformed="true">
          <draw:text-box>
            <text:p text:style-name="P1"><text:span text:style-name="T11">… </text:span><text:span text:style-name="T11">or plagiarized?</text:span></text:p>
          </draw:text-box>
        </draw:frame>
        <draw:frame draw:name="Google Shape;106;p19" presentation:style-name="pr14" draw:text-style-name="P7" draw:layer="layout" svg:width="10.918cm" svg:height="9.325cm" svg:x="1.477cm" svg:y="3.484cm" presentation:class="outline" presentation:user-transformed="true">
          <draw:text-box>
            <text:p text:style-name="P10"><text:span text:style-name="T21">Please find 3 differences between:</text:span></text:p>
            <text:p text:style-name="P11"><text:span text:style-name="T21">– </text:span><text:span text:style-name="T21">Ports and Adapters (2005) with a DDD-style (2003) layered core.</text:span></text:p>
            <text:p text:style-name="P11"><text:span text:style-name="T21">– </text:span><text:span text:style-name="T21">Onion Architecture (2008).</text:span></text:p>
            <text:p text:style-name="P12"><text:span text:style-name="T21">– </text:span><text:span text:style-name="T21">Clean Architecture (2012).</text:span></text:p>
          </draw:text-box>
        </draw:frame>
        <draw:frame draw:name="Google Shape;107;p19" draw:style-name="gr2" draw:text-style-name="P16" draw:layer="layout" svg:width="5.978cm" svg:height="9.325cm" svg:x="17.675cm" svg:y="3.484cm">
          <draw:image xlink:href="Pictures/1000020100000238000003765D898AC781932078.png" xlink:type="simple" xlink:show="embed" xlink:actuate="onLoad">
            <text:p/>
          </draw:image>
        </draw:frame>
        <presentation:notes draw:style-name="dp2">
          <draw:page-thumbnail draw:name="Google Shape;102;g39eb482cd5a_0_10:notes" draw:style-name="gr1" draw:layer="layout" svg:width="16.932cm" svg:height="9.524cm" svg:x="1.059cm" svg:y="1.905cm" draw:page-number="7" presentation:class="page"/>
          <draw:frame draw:name="Google Shape;103;g39eb482cd5a_0_10:notes" presentation:style-name="pr13" draw:text-style-name="P15" draw:layer="layout" svg:width="15.239cm" svg:height="11.429cm" svg:x="1.905cm" svg:y="12.065cm" presentation:class="notes" presentation:user-transformed="true">
            <draw:text-box>
              <text:p text:style-name="P14"><text:span text:style-name="T17"><text:a xlink:href="https://metapatterns.io/implementation-metapatterns/hexagonal-architecture/#ddd-style-hexagonal-architecture-onion-architecture-clean-architecture" xlink:type="simple">https://metapatterns.io/implementation-metapatterns/hexagonal-architecture/#ddd-style-hexagonal-architecture-onion-architecture-clean-architecture</text:a></text:span></text:p>
            </draw:text-box>
          </draw:frame>
        </presentation:notes>
      </draw:page>
      <draw:page draw:name="Patterns change their meanings over time" draw:style-name="dp1" draw:master-page-name="TITLE_5f_AND_5f_BODY" presentation:presentation-page-layout-name="AL2T1">
        <draw:frame draw:name="Google Shape;112;p20" presentation:style-name="pr5" draw:text-style-name="P8" draw:layer="layout" svg:width="23.667cm" svg:height="1.59cm" svg:x="0.866cm" svg:y="1.236cm" presentation:class="title" presentation:user-transformed="true">
          <draw:text-box>
            <text:p text:style-name="P1"><text:span text:style-name="T22">Patterns change their meanings over time</text:span></text:p>
          </draw:text-box>
        </draw:frame>
        <draw:frame draw:name="Google Shape;113;p20" presentation:style-name="pr4" draw:text-style-name="P7" draw:layer="layout" svg:width="11.455cm" svg:height="9.239cm" svg:x="1.245cm" svg:y="3.452cm" presentation:class="outline" presentation:user-transformed="true">
          <draw:text-box>
            <text:p text:style-name="P10"><text:span text:style-name="T21">What is a </text:span><text:span text:style-name="T23">Monolith</text:span><text:span text:style-name="T21">?</text:span></text:p>
            <text:p text:style-name="P11"><text:span text:style-name="T21">– </text:span><text:span text:style-name="T21">An unstructured application?</text:span></text:p>
            <text:p text:style-name="P11"><text:span text:style-name="T21">– </text:span><text:span text:style-name="T21">A non-distributed system?</text:span></text:p>
            <text:p text:style-name="P11"><text:span text:style-name="T21">– </text:span><text:span text:style-name="T21">A system with a shared database?</text:span></text:p>
            <text:p text:style-name="P12"><text:span text:style-name="T21">– </text:span><text:span text:style-name="T21">A single unit of deployment?</text:span></text:p>
          </draw:text-box>
        </draw:frame>
        <draw:frame draw:name="Google Shape;114;p20" draw:style-name="gr2" draw:text-style-name="P16" draw:layer="layout" svg:width="9.431cm" svg:height="9.239cm" svg:x="14.299cm" svg:y="3.452cm">
          <draw:image xlink:href="Pictures/10000201000007D8000007AFE4E66A7784409AFE.png" xlink:type="simple" xlink:show="embed" xlink:actuate="onLoad">
            <text:p/>
          </draw:image>
        </draw:frame>
        <presentation:notes draw:style-name="dp2">
          <draw:page-thumbnail draw:name="Google Shape;109;g39eb482cd5a_0_32:notes" draw:style-name="gr1" draw:layer="layout" svg:width="16.932cm" svg:height="9.524cm" svg:x="1.059cm" svg:y="1.905cm" draw:page-number="8" presentation:class="page"/>
          <draw:frame draw:name="Google Shape;110;g39eb482cd5a_0_32:notes" presentation:style-name="pr13" draw:text-style-name="P15" draw:layer="layout" svg:width="15.239cm" svg:height="11.429cm" svg:x="1.905cm" svg:y="12.065cm" presentation:class="notes" presentation:user-transformed="true">
            <draw:text-box>
              <text:p text:style-name="P14"><text:span text:style-name="T17"><text:a xlink:href="https://metapatterns.io/analytics/ambiguous-patterns/#monolith" xlink:type="simple">https://metapatterns.io/analytics/ambiguous-patterns/#monolith</text:a></text:span></text:p>
            </draw:text-box>
          </draw:frame>
        </presentation:notes>
      </draw:page>
      <draw:page draw:name="Local and Distributed Architectures" draw:style-name="dp1" draw:master-page-name="SECTION_5f_HEADER">
        <draw:frame draw:name="Google Shape;119;p21" presentation:style-name="pr15" draw:text-style-name="P9" draw:layer="layout" svg:width="23.667cm" svg:height="2.337cm" svg:x="0.866cm" svg:y="5.975cm" presentation:class="title" presentation:user-transformed="true">
          <draw:text-box>
            <text:p text:style-name="P1"><text:span text:style-name="T11">Local and Distributed Architectures</text:span></text:p>
          </draw:text-box>
        </draw:frame>
        <presentation:notes draw:style-name="dp2">
          <draw:page-thumbnail draw:name="Google Shape;116;g39eb482cd5a_0_38:notes" draw:style-name="gr1" draw:layer="layout" svg:width="16.932cm" svg:height="9.524cm" svg:x="1.059cm" svg:y="1.905cm" draw:page-number="9" presentation:class="page"/>
          <draw:frame draw:name="Google Shape;117;g39eb482cd5a_0_38:notes" presentation:style-name="pr16" draw:text-style-name="P4" draw:layer="layout" svg:width="15.239cm" svg:height="11.429cm" svg:x="1.905cm" svg:y="12.065cm" presentation:class="notes" presentation:placeholder="true" presentation:user-transformed="true">
            <draw:text-box/>
          </draw:frame>
        </presentation:notes>
      </draw:page>
      <draw:page draw:name="Layers and Tiers" draw:style-name="dp1" draw:master-page-name="TITLE_5f_AND_5f_BODY" presentation:presentation-page-layout-name="AL2T1">
        <draw:frame draw:name="Google Shape;124;p22" presentation:style-name="pr12" draw:text-style-name="P7" draw:layer="layout" svg:width="12.594cm" svg:height="8.331cm" svg:x="6.588cm" svg:y="2.827cm" presentation:class="outline" presentation:user-transformed="true">
          <draw:text-box>
            <text:p text:style-name="P10"><text:span text:style-name="T24">Both </text:span><text:span text:style-name="T25">Layers</text:span><text:span text:style-name="T24"> and </text:span><text:span text:style-name="T25">Tiers</text:span><text:span text:style-name="T24"> allow for individual components to:</text:span></text:p>
            <text:p text:style-name="P11"><text:span text:style-name="T24">– </text:span><text:span text:style-name="T24">Differ in their properties (e.g. responsiveness).</text:span></text:p>
            <text:p text:style-name="P11"><text:span text:style-name="T24">– </text:span><text:span text:style-name="T24">Differ in technologies (programming language).</text:span></text:p>
            <text:p text:style-name="P11"><text:span text:style-name="T24">– </text:span><text:span text:style-name="T24">Be developed by dedicated teams.</text:span></text:p>
            <text:p text:style-name="P12"><text:span text:style-name="T24">Both architectures allow for a quick start of development but tend to grow unmanageable if not further partitioned by subdomain.</text:span></text:p>
          </draw:text-box>
        </draw:frame>
        <draw:frame draw:name="Google Shape;125;p22" presentation:style-name="pr5" draw:text-style-name="P8" draw:layer="layout" svg:width="23.667cm" svg:height="2.104cm" svg:x="0.866cm" svg:y="0.722cm" presentation:class="title" presentation:user-transformed="true">
          <draw:text-box>
            <text:p text:style-name="P1"><text:span text:style-name="T12">Layers</text:span><text:span text:style-name="T11"> and </text:span><text:span text:style-name="T12">Tiers</text:span></text:p>
          </draw:text-box>
        </draw:frame>
        <draw:frame draw:name="Google Shape;126;p22" presentation:style-name="pr12" draw:text-style-name="P7" draw:layer="layout" svg:width="23.225cm" svg:height="1.932cm" svg:x="0.866cm" svg:y="11.565cm" presentation:class="outline" presentation:user-transformed="true">
          <draw:text-box>
            <text:p text:style-name="P20"><text:span text:style-name="T25">Tiers</text:span><text:span text:style-name="T24">, being a distributed architecture, allow for its components to run on dedicated hardware, scale individually, differ in security, and provide a limited fault tolerance.</text:span></text:p>
          </draw:text-box>
        </draw:frame>
        <draw:custom-shape draw:name="Google Shape;127;p22" draw:style-name="gr3" draw:text-style-name="P13" draw:layer="layout" svg:width="4.719cm" svg:height="1.271cm" svg:x="0.866cm" svg:y="9.876cm">
          <text:p text:style-name="P1"><text:span text:style-name="T26">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2" draw:style-name="gr3" draw:text-style-name="P13" draw:layer="layout" svg:width="4.719cm" svg:height="1.271cm" svg:x="19.814cm" svg:y="9.876cm">
          <text:p text:style-name="P1"><text:span text:style-name="T26">3-T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2" draw:style-name="gr2" draw:text-style-name="P16" draw:layer="layout" svg:width="4.719cm" svg:height="6.662cm" svg:x="0.866cm" svg:y="2.912cm">
          <draw:image xlink:href="Pictures/10000201000001E6000002AE9A7D44083973D73C.png" xlink:type="simple" xlink:show="embed" xlink:actuate="onLoad">
            <text:p/>
          </draw:image>
        </draw:frame>
        <draw:frame draw:name="Google Shape;130;p22" draw:style-name="gr2" draw:text-style-name="P16" draw:layer="layout" svg:width="4.719cm" svg:height="6.661cm" svg:x="19.813cm" svg:y="2.912cm">
          <draw:image xlink:href="Pictures/10000201000001E6000002AE3371865D29404F71.png" xlink:type="simple" xlink:show="embed" xlink:actuate="onLoad">
            <text:p/>
          </draw:image>
        </draw:frame>
        <presentation:notes draw:style-name="dp2">
          <draw:page-thumbnail draw:name="Google Shape;121;g39eb482cd5a_0_43:notes" draw:style-name="gr1" draw:layer="layout" svg:width="16.932cm" svg:height="9.524cm" svg:x="1.059cm" svg:y="1.905cm" draw:page-number="10" presentation:class="page"/>
          <draw:frame draw:name="Google Shape;122;g39eb482cd5a_0_43:notes" presentation:style-name="pr13" draw:text-style-name="P15" draw:layer="layout" svg:width="15.239cm" svg:height="11.429cm" svg:x="1.905cm" svg:y="12.065cm" presentation:class="notes" presentation:user-transformed="true">
            <draw:text-box>
              <text:p text:style-name="P14"><text:span text:style-name="T17"><text:a xlink:href="https://metapatterns.io/basic-metapatterns/layers/" xlink:type="simple">https://metapatterns.io/basic-metapatterns/layers/</text:a></text:span></text:p>
            </draw:text-box>
          </draw:frame>
        </presentation:notes>
      </draw:page>
      <draw:page draw:name="Device Drivers and Microservices" draw:style-name="dp1" draw:master-page-name="TITLE_5f_AND_5f_BODY" presentation:presentation-page-layout-name="AL2T1">
        <draw:frame draw:name="Google Shape;135;p23" presentation:style-name="pr17" draw:text-style-name="P7" draw:layer="layout" svg:width="12.119cm" svg:height="9.185cm" svg:x="6.64cm" svg:y="2.827cm" presentation:class="outline" presentation:user-transformed="true">
          <draw:text-box>
            <text:p text:style-name="P10"><text:span text:style-name="T24">Each </text:span><text:span text:style-name="T25">device driver</text:span><text:span text:style-name="T24"> and each </text:span><text:span text:style-name="T25">microservice</text:span><text:span text:style-name="T24">:</text:span></text:p>
            <text:p text:style-name="P11"><text:span text:style-name="T24">– </text:span><text:span text:style-name="T24">Covers a whole subdomain.</text:span></text:p>
            <text:p text:style-name="P11"><text:span text:style-name="T24">– </text:span><text:span text:style-name="T24">Is developed by a dedicated team.</text:span></text:p>
            <text:p text:style-name="P11"><text:span text:style-name="T24">– </text:span><text:span text:style-name="T24">Has its own code style and technologies.</text:span></text:p>
            <text:p text:style-name="P11"><text:span text:style-name="T24">– </text:span><text:span text:style-name="T24">Is tested and released independently of others.</text:span></text:p>
            <text:p text:style-name="P12"><text:span text:style-name="T24">Both architectures are dedicated to multi-team development of complex projects but necessarily sacrifice the simplicity and convenience of use cases that involve several subdomains.</text:span></text:p>
          </draw:text-box>
        </draw:frame>
        <draw:frame draw:name="Google Shape;136;p23" presentation:style-name="pr5" draw:text-style-name="P8" draw:layer="layout" svg:width="23.667cm" svg:height="2.121cm" svg:x="0.866cm" svg:y="0.705cm" presentation:class="title" presentation:user-transformed="true">
          <draw:text-box>
            <text:p text:style-name="P1"><text:span text:style-name="T12">Device Drivers</text:span><text:span text:style-name="T11"> and </text:span><text:span text:style-name="T12">Microservices</text:span></text:p>
          </draw:text-box>
        </draw:frame>
        <draw:frame draw:name="Google Shape;137;p23" presentation:style-name="pr17" draw:text-style-name="P7" draw:layer="layout" svg:width="23.667cm" svg:height="8.544cm" svg:x="0.866cm" svg:y="12.263cm" presentation:class="outline" presentation:user-transformed="true">
          <draw:text-box>
            <text:p text:style-name="P21"><text:span text:style-name="T25">Microservices</text:span><text:span text:style-name="T24">, thanks to their distributed nature, are quite scalable and fault tolerant.</text:span></text:p>
          </draw:text-box>
        </draw:frame>
        <draw:custom-shape draw:name="Google Shape;138;p23" draw:style-name="gr3" draw:text-style-name="P13" draw:layer="layout" svg:width="5.031cm" svg:height="1.271cm" svg:x="0.866cm" svg:y="9.876cm">
          <text:p text:style-name="P1"><text:span text:style-name="T26">OS Dri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3" draw:style-name="gr3" draw:text-style-name="P13" draw:layer="layout" svg:width="5.087cm" svg:height="1.271cm" svg:x="19.446cm" svg:y="9.876cm">
          <text:p text:style-name="P1"><text:span text:style-name="T26">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3" draw:style-name="gr2" draw:text-style-name="P16" draw:layer="layout" svg:width="5.087cm" svg:height="5.648cm" svg:x="0.866cm" svg:y="4.227cm">
          <draw:image xlink:href="Pictures/10000201000002D600000326E908F7AF883C0C4F.png" xlink:type="simple" xlink:show="embed" xlink:actuate="onLoad">
            <text:p/>
          </draw:image>
        </draw:frame>
        <draw:frame draw:name="Google Shape;141;p23" draw:style-name="gr2" draw:text-style-name="P16" draw:layer="layout" svg:width="5.087cm" svg:height="5.648cm" svg:x="19.446cm" svg:y="4.227cm">
          <draw:image xlink:href="Pictures/10000201000002D6000003264C4883E29B6D72CC.png" xlink:type="simple" xlink:show="embed" xlink:actuate="onLoad">
            <text:p/>
          </draw:image>
        </draw:frame>
        <presentation:notes draw:style-name="dp2">
          <draw:page-thumbnail draw:name="Google Shape;132;g39eca11a51e_0_12:notes" draw:style-name="gr1" draw:layer="layout" svg:width="16.932cm" svg:height="9.524cm" svg:x="1.059cm" svg:y="1.905cm" draw:page-number="11" presentation:class="page"/>
          <draw:frame draw:name="Google Shape;133;g39eca11a51e_0_12:notes" presentation:style-name="pr13" draw:text-style-name="P15" draw:layer="layout" svg:width="15.239cm" svg:height="11.429cm" svg:x="1.905cm" svg:y="12.065cm" presentation:class="notes" presentation:user-transformed="true">
            <draw:text-box>
              <text:p text:style-name="P14"><text:span text:style-name="T17"><text:a xlink:href="https://metapatterns.io/basic-metapatterns/services/" xlink:type="simple">https://metapatterns.io/basic-metapatterns/services/</text:a></text:span></text:p>
            </draw:text-box>
          </draw:frame>
        </presentation:notes>
      </draw:page>
      <draw:page draw:name="Pipes and Filters and Event-Driven Architecture" draw:style-name="dp1" draw:master-page-name="TITLE_5f_AND_5f_BODY" presentation:presentation-page-layout-name="AL2T1">
        <draw:frame draw:name="Google Shape;146;p24" presentation:style-name="pr12" draw:text-style-name="P7" draw:layer="layout" svg:width="23.225cm" svg:height="4.407cm" svg:x="0.866cm" svg:y="2.827cm" presentation:class="outline" presentation:user-transformed="true">
          <draw:text-box>
            <text:p text:style-name="P10"><text:span text:style-name="T24">Components of </text:span><text:span text:style-name="T25">Pipes and Filters</text:span><text:span text:style-name="T24"> or </text:span><text:span text:style-name="T25">Choreographed Event-Driven Architecture</text:span><text:span text:style-name="T24">:</text:span></text:p>
            <text:p text:style-name="P11"><text:span text:style-name="T24">– </text:span><text:span text:style-name="T24">Are easy to scale, add or replace without affecting the whole system.</text:span></text:p>
            <text:p text:style-name="P11"><text:span text:style-name="T24">– </text:span><text:span text:style-name="T24">Can be implemented and tested in isolation through event or data stream replay.</text:span></text:p>
            <text:p text:style-name="P12"><text:span text:style-name="T24">– </text:span><text:span text:style-name="T24">May differ in technologies.</text:span></text:p>
          </draw:text-box>
        </draw:frame>
        <draw:frame draw:name="Google Shape;147;p24" presentation:style-name="pr5" draw:text-style-name="P8" draw:layer="layout" svg:width="23.667cm" svg:height="2.187cm" svg:x="0.866cm" svg:y="0.64cm" presentation:class="title" presentation:user-transformed="true">
          <draw:text-box>
            <text:p text:style-name="P1"><text:span text:style-name="T27">Pipes and Filters</text:span><text:span text:style-name="T28"> and </text:span><text:span text:style-name="T27">Event-Driven Architecture</text:span></text:p>
          </draw:text-box>
        </draw:frame>
        <draw:frame draw:name="Google Shape;148;p24" presentation:style-name="pr12" draw:text-style-name="P7" draw:layer="layout" svg:width="23.225cm" svg:height="1.932cm" svg:x="0.866cm" svg:y="11.565cm" presentation:class="outline" presentation:user-transformed="true">
          <draw:text-box>
            <text:p text:style-name="P20"><text:span text:style-name="T25">Choreographed Event-Driven Architecture</text:span><text:span text:style-name="T24"> can utilize resources of multiple servers while </text:span><text:span text:style-name="T25">Pipes and Filters</text:span><text:span text:style-name="T24"> are usually limited to multiple CPU cores of a single workstation.</text:span></text:p>
          </draw:text-box>
        </draw:frame>
        <draw:custom-shape draw:name="Google Shape;149;p24" draw:style-name="gr3" draw:text-style-name="P13" draw:layer="layout" svg:width="6.797cm" svg:height="1.271cm" svg:x="1.059cm" svg:y="10.51cm">
          <text:p text:style-name="P1"><text:span text:style-name="T26">Pipes and Fil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4" draw:style-name="gr3" draw:text-style-name="P13" draw:layer="layout" svg:width="8.044cm" svg:height="1.271cm" svg:x="16.113cm" svg:y="10.51cm">
          <text:p text:style-name="P1"><text:span text:style-name="T26">Event-Drive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4" draw:style-name="gr2" draw:text-style-name="P16" draw:layer="layout" svg:width="6.72cm" svg:height="3.202cm" svg:x="1.098cm" svg:y="7.444cm">
          <draw:image xlink:href="Pictures/1000020100000354000001960FB647B62585239A.png" xlink:type="simple" xlink:show="embed" xlink:actuate="onLoad">
            <text:p/>
          </draw:image>
        </draw:frame>
        <draw:custom-shape draw:name="Google Shape;152;p24" draw:style-name="gr3" draw:text-style-name="P13" draw:layer="layout" svg:width="6.72cm" svg:height="3.423cm" svg:x="9.118cm" svg:y="7.362cm">
          <text:p text:style-name="P20"><text:span text:style-name="T24">Both architectures specialize in processing streams of closely related data packets or 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4" draw:style-name="gr2" draw:text-style-name="P16" draw:layer="layout" svg:width="6.575cm" svg:height="3.202cm" svg:x="17.1cm" svg:y="7.308cm">
          <draw:image xlink:href="Pictures/100002010000034E0000019CCFE2489CDDA13ADD.png" xlink:type="simple" xlink:show="embed" xlink:actuate="onLoad">
            <text:p/>
          </draw:image>
        </draw:frame>
        <presentation:notes draw:style-name="dp2">
          <draw:page-thumbnail draw:name="Google Shape;143;g39eca11a51e_0_20:notes" draw:style-name="gr1" draw:layer="layout" svg:width="16.932cm" svg:height="9.524cm" svg:x="1.059cm" svg:y="1.905cm" draw:page-number="12" presentation:class="page"/>
          <draw:frame draw:name="Google Shape;144;g39eca11a51e_0_20:notes" presentation:style-name="pr13" draw:text-style-name="P15" draw:layer="layout" svg:width="15.239cm" svg:height="11.429cm" svg:x="1.905cm" svg:y="12.065cm" presentation:class="notes" presentation:user-transformed="true">
            <draw:text-box>
              <text:p text:style-name="P14"><text:span text:style-name="T17"><text:a xlink:href="https://metapatterns.io/basic-metapatterns/pipeline/" xlink:type="simple">https://metapatterns.io/basic-metapatterns/pipeline/</text:a></text:span></text:p>
            </draw:text-box>
          </draw:frame>
        </presentation:notes>
      </draw:page>
      <draw:page draw:name="What have we done?" draw:style-name="dp1" draw:master-page-name="TITLE_5f_AND_5f_BODY" presentation:presentation-page-layout-name="AL2T1">
        <draw:frame draw:name="Google Shape;158;p25" presentation:style-name="pr5" draw:text-style-name="P8" draw:layer="layout" svg:width="23.667cm" svg:height="1.692cm" svg:x="0.866cm" svg:y="1.509cm" presentation:class="title" presentation:user-transformed="true">
          <draw:text-box>
            <text:p text:style-name="P1"><text:span text:style-name="T11">What have we done?</text:span></text:p>
          </draw:text-box>
        </draw:frame>
        <draw:frame draw:name="Google Shape;159;p25" presentation:style-name="pr4" draw:text-style-name="P7" draw:layer="layout" svg:width="23.667cm" svg:height="9.489cm" svg:x="0.866cm" svg:y="3.201cm" presentation:class="outline" presentation:user-transformed="true">
          <draw:text-box>
            <text:p text:style-name="P22"><text:span text:style-name="T29">As we see, once the system properties rooted </text:span></text:p>
            <text:p text:style-name="P23"><text:span text:style-name="T29">in distribution are segregated, whatever remains </text:span></text:p>
            <text:p text:style-name="P23"><text:span text:style-name="T29">of a distributed architecture is identical to </text:span></text:p>
            <text:p text:style-name="P24"><text:span text:style-name="T29">a decades-old pattern for local applications.</text:span></text:p>
          </draw:text-box>
        </draw:frame>
        <presentation:notes draw:style-name="dp2">
          <draw:page-thumbnail draw:name="Google Shape;155;g39eca11a51e_0_27:notes" draw:style-name="gr1" draw:layer="layout" svg:width="16.932cm" svg:height="9.524cm" svg:x="1.059cm" svg:y="1.905cm" draw:page-number="13" presentation:class="page"/>
          <draw:frame draw:name="Google Shape;156;g39eca11a51e_0_27:notes" presentation:style-name="pr13" draw:text-style-name="P15" draw:layer="layout" svg:width="15.239cm" svg:height="11.429cm" svg:x="1.905cm" svg:y="12.065cm" presentation:class="notes" presentation:user-transformed="true">
            <draw:text-box>
              <text:p text:style-name="P14"><text:span text:style-name="T10">The continuity of architectures between an unstructured monolithic and distributed systems </text:span><text:span text:style-name="T17"><text:a xlink:href="https://metapatterns.io/basic-metapatterns/monolith/#relations" xlink:type="simple">https://metapatterns.io/basic-metapatterns/monolith/#relations</text:a></text:span></text:p>
            </draw:text-box>
          </draw:frame>
        </presentation:notes>
      </draw:page>
      <draw:page draw:name="Patterns of Patterns" draw:style-name="dp1" draw:master-page-name="SECTION_5f_HEADER">
        <draw:frame draw:name="Google Shape;164;p26" presentation:style-name="pr15" draw:text-style-name="P9" draw:layer="layout" svg:width="23.667cm" svg:height="2.337cm" svg:x="0.866cm" svg:y="5.975cm" presentation:class="title" presentation:user-transformed="true">
          <draw:text-box>
            <text:p text:style-name="P1"><text:span text:style-name="T11">Patterns of Patterns</text:span></text:p>
          </draw:text-box>
        </draw:frame>
        <presentation:notes draw:style-name="dp2">
          <draw:page-thumbnail draw:name="Google Shape;161;g39eca11a51e_0_33:notes" draw:style-name="gr1" draw:layer="layout" svg:width="16.932cm" svg:height="9.524cm" svg:x="1.059cm" svg:y="1.905cm" draw:page-number="14" presentation:class="page"/>
          <draw:frame draw:name="Google Shape;162;g39eca11a51e_0_33:notes" presentation:style-name="pr18" draw:text-style-name="P4" draw:layer="layout" svg:width="15.239cm" svg:height="11.429cm" svg:x="1.905cm" svg:y="12.065cm" presentation:class="notes" presentation:placeholder="true" presentation:user-transformed="true">
            <draw:text-box/>
          </draw:frame>
        </presentation:notes>
      </draw:page>
      <draw:page draw:name="How did we compare architectures?" draw:style-name="dp1" draw:master-page-name="TITLE_5f_AND_5f_BODY" presentation:presentation-page-layout-name="AL2T1">
        <draw:frame draw:name="Google Shape;169;p27" presentation:style-name="pr4" draw:text-style-name="P7" draw:layer="layout" svg:width="12.314cm" svg:height="8.331cm" svg:x="0.866cm" svg:y="2.827cm" presentation:class="outline" presentation:user-transformed="true">
          <draw:text-box>
            <text:p text:style-name="P10"><text:span text:style-name="T30">We drew them with a common system of coordinates:</text:span></text:p>
            <text:p text:style-name="P11"><text:span text:style-name="T30">– </text:span><text:span text:style-name="T30">Abstractness</text:span></text:p>
            <text:p text:style-name="P11"><text:span text:style-name="T30">– </text:span><text:span text:style-name="T30">Subdomain</text:span></text:p>
            <text:p text:style-name="P12"><text:span text:style-name="T30">– </text:span><text:span text:style-name="T30">Sharding</text:span></text:p>
          </draw:text-box>
        </draw:frame>
        <draw:frame draw:name="Google Shape;170;p27" presentation:style-name="pr5" draw:text-style-name="P8" draw:layer="layout" svg:width="23.667cm" svg:height="2.121cm" svg:x="0.866cm" svg:y="0.705cm" presentation:class="title" presentation:user-transformed="true">
          <draw:text-box>
            <text:p text:style-name="P1"><text:span text:style-name="T11">How did we compare architectures?</text:span></text:p>
          </draw:text-box>
        </draw:frame>
        <draw:frame draw:name="Google Shape;171;p27" presentation:style-name="pr12" draw:text-style-name="P7" draw:layer="layout" svg:width="23.225cm" svg:height="1.932cm" svg:x="0.866cm" svg:y="11.565cm" presentation:class="outline" presentation:user-transformed="true">
          <draw:text-box>
            <text:p text:style-name="P21"><text:span text:style-name="T31">Structure determines function!</text:span></text:p>
          </draw:text-box>
        </draw:frame>
        <draw:frame draw:name="Google Shape;172;p27" draw:style-name="gr2" draw:text-style-name="P16" draw:layer="layout" svg:width="8.162cm" svg:height="7.89cm" svg:x="14.218cm" svg:y="3.047cm">
          <draw:image xlink:href="Pictures/10000201000002EF000002D67A2AEE6182D8FD5C.png" xlink:type="simple" xlink:show="embed" xlink:actuate="onLoad">
            <text:p/>
          </draw:image>
        </draw:frame>
        <presentation:notes draw:style-name="dp2">
          <draw:page-thumbnail draw:name="Google Shape;166;g39ecdd5df51_0_0:notes" draw:style-name="gr1" draw:layer="layout" svg:width="16.932cm" svg:height="9.524cm" svg:x="1.059cm" svg:y="1.905cm" draw:page-number="15" presentation:class="page"/>
          <draw:frame draw:name="Google Shape;167;g39ecdd5df51_0_0:notes" presentation:style-name="pr13" draw:text-style-name="P15" draw:layer="layout" svg:width="15.239cm" svg:height="11.429cm" svg:x="1.905cm" svg:y="12.065cm" presentation:class="notes" presentation:user-transformed="true">
            <draw:text-box>
              <text:p text:style-name="P14"><text:span text:style-name="T17"><text:a xlink:href="https://metapatterns.io/introduction/metapatterns/" xlink:type="simple">https://metapatterns.io/introduction/metapatterns/</text:a></text:span></text:p>
            </draw:text-box>
          </draw:frame>
        </presentation:notes>
      </draw:page>
      <draw:page draw:name="Metapatterns" draw:style-name="dp1" draw:master-page-name="TITLE_5f_AND_5f_BODY" presentation:presentation-page-layout-name="AL2T1">
        <draw:frame draw:name="Google Shape;177;p28" presentation:style-name="pr5" draw:text-style-name="P8" draw:layer="layout" svg:width="23.667cm" svg:height="1.692cm" svg:x="0.866cm" svg:y="1.509cm" presentation:class="title" presentation:user-transformed="true">
          <draw:text-box>
            <text:p text:style-name="P1"><text:span text:style-name="T11">Metapatterns</text:span></text:p>
          </draw:text-box>
        </draw:frame>
        <draw:frame draw:name="Google Shape;178;p28" presentation:style-name="pr4" draw:text-style-name="P7" draw:layer="layout" svg:width="23.667cm" svg:height="9.489cm" svg:x="0.866cm" svg:y="3.201cm" presentation:class="outline" presentation:user-transformed="true">
          <draw:text-box>
            <text:p text:style-name="P25"><text:span text:style-name="T32">A </text:span><text:span text:style-name="T33">metapattern</text:span><text:span text:style-name="T32"> is a cluster of patterns related in their structure and thus also in their properties</text:span></text:p>
          </draw:text-box>
        </draw:frame>
        <presentation:notes draw:style-name="dp2">
          <draw:page-thumbnail draw:name="Google Shape;174;g39ecdd5df51_0_13:notes" draw:style-name="gr1" draw:layer="layout" svg:width="16.932cm" svg:height="9.524cm" svg:x="1.059cm" svg:y="1.905cm" draw:page-number="16" presentation:class="page"/>
          <draw:frame draw:name="Google Shape;175;g39ecdd5df51_0_13:notes" presentation:style-name="pr19" draw:text-style-name="P4" draw:layer="layout" svg:width="15.239cm" svg:height="11.429cm" svg:x="1.905cm" svg:y="12.065cm" presentation:class="notes" presentation:placeholder="true" presentation:user-transformed="true">
            <draw:text-box/>
          </draw:frame>
        </presentation:notes>
      </draw:page>
      <draw:page draw:name="There are few metapatterns" draw:style-name="dp1" draw:master-page-name="TITLE_5f_AND_5f_BODY" presentation:presentation-page-layout-name="AL2T1">
        <draw:frame draw:name="Google Shape;183;p29" presentation:style-name="pr5" draw:text-style-name="P8" draw:layer="layout" svg:width="23.667cm" svg:height="2.371cm" svg:x="0.866cm" svg:y="0.83cm" presentation:class="title" presentation:user-transformed="true">
          <draw:text-box>
            <text:p text:style-name="P1"><text:span text:style-name="T11">There are few metapatterns</text:span></text:p>
          </draw:text-box>
        </draw:frame>
        <draw:frame draw:name="Google Shape;184;p29" presentation:style-name="pr4" draw:text-style-name="P7" draw:layer="layout" svg:width="23.667cm" svg:height="9.489cm" svg:x="0.866cm" svg:y="3.201cm" presentation:class="outline" presentation:user-transformed="true">
          <draw:text-box>
            <text:p text:style-name="P22"><text:span text:style-name="T32">As a metapattern is defined by its structure, </text:span></text:p>
            <text:p text:style-name="P23"><text:span text:style-name="T32">and the structure is a geometry in a 3D space,</text:span></text:p>
            <text:p text:style-name="P23"><text:span text:style-name="T32">there are only so many metapatterns.</text:span></text:p>
            <text:p text:style-name="P23"><text:span text:style-name="T29">Therefore hundreds of patterns are reduced</text:span></text:p>
            <text:p text:style-name="P24"><text:span text:style-name="T29">to several clusters with manifest properties.</text:span></text:p>
          </draw:text-box>
        </draw:frame>
        <presentation:notes draw:style-name="dp2">
          <draw:page-thumbnail draw:name="Google Shape;180;g39ecdd5df51_0_18:notes" draw:style-name="gr1" draw:layer="layout" svg:width="16.932cm" svg:height="9.524cm" svg:x="1.059cm" svg:y="1.905cm" draw:page-number="17" presentation:class="page"/>
          <draw:frame draw:name="Google Shape;181;g39ecdd5df51_0_18:notes" presentation:style-name="pr20" draw:text-style-name="P4" draw:layer="layout" svg:width="15.239cm" svg:height="11.429cm" svg:x="1.905cm" svg:y="12.065cm" presentation:class="notes" presentation:placeholder="true" presentation:user-transformed="true">
            <draw:text-box/>
          </draw:frame>
        </presentation:notes>
      </draw:page>
      <draw:page draw:name="The benefits of having a taxonomy of patterns" draw:style-name="dp1" draw:master-page-name="TITLE_5f_AND_5f_BODY" presentation:presentation-page-layout-name="AL2T1">
        <draw:frame draw:name="Google Shape;189;p30" presentation:style-name="pr5" draw:text-style-name="P8" draw:layer="layout" svg:width="23.667cm" svg:height="2.371cm" svg:x="0.866cm" svg:y="0.83cm" presentation:class="title" presentation:user-transformed="true">
          <draw:text-box>
            <text:p text:style-name="P1"><text:span text:style-name="T34">The benefits of having a taxonomy of patterns</text:span></text:p>
          </draw:text-box>
        </draw:frame>
        <draw:frame draw:name="Google Shape;190;p30" presentation:style-name="pr14" draw:text-style-name="P7" draw:layer="layout" svg:width="23.667cm" svg:height="9.489cm" svg:x="0.866cm" svg:y="3.201cm" presentation:class="outline" presentation:user-transformed="true">
          <draw:text-box>
            <text:p text:style-name="P10"><text:span text:style-name="T35">– </text:span><text:span text:style-name="T35">A hierarchical classification is easy to learn and study.</text:span></text:p>
            <text:p text:style-name="P26"><text:span text:style-name="T35">– </text:span><text:span text:style-name="T35">Duplicate or ambiguous entities become obvious.</text:span></text:p>
            <text:p text:style-name="P27"><text:span text:style-name="T35">– </text:span><text:span text:style-name="T35">Novel solutions may be found through mapping architectures between domains.</text:span></text:p>
          </draw:text-box>
        </draw:frame>
        <presentation:notes draw:style-name="dp2">
          <draw:page-thumbnail draw:name="Google Shape;186;g39fdf05ae7b_0_0:notes" draw:style-name="gr1" draw:layer="layout" svg:width="16.932cm" svg:height="9.524cm" svg:x="1.059cm" svg:y="1.905cm" draw:page-number="18" presentation:class="page"/>
          <draw:frame draw:name="Google Shape;187;g39fdf05ae7b_0_0:notes" presentation:style-name="pr21" draw:text-style-name="P4" draw:layer="layout" svg:width="15.239cm" svg:height="11.429cm" svg:x="1.905cm" svg:y="12.065cm" presentation:class="notes" presentation:placeholder="true" presentation:user-transformed="true">
            <draw:text-box/>
          </draw:frame>
        </presentation:notes>
      </draw:page>
      <draw:page draw:name="Known Metapatterns" draw:style-name="dp1" draw:master-page-name="SECTION_5f_HEADER">
        <draw:frame draw:name="Google Shape;195;p31" presentation:style-name="pr15" draw:text-style-name="P9" draw:layer="layout" svg:width="23.667cm" svg:height="2.337cm" svg:x="0.866cm" svg:y="5.975cm" presentation:class="title" presentation:user-transformed="true">
          <draw:text-box>
            <text:p text:style-name="P1"><text:span text:style-name="T11">Known Metapatterns</text:span></text:p>
          </draw:text-box>
        </draw:frame>
        <presentation:notes draw:style-name="dp2">
          <draw:page-thumbnail draw:name="Google Shape;192;g39ecdd5df51_0_23:notes" draw:style-name="gr1" draw:layer="layout" svg:width="16.932cm" svg:height="9.524cm" svg:x="1.059cm" svg:y="1.905cm" draw:page-number="19" presentation:class="page"/>
          <draw:frame draw:name="Google Shape;193;g39ecdd5df51_0_23:notes" presentation:style-name="pr22" draw:text-style-name="P4" draw:layer="layout" svg:width="15.239cm" svg:height="11.429cm" svg:x="1.905cm" svg:y="12.065cm" presentation:class="notes" presentation:placeholder="true" presentation:user-transformed="true">
            <draw:text-box/>
          </draw:frame>
        </presentation:notes>
      </draw:page>
      <draw:page draw:name="Basic Metapatterns" draw:style-name="dp1" draw:master-page-name="TITLE_5f_ONLY" presentation:presentation-page-layout-name="AL4T19">
        <draw:frame draw:name="Google Shape;200;p32" draw:style-name="standard" draw:layer="layout" svg:width="20.106cm" svg:height="8.95cm" svg:x="2.646cm" svg:y="2.964cm">
          <table:tabl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2" table:default-cell-style-name="ce1">
              <table:table-cell>
                <text:p text:style-name="P1"><text:span text:style-name="T14">Monolith</text:span></text:p>
              </table:table-cell>
              <table:table-cell>
                <text:p text:style-name="P1"><text:span text:style-name="T14">Shards</text:span></text:p>
              </table:table-cell>
              <table:table-cell>
                <text:p text:style-name="P1"><text:span text:style-name="T14">Layers</text:span></text:p>
              </table:table-cell>
              <table:table-cell>
                <text:p text:style-name="P1"><text:span text:style-name="T14">Services</text:span></text:p>
              </table:table-cell>
              <table:table-cell>
                <text:p text:style-name="P1"><text:span text:style-name="T14">Pipeline</text:span></text:p>
              </table:table-cell>
            </table:table-row>
            <table:table-row table:style-name="ro3" table:default-cell-style-name="ce1">
              <table:table-cell>
                <text:p text:style-name="P22"><text:span text:style-name="T36">Reactor, Proactor,</text:span></text:p>
                <text:p text:style-name="P22"><text:span text:style-name="T36">Half-Sync / Half-Async,</text:span></text:p>
                <text:p text:style-name="P22"><text:span text:style-name="T36">(Re)Actor-with-</text:span></text:p>
                <text:p text:style-name="P22"><text:span text:style-name="T36">Extractors</text:span></text:p>
              </table:table-cell>
              <table:table-cell>
                <text:p text:style-name="P22"><text:span text:style-name="T36">Shards, Partitions, Instances, Replicas</text:span></text:p>
              </table:table-cell>
              <table:table-cell>
                <text:p text:style-name="P22"><text:span text:style-name="T36">Layers, Tiers</text:span></text:p>
              </table:table-cell>
              <table:table-cell>
                <text:p text:style-name="P22"><text:span text:style-name="T36">Service-Based Architecture, Modular Monolith, Microservices, Actors</text:span></text:p>
              </table:table-cell>
              <table:table-cell>
                <text:p text:style-name="P22"><text:span text:style-name="T36">Pipes and Filters, Choreographed Event-Driven Architecture, Data Mesh</text:span></text:p>
              </table:table-cell>
            </table:table-row>
          </table:table>
          <draw:image xlink:href="Pictures/TablePreview1.svm" xlink:type="simple" xlink:show="embed" xlink:actuate="onLoad"/>
        </draw:frame>
        <draw:frame draw:name="Google Shape;201;p32" presentation:style-name="pr23" draw:text-style-name="P8" draw:layer="layout" svg:width="23.667cm" svg:height="2.143cm" svg:x="0.866cm" svg:y="0.683cm" presentation:class="title" presentation:user-transformed="true">
          <draw:text-box>
            <text:p text:style-name="P1"><text:span text:style-name="T11">Basic Metapatterns</text:span></text:p>
          </draw:text-box>
        </draw:frame>
        <draw:frame draw:name="Google Shape;202;p32" draw:style-name="gr2" draw:text-style-name="P16" draw:layer="layout" svg:width="4.021cm" svg:height="2.692cm" svg:x="2.646cm" svg:y="2.964cm">
          <draw:image xlink:href="Pictures/100002010000036800000248E1C38877B19AF6DB.png" xlink:type="simple" xlink:show="embed" xlink:actuate="onLoad">
            <text:p/>
          </draw:image>
        </draw:frame>
        <draw:frame draw:name="Google Shape;203;p32" draw:style-name="gr2" draw:text-style-name="P16" draw:layer="layout" svg:width="4.021cm" svg:height="2.674cm" svg:x="6.667cm" svg:y="2.964cm">
          <draw:image xlink:href="Pictures/100002010000036E00000248292D0F24516EC77D.png" xlink:type="simple" xlink:show="embed" xlink:actuate="onLoad">
            <text:p/>
          </draw:image>
        </draw:frame>
        <draw:frame draw:name="Google Shape;204;p32" draw:style-name="gr2" draw:text-style-name="P16" draw:layer="layout" svg:width="4.021cm" svg:height="2.711cm" svg:x="10.689cm" svg:y="2.964cm">
          <draw:image xlink:href="Pictures/10000201000003680000024C71EF9C01601D40B0.png" xlink:type="simple" xlink:show="embed" xlink:actuate="onLoad">
            <text:p/>
          </draw:image>
        </draw:frame>
        <draw:frame draw:name="Google Shape;205;p32" draw:style-name="gr2" draw:text-style-name="P16" draw:layer="layout" svg:width="4.036cm" svg:height="2.731cm" svg:x="14.711cm" svg:y="2.964cm">
          <draw:image xlink:href="Pictures/10000201000003680000024EADC46E96DF6B24B2.png" xlink:type="simple" xlink:show="embed" xlink:actuate="onLoad">
            <text:p/>
          </draw:image>
        </draw:frame>
        <draw:frame draw:name="Google Shape;206;p32" draw:style-name="gr2" draw:text-style-name="P16" draw:layer="layout" svg:width="4.036cm" svg:height="2.694cm" svg:x="18.733cm" svg:y="2.964cm">
          <draw:image xlink:href="Pictures/100002010000036B0000024866FD1D1C968D06C2.png" xlink:type="simple" xlink:show="embed" xlink:actuate="onLoad">
            <text:p/>
          </draw:image>
        </draw:frame>
        <presentation:notes draw:style-name="dp2">
          <draw:page-thumbnail draw:name="Google Shape;197;g39ecdd5df51_0_28:notes" draw:style-name="gr1" draw:layer="layout" svg:width="16.932cm" svg:height="9.524cm" svg:x="1.059cm" svg:y="1.905cm" draw:page-number="20" presentation:class="page"/>
          <draw:frame draw:name="Google Shape;198;g39ecdd5df51_0_28:notes" presentation:style-name="pr24" draw:text-style-name="P15" draw:layer="layout" svg:width="15.239cm" svg:height="11.429cm" svg:x="1.905cm" svg:y="12.065cm" presentation:class="notes" presentation:user-transformed="true">
            <draw:text-box>
              <text:p text:style-name="P14"><text:span text:style-name="T10">These are the building blocks for more complex architectures </text:span><text:span text:style-name="T17"><text:a xlink:href="https://metapatterns.io/basic-metapatterns/" xlink:type="simple">https://metapatterns.io/basic-metapatterns/</text:a></text:span></text:p>
            </draw:text-box>
          </draw:frame>
        </presentation:notes>
      </draw:page>
      <draw:page draw:name="Extension Metapatterns" draw:style-name="dp1" draw:master-page-name="TITLE_5f_ONLY" presentation:presentation-page-layout-name="AL4T19">
        <draw:frame draw:name="Google Shape;211;p33" presentation:style-name="pr23" draw:text-style-name="P8" draw:layer="layout" svg:width="23.667cm" svg:height="2.143cm" svg:x="0.866cm" svg:y="0.683cm" presentation:class="title" presentation:user-transformed="true">
          <draw:text-box>
            <text:p text:style-name="P1"><text:span text:style-name="T11">Extension Metapatterns</text:span></text:p>
          </draw:text-box>
        </draw:frame>
        <draw:frame draw:name="Google Shape;212;p33" draw:style-name="standard" draw:layer="layout" svg:width="20.106cm" svg:height="10.353cm" svg:x="2.646cm" svg:y="2.827cm">
          <table:table>
            <table:table-column table:style-name="co1"/>
            <table:table-column table:style-name="co1"/>
            <table:table-column table:style-name="co1"/>
            <table:table-column table:style-name="co1"/>
            <table:table-column table:style-name="co2"/>
            <table:table-row table:style-name="ro4" table:default-cell-style-name="ce2">
              <table:table-cell/>
              <table:table-cell/>
              <table:table-cell/>
              <table:table-cell/>
              <table:table-cell/>
            </table:table-row>
            <table:table-row table:style-name="ro5" table:default-cell-style-name="ce2">
              <table:table-cell>
                <text:p text:style-name="P1"><text:span text:style-name="T14">Middleware</text:span></text:p>
              </table:table-cell>
              <table:table-cell>
                <text:p text:style-name="P1"><text:span text:style-name="T14">Shared Repository</text:span></text:p>
              </table:table-cell>
              <table:table-cell>
                <text:p text:style-name="P1"><text:span text:style-name="T14">Proxy</text:span></text:p>
              </table:table-cell>
              <table:table-cell>
                <text:p text:style-name="P1"><text:span text:style-name="T14">Orchestrator</text:span></text:p>
              </table:table-cell>
              <table:table-cell>
                <text:p text:style-name="P1"><text:span text:style-name="T14">Combined Component</text:span></text:p>
              </table:table-cell>
            </table:table-row>
            <table:table-row table:style-name="ro6" table:default-cell-style-name="ce2">
              <table:table-cell>
                <text:p text:style-name="P22"><text:span text:style-name="T36">Message Broker, Deployment Manager</text:span></text:p>
              </table:table-cell>
              <table:table-cell>
                <text:p text:style-name="P22"><text:span text:style-name="T36">Shared Database, Shared Memory, Shared FS, Blackboard, Data Grid</text:span></text:p>
              </table:table-cell>
              <table:table-cell>
                <text:p text:style-name="P22"><text:span text:style-name="T36">Firewall, Response Cache, Load Balancer, Reverse Proxy, Adapter, ACL, OAL, HAL, etc.</text:span></text:p>
              </table:table-cell>
              <table:table-cell>
                <text:p text:style-name="P22"><text:span text:style-name="T36">Mediator, Facade, Scatter-Gather,Process Manager, Saga, Transaction Script</text:span></text:p>
              </table:table-cell>
              <table:table-cell>
                <text:p text:style-name="P22"><text:span text:style-name="T36">Message Bus, API Gateway, Event Mediator, ESB, Service Mesh, Space-Based Architecture</text:span></text:p>
              </table:table-cell>
            </table:table-row>
          </table:table>
          <draw:image xlink:href="Pictures/TablePreview2.svm" xlink:type="simple" xlink:show="embed" xlink:actuate="onLoad"/>
        </draw:frame>
        <draw:frame draw:name="Google Shape;213;p33" draw:style-name="gr2" draw:text-style-name="P16" draw:layer="layout" svg:width="4.021cm" svg:height="3.366cm" svg:x="2.646cm" svg:y="2.827cm">
          <draw:image xlink:href="Pictures/1000020100000368000002DAB61413CE8B37DF4B.png" xlink:type="simple" xlink:show="embed" xlink:actuate="onLoad">
            <text:p/>
          </draw:image>
        </draw:frame>
        <draw:frame draw:name="Google Shape;214;p33" draw:style-name="gr2" draw:text-style-name="P16" draw:layer="layout" svg:width="4.021cm" svg:height="3.366cm" svg:x="6.667cm" svg:y="2.827cm">
          <draw:image xlink:href="Pictures/1000020100000368000002DA1F748DE430DA62B4.png" xlink:type="simple" xlink:show="embed" xlink:actuate="onLoad">
            <text:p/>
          </draw:image>
        </draw:frame>
        <draw:frame draw:name="Google Shape;215;p33" draw:style-name="gr2" draw:text-style-name="P16" draw:layer="layout" svg:width="4.021cm" svg:height="3.357cm" svg:x="10.689cm" svg:y="2.827cm">
          <draw:image xlink:href="Pictures/1000020100000368000002D8A2BE6187220BDC61.png" xlink:type="simple" xlink:show="embed" xlink:actuate="onLoad">
            <text:p/>
          </draw:image>
        </draw:frame>
        <draw:frame draw:name="Google Shape;216;p33" draw:style-name="gr2" draw:text-style-name="P16" draw:layer="layout" svg:width="4.021cm" svg:height="3.357cm" svg:x="14.711cm" svg:y="2.827cm">
          <draw:image xlink:href="Pictures/1000020100000368000002D843FD9E1836C86E2F.png" xlink:type="simple" xlink:show="embed" xlink:actuate="onLoad">
            <text:p/>
          </draw:image>
        </draw:frame>
        <draw:frame draw:name="Google Shape;217;p33" draw:style-name="gr2" draw:text-style-name="P16" draw:layer="layout" svg:width="4.01cm" svg:height="3.357cm" svg:x="18.732cm" svg:y="2.827cm">
          <draw:image xlink:href="Pictures/1000020100000368000002DAF4AA6AD5D3F8F90C.png" xlink:type="simple" xlink:show="embed" xlink:actuate="onLoad">
            <text:p/>
          </draw:image>
        </draw:frame>
        <presentation:notes draw:style-name="dp2">
          <draw:page-thumbnail draw:name="Google Shape;208;g39f6524f0af_0_2:notes" draw:style-name="gr1" draw:layer="layout" svg:width="16.932cm" svg:height="9.524cm" svg:x="1.059cm" svg:y="1.905cm" draw:page-number="21" presentation:class="page"/>
          <draw:frame draw:name="Google Shape;209;g39f6524f0af_0_2:notes" presentation:style-name="pr24" draw:text-style-name="P15" draw:layer="layout" svg:width="15.239cm" svg:height="11.429cm" svg:x="1.905cm" svg:y="12.065cm" presentation:class="notes" presentation:user-transformed="true">
            <draw:text-box>
              <text:p text:style-name="P14"><text:span text:style-name="T10">A system-wide layer implements cross-cutting concerns for other components dedicated to business logic </text:span><text:span text:style-name="T17"><text:a xlink:href="https://metapatterns.io/extension-metapatterns/" xlink:type="simple">https://metapatterns.io/extension-metapatterns/</text:a></text:span></text:p>
            </draw:text-box>
          </draw:frame>
        </presentation:notes>
      </draw:page>
      <draw:page draw:name="Fragmented Metapatterns" draw:style-name="dp1" draw:master-page-name="TITLE_5f_ONLY" presentation:presentation-page-layout-name="AL4T19">
        <draw:frame draw:name="Google Shape;222;p34" presentation:style-name="pr23" draw:text-style-name="P8" draw:layer="layout" svg:width="23.667cm" svg:height="2.143cm" svg:x="0.866cm" svg:y="0.683cm" presentation:class="title" presentation:user-transformed="true">
          <draw:text-box>
            <text:p text:style-name="P1"><text:span text:style-name="T11">Fragmented Metapatterns</text:span></text:p>
          </draw:text-box>
        </draw:frame>
        <draw:frame draw:name="Google Shape;223;p34" draw:style-name="standard" draw:layer="layout" svg:width="20.106cm" svg:height="9.994cm" svg:x="2.646cm" svg:y="2.914cm">
          <table:table>
            <table:table-column table:style-name="co1"/>
            <table:table-column table:style-name="co1"/>
            <table:table-column table:style-name="co1"/>
            <table:table-column table:style-name="co1"/>
            <table:table-column table:style-name="co2"/>
            <table:table-row table:style-name="ro7" table:default-cell-style-name="ce2">
              <table:table-cell/>
              <table:table-cell/>
              <table:table-cell/>
              <table:table-cell/>
              <table:table-cell/>
            </table:table-row>
            <table:table-row table:style-name="ro8" table:default-cell-style-name="ce2">
              <table:table-cell>
                <text:p text:style-name="P1"><text:span text:style-name="T14">Layered Services</text:span></text:p>
              </table:table-cell>
              <table:table-cell>
                <text:p text:style-name="P1"><text:span text:style-name="T14">Polyglot Persistence</text:span></text:p>
              </table:table-cell>
              <table:table-cell>
                <text:p text:style-name="P1"><text:span text:style-name="T14">Backends for Frontends</text:span></text:p>
              </table:table-cell>
              <table:table-cell>
                <text:p text:style-name="P1"><text:span text:style-name="T14">SOA</text:span></text:p>
              </table:table-cell>
              <table:table-cell>
                <text:p text:style-name="P1"><text:span text:style-name="T14">Hierarchy</text:span></text:p>
              </table:table-cell>
            </table:table-row>
            <table:table-row table:style-name="ro9" table:default-cell-style-name="ce2">
              <table:table-cell>
                <text:p text:style-name="P22"><text:span text:style-name="T37">Orchestrated 3-Layered Services, Choreographed 2-Layered Services, CQRS</text:span></text:p>
              </table:table-cell>
              <table:table-cell>
                <text:p text:style-name="P22"><text:span text:style-name="T37">Specialized Databases, CDN, Read-Only Replicas, Reporting Database</text:span></text:p>
              </table:table-cell>
              <table:table-cell>
                <text:p text:style-name="P22"><text:span text:style-name="T37">Multiple Proxies, Orchestrators or API Gateways</text:span></text:p>
              </table:table-cell>
              <table:table-cell>
                <text:p text:style-name="P22"><text:span text:style-name="T37">Enterprise SOA, Domain- Oriented Microservice Architecture, Distributed Monolith</text:span></text:p>
              </table:table-cell>
              <table:table-cell>
                <text:p text:style-name="P22"><text:span text:style-name="T37">Top-Down Hierarchy, PAC, HMVC, Bus of Buses, WSO2 Cell-Based Architecture</text:span></text:p>
              </table:table-cell>
            </table:table-row>
          </table:table>
          <draw:image xlink:href="Pictures/TablePreview3.svm" xlink:type="simple" xlink:show="embed" xlink:actuate="onLoad"/>
        </draw:frame>
        <draw:frame draw:name="Google Shape;224;p34" draw:style-name="gr2" draw:text-style-name="P16" draw:layer="layout" svg:width="4.021cm" svg:height="3.125cm" svg:x="2.646cm" svg:y="2.964cm">
          <draw:image xlink:href="Pictures/10000201000004280000033BEFBA33C2BDD9E9D2.png" xlink:type="simple" xlink:show="embed" xlink:actuate="onLoad">
            <text:p/>
          </draw:image>
        </draw:frame>
        <draw:frame draw:name="Google Shape;225;p34" draw:style-name="gr2" draw:text-style-name="P16" draw:layer="layout" svg:width="4.021cm" svg:height="3.095cm" svg:x="6.667cm" svg:y="2.964cm">
          <draw:image xlink:href="Pictures/100002010000042800000333B635666B69BDAFB5.png" xlink:type="simple" xlink:show="embed" xlink:actuate="onLoad">
            <text:p/>
          </draw:image>
        </draw:frame>
        <draw:frame draw:name="Google Shape;226;p34" draw:style-name="gr2" draw:text-style-name="P16" draw:layer="layout" svg:width="4.035cm" svg:height="3.125cm" svg:x="10.682cm" svg:y="2.914cm">
          <draw:image xlink:href="Pictures/1000020100000428000003387B57918175A62B01.png" xlink:type="simple" xlink:show="embed" xlink:actuate="onLoad">
            <text:p/>
          </draw:image>
        </draw:frame>
        <draw:frame draw:name="Google Shape;227;p34" draw:style-name="gr2" draw:text-style-name="P16" draw:layer="layout" svg:width="4.035cm" svg:height="3.125cm" svg:x="14.725cm" svg:y="2.964cm">
          <draw:image xlink:href="Pictures/100002010000042800000338C516AFF2D07AB9BF.png" xlink:type="simple" xlink:show="embed" xlink:actuate="onLoad">
            <text:p/>
          </draw:image>
        </draw:frame>
        <draw:frame draw:name="Google Shape;228;p34" draw:style-name="gr2" draw:text-style-name="P16" draw:layer="layout" svg:width="4.035cm" svg:height="3.125cm" svg:x="18.732cm" svg:y="2.964cm">
          <draw:image xlink:href="Pictures/100002010000042800000338A7BE94E48A0E7F15.png" xlink:type="simple" xlink:show="embed" xlink:actuate="onLoad">
            <text:p/>
          </draw:image>
        </draw:frame>
        <presentation:notes draw:style-name="dp2">
          <draw:page-thumbnail draw:name="Google Shape;219;g39f6524f0af_0_8:notes" draw:style-name="gr1" draw:layer="layout" svg:width="16.932cm" svg:height="9.524cm" svg:x="1.059cm" svg:y="1.905cm" draw:page-number="22" presentation:class="page"/>
          <draw:frame draw:name="Google Shape;220;g39f6524f0af_0_8:notes" presentation:style-name="pr24" draw:text-style-name="P15" draw:layer="layout" svg:width="15.239cm" svg:height="11.429cm" svg:x="1.905cm" svg:y="12.065cm" presentation:class="notes" presentation:user-transformed="true">
            <draw:text-box>
              <text:p text:style-name="P14"><text:span text:style-name="T10">These are architectures built from relatively small components </text:span><text:span text:style-name="T17"><text:a xlink:href="https://metapatterns.io/fragmented-metapatterns/" xlink:type="simple">https://metapatterns.io/fragmented-metapatterns/</text:a></text:span></text:p>
            </draw:text-box>
          </draw:frame>
        </presentation:notes>
      </draw:page>
      <draw:page draw:name="Implementation Metapatterns" draw:style-name="dp1" draw:master-page-name="TITLE_5f_ONLY" presentation:presentation-page-layout-name="AL4T19">
        <draw:frame draw:name="Google Shape;233;p35" presentation:style-name="pr23" draw:text-style-name="P8" draw:layer="layout" svg:width="23.667cm" svg:height="2.143cm" svg:x="0.866cm" svg:y="0.683cm" presentation:class="title" presentation:user-transformed="true">
          <draw:text-box>
            <text:p text:style-name="P1"><text:span text:style-name="T11">Implementation Metapatterns</text:span></text:p>
          </draw:text-box>
        </draw:frame>
        <draw:frame draw:name="Google Shape;234;p35" draw:style-name="standard" draw:layer="layout" svg:width="20.106cm" svg:height="9.743cm" svg:x="2.646cm" svg:y="2.964cm">
          <table:table>
            <table:table-column table:style-name="co1"/>
            <table:table-column table:style-name="co1"/>
            <table:table-column table:style-name="co1"/>
            <table:table-column table:style-name="co1"/>
            <table:table-column table:style-name="co2"/>
            <table:table-row table:style-name="ro10" table:default-cell-style-name="ce2">
              <table:table-cell/>
              <table:table-cell/>
              <table:table-cell/>
              <table:table-cell/>
              <table:table-cell/>
            </table:table-row>
            <table:table-row table:style-name="ro5" table:default-cell-style-name="ce2">
              <table:table-cell>
                <text:p text:style-name="P1"><text:span text:style-name="T14">Plugins</text:span></text:p>
              </table:table-cell>
              <table:table-cell>
                <text:p text:style-name="P1"><text:span text:style-name="T14">Hexagonal Architecture</text:span></text:p>
              </table:table-cell>
              <table:table-cell>
                <text:p text:style-name="P1"><text:span text:style-name="T14">Microkernel</text:span></text:p>
              </table:table-cell>
              <table:table-cell>
                <text:p text:style-name="P1"><text:span text:style-name="T14">Mesh</text:span></text:p>
              </table:table-cell>
              <table:table-cell/>
            </table:table-row>
            <table:table-row table:style-name="ro11" table:default-cell-style-name="ce2">
              <table:table-cell>
                <text:p text:style-name="P22"><text:span text:style-name="T37">Plugins, Addons, Strategy, Hooks, Aspects, Reflection</text:span></text:p>
              </table:table-cell>
              <table:table-cell>
                <text:p text:style-name="P22"><text:span text:style-name="T37">Ports and Adapters, Onion Architecture, MVC family, MVP family</text:span></text:p>
              </table:table-cell>
              <table:table-cell>
                <text:p text:style-name="P22"><text:span text:style-name="T37">OS, Software Framework, Hypervisor, Interpreter, </text:span></text:p>
                <text:p text:style-name="P22"><text:span text:style-name="T37">Saga Engine</text:span></text:p>
              </table:table-cell>
              <table:table-cell>
                <text:p text:style-name="P22"><text:span text:style-name="T37">P2P Network, Actors, </text:span></text:p>
                <text:p text:style-name="P22"><text:span text:style-name="T37">Service Mesh, Space-Based Architecture</text:span></text:p>
              </table:table-cell>
              <table:table-cell/>
            </table:table-row>
          </table:table>
          <draw:image xlink:href="Pictures/TablePreview4.svm" xlink:type="simple" xlink:show="embed" xlink:actuate="onLoad"/>
        </draw:frame>
        <draw:frame draw:name="Google Shape;235;p35" draw:style-name="gr2" draw:text-style-name="P16" draw:layer="layout" svg:width="4.021cm" svg:height="4.562cm" svg:x="6.668cm" svg:y="2.964cm">
          <draw:image xlink:href="Pictures/10000201000002D80000033A4217E916DFA57B95.png" xlink:type="simple" xlink:show="embed" xlink:actuate="onLoad">
            <text:p/>
          </draw:image>
        </draw:frame>
        <draw:frame draw:name="Google Shape;236;p35" draw:style-name="gr2" draw:text-style-name="P16" draw:layer="layout" svg:width="4.021cm" svg:height="4.545cm" svg:x="10.689cm" svg:y="2.964cm">
          <draw:image xlink:href="Pictures/10000201000002D90000033876F83EFC09F3E364.png" xlink:type="simple" xlink:show="embed" xlink:actuate="onLoad">
            <text:p/>
          </draw:image>
        </draw:frame>
        <draw:frame draw:name="Google Shape;237;p35" draw:style-name="gr2" draw:text-style-name="P16" draw:layer="layout" svg:width="4.021cm" svg:height="4.551cm" svg:x="14.711cm" svg:y="2.964cm">
          <draw:image xlink:href="Pictures/10000201000002D800000338329CC534AA61838C.png" xlink:type="simple" xlink:show="embed" xlink:actuate="onLoad">
            <text:p/>
          </draw:image>
        </draw:frame>
        <draw:frame draw:name="Google Shape;238;p35" draw:style-name="gr2" draw:text-style-name="P16" draw:layer="layout" svg:width="4.021cm" svg:height="4.551cm" svg:x="2.646cm" svg:y="2.964cm">
          <draw:image xlink:href="Pictures/10000201000002D800000338381ACD4259AACEAA.png" xlink:type="simple" xlink:show="embed" xlink:actuate="onLoad">
            <text:p/>
          </draw:image>
        </draw:frame>
        <presentation:notes draw:style-name="dp2">
          <draw:page-thumbnail draw:name="Google Shape;230;g39f6524f0af_0_14:notes" draw:style-name="gr1" draw:layer="layout" svg:width="16.932cm" svg:height="9.524cm" svg:x="1.059cm" svg:y="1.905cm" draw:page-number="23" presentation:class="page"/>
          <draw:frame draw:name="Google Shape;231;g39f6524f0af_0_14:notes" presentation:style-name="pr24" draw:text-style-name="P15" draw:layer="layout" svg:width="15.239cm" svg:height="11.429cm" svg:x="1.905cm" svg:y="12.065cm" presentation:class="notes" presentation:user-transformed="true">
            <draw:text-box>
              <text:p text:style-name="P14"><text:span text:style-name="T10">These architectures take a look inside a system component </text:span><text:span text:style-name="T17"><text:a xlink:href="https://metapatterns.io/implementation-metapatterns/" xlink:type="simple">https://metapatterns.io/implementation-metapatterns/</text:a></text:span></text:p>
            </draw:text-box>
          </draw:frame>
        </presentation:notes>
      </draw:page>
      <draw:page draw:name="Conclusion" draw:style-name="dp1" draw:master-page-name="SECTION_5f_HEADER">
        <draw:frame draw:name="Google Shape;243;p36" presentation:style-name="pr15" draw:text-style-name="P9" draw:layer="layout" svg:width="23.667cm" svg:height="2.337cm" svg:x="0.866cm" svg:y="5.975cm" presentation:class="title" presentation:user-transformed="true">
          <draw:text-box>
            <text:p text:style-name="P1"><text:span text:style-name="T11">Conclusion</text:span></text:p>
          </draw:text-box>
        </draw:frame>
        <presentation:notes draw:style-name="dp2">
          <draw:page-thumbnail draw:name="Google Shape;240;g39ecdd5df51_0_44:notes" draw:style-name="gr1" draw:layer="layout" svg:width="16.932cm" svg:height="9.524cm" svg:x="1.059cm" svg:y="1.905cm" draw:page-number="24" presentation:class="page"/>
          <draw:frame draw:name="Google Shape;241;g39ecdd5df51_0_44:notes" presentation:style-name="pr25" draw:text-style-name="P4" draw:layer="layout" svg:width="15.239cm" svg:height="11.429cm" svg:x="1.905cm" svg:y="12.065cm" presentation:class="notes" presentation:placeholder="true" presentation:user-transformed="true">
            <draw:text-box/>
          </draw:frame>
        </presentation:notes>
      </draw:page>
      <draw:page draw:name="Limitations" draw:style-name="dp1" draw:master-page-name="TITLE_5f_AND_5f_BODY" presentation:presentation-page-layout-name="AL2T1">
        <draw:frame draw:name="Google Shape;248;p37" presentation:style-name="pr5" draw:text-style-name="P8" draw:layer="layout" svg:width="23.667cm" svg:height="1.59cm" svg:x="0.866cm" svg:y="1.236cm" presentation:class="title" presentation:user-transformed="true">
          <draw:text-box>
            <text:p text:style-name="P1"><text:span text:style-name="T11">Limitations</text:span></text:p>
          </draw:text-box>
        </draw:frame>
        <draw:frame draw:name="Google Shape;249;p37" presentation:style-name="pr12" draw:text-style-name="P7" draw:layer="layout" svg:width="23.667cm" svg:height="9.489cm" svg:x="0.866cm" svg:y="3.201cm" presentation:class="outline" presentation:user-transformed="true">
          <draw:text-box>
            <text:p text:style-name="P10"><text:span text:style-name="T13">The structural approach works only for system-wide architectural patterns:</text:span></text:p>
            <text:p text:style-name="P11"><text:span text:style-name="T13">– </text:span><text:span text:style-name="T13">No Gang of Four design patterns</text:span></text:p>
            <text:p text:style-name="P11"><text:span text:style-name="T13">– </text:span><text:span text:style-name="T13">No Enterprise Integration patterns</text:span></text:p>
            <text:p text:style-name="P11"><text:span text:style-name="T13">– </text:span><text:span text:style-name="T13">No TDD organizational patterns</text:span></text:p>
            <text:p text:style-name="P12"><text:span text:style-name="T38">The research is in its early phase and is not supported by any organization.</text:span></text:p>
          </draw:text-box>
        </draw:frame>
        <presentation:notes draw:style-name="dp2">
          <draw:page-thumbnail draw:name="Google Shape;245;g39ecdd5df51_0_48:notes" draw:style-name="gr1" draw:layer="layout" svg:width="16.932cm" svg:height="9.524cm" svg:x="1.059cm" svg:y="1.905cm" draw:page-number="25" presentation:class="page"/>
          <draw:frame draw:name="Google Shape;246;g39ecdd5df51_0_48:notes" presentation:style-name="pr13" draw:text-style-name="P15" draw:layer="layout" svg:width="15.239cm" svg:height="11.429cm" svg:x="1.905cm" svg:y="12.065cm" presentation:class="notes" presentation:user-transformed="true">
            <draw:text-box>
              <text:p text:style-name="P14"><text:span text:style-name="T10">There is the bus factor and lack of funding.</text:span></text:p>
            </draw:text-box>
          </draw:frame>
        </presentation:notes>
      </draw:page>
      <draw:page draw:name="Links" draw:style-name="dp1" draw:master-page-name="TITLE_5f_AND_5f_BODY" presentation:presentation-page-layout-name="AL2T1">
        <draw:frame draw:name="Google Shape;254;p38" presentation:style-name="pr5" draw:text-style-name="P8" draw:layer="layout" svg:width="23.667cm" svg:height="1.59cm" svg:x="0.866cm" svg:y="1.236cm" presentation:class="title" presentation:user-transformed="true">
          <draw:text-box>
            <text:p text:style-name="P1"><text:span text:style-name="T11">Links</text:span></text:p>
          </draw:text-box>
        </draw:frame>
        <draw:frame draw:name="Google Shape;255;p38" presentation:style-name="pr12" draw:text-style-name="P7" draw:layer="layout" svg:width="23.667cm" svg:height="5.543cm" svg:x="0.866cm" svg:y="3.201cm" presentation:class="outline" presentation:user-transformed="true">
          <draw:text-box>
            <text:p text:style-name="P10"><text:span text:style-name="T3">My book </text:span><text:span text:style-name="T39">Architectural Metapatterns</text:span><text:span text:style-name="T3"> is available:</text:span></text:p>
            <text:p text:style-name="P11"><text:span text:style-name="T3">– </text:span><text:span text:style-name="T3">for reading online at </text:span><text:span text:style-name="T40"><text:a xlink:href="https://metapatterns.io/" xlink:type="simple">metapatterns.io</text:a></text:span></text:p>
            <text:p text:style-name="P11"><text:span text:style-name="T3">– </text:span><text:span text:style-name="T3">as an ebook from </text:span><text:span text:style-name="T40"><text:a xlink:href="https://leanpub.com/metapatterns" xlink:type="simple">leanpub.com/metapatterns</text:a></text:span></text:p>
            <text:p text:style-name="P12"><text:span text:style-name="T3">The diagrams and the ODT source file are provided under the CC BY license.</text:span></text:p>
          </draw:text-box>
        </draw:frame>
        <draw:frame draw:name="Google Shape;256;p38" presentation:style-name="pr4" draw:text-style-name="P7" draw:layer="layout" svg:width="23.667cm" svg:height="4.181cm" svg:x="0.866cm" svg:y="8.745cm" presentation:class="outline" presentation:user-transformed="true">
          <draw:text-box>
            <text:p text:style-name="P22"><text:span text:style-name="T41">This book is a seminal research on reframing patterns. </text:span></text:p>
            <text:p text:style-name="P22"><text:span text:style-name="T41">It’s up to you to see to it being recognized or discarded.</text:span></text:p>
          </draw:text-box>
        </draw:frame>
        <presentation:notes draw:style-name="dp2">
          <draw:page-thumbnail draw:name="Google Shape;251;g39ecdd5df51_0_53:notes" draw:style-name="gr1" draw:layer="layout" svg:width="16.932cm" svg:height="9.524cm" svg:x="1.059cm" svg:y="1.905cm" draw:page-number="26" presentation:class="page"/>
          <draw:frame draw:name="Google Shape;252;g39ecdd5df51_0_53:notes" presentation:style-name="pr13" draw:text-style-name="P15" draw:layer="layout" svg:width="15.239cm" svg:height="11.429cm" svg:x="1.905cm" svg:y="12.065cm" presentation:class="notes" presentation:user-transformed="true">
            <draw:text-box>
              <text:p text:style-name="P14"><text:span text:style-name="T10">I am out of options to promote the book and its ideas. If you spread the word about it, it may survive and help people see the big picture behind patterns.</text:span></text:p>
            </draw:text-box>
          </draw:frame>
        </presentation:notes>
        <officeooo:annotation svg:x="26.978cm" svg:y="0cm">
          <dc:creator>Lars Noodén</dc:creator>
          <dc:date>2025-11-04T08:44:56.703000000</dc:date>
          <text:p>Again, repeat the final version of the title slide after this one.</text:p>
        </officeooo:annotation>
        <officeooo:annotation svg:x="26.978cm" svg:y="0cm">
          <dc:creator>Denys Poltorak</dc:creator>
          <dc:date>2025-11-01T21:39:53.471000000</dc:date>
          <text:p>I believe it is better to show the links for the duration of the Q&amp;A session, if any</text:p>
        </officeooo:annotation>
        <officeooo:annotation svg:x="26.978cm" svg:y="0cm">
          <dc:creator>Lars Noodén</dc:creator>
          <dc:date>2025-11-02T09:46:43.322000000</dc:date>
          <text:p>Yes, this should be the "last" slide, and the one left up on the display during the Q&amp;A.  But having a backstop slide can be useful in case one clicks one too many times.  I saw that happen last month in a live presentation.  And again earlier this year.  It's common enough in live presentations that I've felt the need to mention it.  </text:p>
          <text:p/>
          <text:p>Which productivity suite will you use for the video?  If it stops at the last slide and can't go further with clicks or arrows, then the above is moot anyway.</text:p>
        </officeooo:annotation>
        <officeooo:annotation svg:x="26.978cm" svg:y="0cm">
          <dc:creator>Denys Poltorak</dc:creator>
          <dc:date>2025-11-03T16:23:11.267000000</dc:date>
          <text:p>I don't know anything about the presentation. It was just this comment https://www.reddit.com/r/softwarearchitecture/comments/1oez0d8/comment/nlb5ak9/</text:p>
          <text:p/>
          <text:p>Still, having slides for the book is a good idea in any case, even if the presentation will never happen.</text:p>
        </officeooo:annotation>
        <officeooo:annotation svg:x="26.978cm" svg:y="0cm">
          <dc:creator>Lars Noodén</dc:creator>
          <dc:date>2025-11-04T01:40:03.837000000</dc:date>
          <text:p>30 minutes usually means 20 minutes for the presentation and 10 for Q&amp;A.  Hopefully he will get back to you on that.  </text:p>
          <text:p/>
          <text:p>Can you talk through a practice runs through the slide deck with anyone locally?  It helps if they know programming but is not really necessary to practice the timing.</text:p>
        </officeooo:annotation>
        <officeooo:annotation svg:x="26.978cm" svg:y="0cm">
          <dc:creator>Denys Poltorak</dc:creator>
          <dc:date>2025-11-04T08:44:56.703000000</dc:date>
          <text:p>Thank you for explaining the timeline. I'm too lazy to prepare for the speech. Even if it fails I'll be able to publish the slides afterwards and, hopefully, many more people will see them.</text:p>
        </officeooo:annotation>
        <officeooo:annotation svg:x="1.587cm" svg:y="9.522cm">
          <dc:creator>Lars Noodén</dc:creator>
          <dc:date>2025-11-04T08:47:05.617000000</dc:date>
          <text:p>Maybe "this book describes seminal research on"</text:p>
          <text:p/>
          <text:p>The seconds sentence is awkwardly phrased.  What should be recognized XOR discarded?</text:p>
        </officeooo:annotation>
        <officeooo:annotation svg:x="1.587cm" svg:y="9.522cm">
          <dc:creator>Denys Poltorak</dc:creator>
          <dc:date>2025-11-01T19:11:38.521000000</dc:date>
          <text:p>The book itself is a research. There are noscientific papers behind it.</text:p>
          <text:p/>
          <text:p>As there are no papers, either the book and the ideas which it describes are accepted or the ideas are ignored, together with the book.</text:p>
          <text:p/>
          <text:p>It is up to the reader of the slides to help promote the book and its ideas, or to stand idle and see it die.</text:p>
        </officeooo:annotation>
        <officeooo:annotation svg:x="1.587cm" svg:y="9.522cm">
          <dc:creator>Lars Noodén</dc:creator>
          <dc:date>2025-11-02T09:42:46.672000000</dc:date>
          <text:p>Maybe, "This book is original research on reframing patterns."  And then  maybe leave off the second sentence, as it is a little confrontational.</text:p>
        </officeooo:annotation>
        <officeooo:annotation svg:x="1.587cm" svg:y="9.522cm">
          <dc:creator>Denys Poltorak</dc:creator>
          <dc:date>2025-11-03T16:26:18.788000000</dc:date>
          <text:p>I tried the non-confrontational way here https://medium.com/itnext/introduction-to-software-architecture-with-actors-part-5-on-fragmented-systems-f3027cce5de8</text:p>
          <text:p/>
          <text:p>That series of articles passed unnoticed though it contained all the ideas which the current book reuses. Therefore non-confrontation does not work in our world.</text:p>
        </officeooo:annotation>
        <officeooo:annotation svg:x="1.587cm" svg:y="9.522cm">
          <dc:creator>Lars Noodén</dc:creator>
          <dc:date>2025-11-04T01:32:59.332000000</dc:date>
          <text:p>Ok. Maybe "This book is seminal research on reframing patterns.  It's up to you to recognize or reject that." </text:p>
          <text:p>Or, even more bluntly, "... it's on you to recognize or reject that."</text:p>
        </officeooo:annotation>
        <officeooo:annotation svg:x="1.587cm" svg:y="9.522cm">
          <dc:creator>Denys Poltorak</dc:creator>
          <dc:date>2025-11-04T08:47:05.617000000</dc:date>
          <text:p>1) "a research" or "research" here?</text:p>
          <text:p>2) A single person's recognizing an idea does not help. It can survive only when proclaimed aloud and discussed.</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12121"/>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1212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ONLY-backgroundobjects">
      <style:graphic-properties draw:stroke="none" draw:fill="none" draw:fill-color="#ffffff" draw:auto-grow-height="false" fo:min-height="1.27cm"/>
    </style:style>
    <style:style style:name="Mpr15"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1"/>
    <meta:generator>LibreOfficeDev/6.0.5.2$Linux_X86_64 LibreOffice_project/</meta:generator>
  </office:meta>
</office:document-meta>
</file>