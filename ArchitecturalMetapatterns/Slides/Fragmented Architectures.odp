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E000002AD7F3CC79B60F13B6D.png" manifest:media-type="image/png"/>
  <manifest:file-entry manifest:full-path="Pictures/10000201000004FD000003C6AD8FAB71C76D601B.png" manifest:media-type="image/png"/>
  <manifest:file-entry manifest:full-path="Pictures/10000201000003EC00000643B7A89E9C10A45FE3.png" manifest:media-type="image/png"/>
  <manifest:file-entry manifest:full-path="Pictures/1000020100000326000003EEAC51AB82F306612A.png" manifest:media-type="image/png"/>
  <manifest:file-entry manifest:full-path="Pictures/10000201000002FE0000025E42A3F611060B5D68.png" manifest:media-type="image/png"/>
  <manifest:file-entry manifest:full-path="Pictures/10000201000001C000000235C765076FAD839E80.png" manifest:media-type="image/png"/>
  <manifest:file-entry manifest:full-path="Pictures/10000201000001E600000260E74DE61E9EF8DEA9.png" manifest:media-type="image/png"/>
  <manifest:file-entry manifest:full-path="Pictures/10000201000003260000039EAC2240B04AD8560E.png" manifest:media-type="image/png"/>
  <manifest:file-entry manifest:full-path="Pictures/1000020100000196000001BCB59EBA26A23274C4.png" manifest:media-type="image/png"/>
  <manifest:file-entry manifest:full-path="Pictures/100002010000037000000373B690797B9CB47098.png" manifest:media-type="image/png"/>
  <manifest:file-entry manifest:full-path="Pictures/1000020100000800000002D5656E635519479055.png" manifest:media-type="image/png"/>
  <manifest:file-entry manifest:full-path="Pictures/100002010000025E0000026091DB5F38C082803E.png" manifest:media-type="image/png"/>
  <manifest:file-entry manifest:full-path="Pictures/10000201000005A60000030048AC1AF238C1F543.png" manifest:media-type="image/png"/>
  <manifest:file-entry manifest:full-path="Pictures/1000020100000646000002D98892664704A220F5.png" manifest:media-type="image/png"/>
  <manifest:file-entry manifest:full-path="Pictures/100002010000032600000376EBBB6A024EBA6EA8.png" manifest:media-type="image/png"/>
  <manifest:file-entry manifest:full-path="Pictures/100002010000042D00000236F159194E75F1BFA4.png" manifest:media-type="image/png"/>
  <manifest:file-entry manifest:full-path="Pictures/10000201000002B8000001E63E43A0653292E316.png" manifest:media-type="image/png"/>
  <manifest:file-entry manifest:full-path="Pictures/10000201000003C60000029996332E9FA83380F9.png" manifest:media-type="image/png"/>
  <manifest:file-entry manifest:full-path="Pictures/1000020100000376000003266A5A308E54814A14.png" manifest:media-type="image/png"/>
  <manifest:file-entry manifest:full-path="Pictures/1000020100000414000001C11151AE4B3626AF30.png" manifest:media-type="image/png"/>
  <manifest:file-entry manifest:full-path="Pictures/100002010000048C0000040117C3FDD0B8CE2FFE.png" manifest:media-type="image/png"/>
  <manifest:file-entry manifest:full-path="Pictures/10000201000002FE00000286453EC0BA879FAF9E.png" manifest:media-type="image/png"/>
  <manifest:file-entry manifest:full-path="Pictures/1000020100000326000002860BA93E31DB4686C5.png" manifest:media-type="image/png"/>
  <manifest:file-entry manifest:full-path="Pictures/10000201000001E2000001E48E1493D927CD561A.png" manifest:media-type="image/png"/>
  <manifest:file-entry manifest:full-path="Pictures/1000020100000326000003262EDAAE42069657C8.png" manifest:media-type="image/png"/>
  <manifest:file-entry manifest:full-path="Pictures/10000201000002AE00000234A292D0A036E52E63.png" manifest:media-type="image/png"/>
  <manifest:file-entry manifest:full-path="Pictures/10000201000002FF000002360F1E544714CA8E1F.png" manifest:media-type="image/png"/>
  <manifest:file-entry manifest:full-path="Pictures/10000201000001AD00000353CE31F4AEAD2149BE.png" manifest:media-type="image/png"/>
  <manifest:file-entry manifest:full-path="Pictures/10000201000004C00000043AB2D4566BB54A2DCC.png" manifest:media-type="image/png"/>
  <manifest:file-entry manifest:full-path="Pictures/10000201000001E600000267F12FFBF3729573AA.png" manifest:media-type="image/png"/>
  <manifest:file-entry manifest:full-path="Pictures/10000201000001E7000002619DABB59A10999DB4.png" manifest:media-type="image/png"/>
  <manifest:file-entry manifest:full-path="Pictures/10000201000001A00000026F4DB4DC68E9447537.png" manifest:media-type="image/png"/>
  <manifest:file-entry manifest:full-path="Pictures/TablePreview1.svm" manifest:media-type=""/>
  <manifest:file-entry manifest:full-path="Pictures/100002010000025E0000025E0AED3AD5B601AC1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1cm" style:use-optimal-column-width="false"/>
    </style:style>
    <style:style style:name="co2" style:family="table-column">
      <style:table-column-properties style:column-width="7.111cm" style:use-optimal-column-width="false"/>
    </style:style>
    <style:style style:name="ro1" style:family="table-row">
      <style:table-row-properties style:row-height="4.331cm"/>
    </style:style>
    <style:style style:name="ro2" style:family="table-row">
      <style:table-row-properties style:row-height="2.958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adadad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adada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35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.35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eedd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1" style:family="text">
      <style:text-properties fo:font-variant="normal" fo:text-transform="none" fo:color="#eedd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4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" style:family="text">
      <style:text-properties fo:font-variant="normal" fo:text-transform="none" fo:color="#ff4455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7" style:family="text">
      <style:text-properties fo:font-variant="normal" fo:text-transform="none" fo:color="#11dd1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4455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eedd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1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font-variant="normal" fo:text-transform="none" fo:color="#eedd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4cm" text:min-label-width="1.026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11dd1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Arial" fo:color="#ff445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ragmented Architecture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atterns with smaller component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5f_AND_5f_BODY" presentation:presentation-page-layout-name="AL2T1">
        <draw:frame draw:name="Google Shape;60;p14" presentation:style-name="pr4" draw:text-style-name="P7" draw:layer="layout" svg:width="22.144cm" svg:height="9.989cm" svg:x="1.628cm" svg:y="3.12cm" presentation:class="outline" presentation:user-transformed="true">
          <draw:text-box>
            <text:p text:style-name="P5"><text:span text:style-name="T3">Several patterns don’t rely on system-wide layers:</text:span></text:p>
            <text:list text:style-name="L4">
              <text:list-item>
                <text:p text:style-name="P5"><text:span text:style-name="T4">Layered Services</text:span><text:span text:style-name="T3"> – divide into services, then into layers.</text:span></text:p>
              </text:list-item>
              <text:list-item>
                <text:p text:style-name="P5"><text:span text:style-name="T4">Polyglot Persistence</text:span><text:span text:style-name="T3"> – employ multiple databases.</text:span></text:p>
              </text:list-item>
              <text:list-item>
                <text:p text:style-name="P5"><text:span text:style-name="T4">Backends for Frontends</text:span><text:span text:style-name="T5"> </text:span><text:span text:style-name="T3">(</text:span><text:span text:style-name="T4">BFF</text:span><text:span text:style-name="T3">) – dedicate a service to each kind of client.</text:span></text:p>
              </text:list-item>
              <text:list-item>
                <text:p text:style-name="P5"><text:span text:style-name="T4">Service-Oriented Architecture</text:span><text:span text:style-name="T3"> (</text:span><text:span text:style-name="T4">SOA</text:span><text:span text:style-name="T3">) – divide into layers, then into services.</text:span></text:p>
              </text:list-item>
              <text:list-item>
                <text:p text:style-name="P6"><text:span text:style-name="T4">Hierarchy</text:span><text:span text:style-name="T3"> – recursive subdivision.</text:span></text:p>
              </text:list-item>
            </text:list>
          </draw:text-box>
        </draw:frame>
        <draw:frame draw:name="Google Shape;61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Contents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" draw:style-name="dp1" draw:master-page-name="TITLE_5f_AND_5f_BODY" presentation:presentation-page-layout-name="AL2T1">
        <draw:frame draw:name="Google Shape;66;p15" presentation:style-name="pr4" draw:text-style-name="P7" draw:layer="layout" svg:width="14.303cm" svg:height="8.331cm" svg:x="1.742cm" svg:y="3.233cm" presentation:class="outline" presentation:user-transformed="true">
          <draw:text-box>
            <text:p text:style-name="P9"><text:span text:style-name="T7">Some of the patterns we’ll cover define the primary architecture of the system.</text:span></text:p>
            <text:p text:style-name="P10"><text:span text:style-name="T7">Others extend a basic architecture, such as subdomain </text:span><text:span text:style-name="T8">Services</text:span><text:span text:style-name="T7"> or </text:span><text:span text:style-name="T8">Layers</text:span><text:span text:style-name="T7">.</text:span></text:p>
          </draw:text-box>
        </draw:frame>
        <draw:frame draw:name="Google Shape;67;p15" presentation:style-name="pr4" draw:text-style-name="P7" draw:layer="layout" svg:width="23.225cm" svg:height="2.687cm" svg:x="0.866cm" svg:y="10.886cm" presentation:class="outline" presentation:user-transformed="true">
          <draw:text-box>
            <text:p text:style-name="P11"><text:span text:style-name="T4">The components are color-coded </text:span></text:p>
          </draw:text-box>
        </draw:frame>
        <draw:frame draw:name="Google Shape;68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chema</text:span></text:p>
          </draw:text-box>
        </draw:frame>
        <draw:frame draw:name="Google Shape;69;p15" draw:style-name="gr2" draw:text-style-name="P12" draw:layer="layout" svg:width="6.298cm" svg:height="6.324cm" svg:x="17.275cm" svg:y="4.236cm">
          <draw:image xlink:href="Pictures/10000201000001E2000001E48E1493D927CD561A.png" xlink:type="simple" xlink:show="embed" xlink:actuate="onLoad">
            <text:p/>
          </draw:image>
        </draw:frame>
        <presentation:notes draw:style-name="dp2">
          <draw:page-thumbnail draw:name="Google Shape;63;g39ecdd5df51_0_0:notes" draw:style-name="gr1" draw:layer="layout" svg:width="16.932cm" svg:height="9.524cm" svg:x="1.059cm" svg:y="1.905cm" draw:page-number="3" presentation:class="page"/>
          <draw:frame draw:name="Google Shape;64;g39ecdd5df51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" draw:style-name="dp1" draw:master-page-name="SECTION_5f_HEADER">
        <draw:frame draw:name="Google Shape;74;p16" presentation:style-name="pr8" draw:text-style-name="P13" draw:layer="layout" svg:width="23.667cm" svg:height="2.337cm" svg:x="0.866cm" svg:y="4.805cm" presentation:class="title" presentation:user-transformed="true">
          <draw:text-box>
            <text:p text:style-name="P1"><text:span text:style-name="T9">Layered Services</text:span></text:p>
          </draw:text-box>
        </draw:frame>
        <draw:frame draw:name="Google Shape;75;p16" presentation:style-name="pr9" draw:text-style-name="P14" draw:layer="layout" svg:width="23.667cm" svg:height="2.201cm" svg:x="0.866cm" svg:y="7.144cm" presentation:class="subtitle" presentation:user-transformed="true">
          <draw:text-box>
            <text:p text:style-name="P11"><text:span text:style-name="T10">Each service is made of layers</text:span></text:p>
          </draw:text-box>
        </draw:frame>
        <presentation:notes draw:style-name="dp2">
          <draw:page-thumbnail draw:name="Google Shape;71;g3ace7d219c8_0_0:notes" draw:style-name="gr1" draw:layer="layout" svg:width="16.932cm" svg:height="9.524cm" svg:x="1.059cm" svg:y="1.905cm" draw:page-number="4" presentation:class="page"/>
          <draw:frame draw:name="Google Shape;72;g3ace7d219c8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overview" draw:style-name="dp1" draw:master-page-name="TITLE_5f_AND_5f_TWO_5f_COLUMNS" presentation:presentation-page-layout-name="AL3T3">
        <draw:frame draw:name="Google Shape;80;p17" presentation:style-name="pr11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ed Services – overview</text:span></text:p>
          </draw:text-box>
        </draw:frame>
        <draw:frame draw:name="Google Shape;81;p17" draw:style-name="standard" draw:layer="layout" svg:width="21.33cm" svg:height="7.288cm" svg:x="2.034cm" svg:y="5.16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5"><text:span text:style-name="T11">Orchestrated 3-Layered Services</text:span></text:p>
              </table:table-cell>
              <table:table-cell>
                <text:p text:style-name="P15"><text:span text:style-name="T11">Choreographed 2-Layered Services</text:span></text:p>
              </table:table-cell>
              <table:table-cell>
                <text:p text:style-name="P15"><text:span text:style-name="T11">Command-Query Responsibility Segrega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2;p17" presentation:style-name="pr12" draw:text-style-name="P16" draw:layer="layout" svg:width="23.667cm" svg:height="1.59cm" svg:x="0.866cm" svg:y="3.201cm" presentation:class="outline" presentation:user-transformed="true">
          <draw:text-box>
            <text:p text:style-name="P11"><text:span text:style-name="T8">Layered Services</text:span><text:span text:style-name="T7"> may intercommunicate at different levels:</text:span></text:p>
          </draw:text-box>
        </draw:frame>
        <draw:frame draw:name="Google Shape;83;p17" draw:style-name="gr2" draw:text-style-name="P12" draw:layer="layout" svg:width="6.358cm" svg:height="2.734cm" svg:x="9.521cm" svg:y="5.776cm">
          <draw:image xlink:href="Pictures/1000020100000414000001C11151AE4B3626AF30.png" xlink:type="simple" xlink:show="embed" xlink:actuate="onLoad">
            <text:p/>
          </draw:image>
        </draw:frame>
        <draw:frame draw:name="Google Shape;84;p17" draw:style-name="gr2" draw:text-style-name="P12" draw:layer="layout" svg:width="6.358cm" svg:height="4.376cm" svg:x="2.485cm" svg:y="5.572cm">
          <draw:image xlink:href="Pictures/10000201000003C60000029996332E9FA83380F9.png" xlink:type="simple" xlink:show="embed" xlink:actuate="onLoad">
            <text:p/>
          </draw:image>
        </draw:frame>
        <draw:frame draw:name="Google Shape;85;p17" draw:style-name="gr2" draw:text-style-name="P12" draw:layer="layout" svg:width="4.799cm" svg:height="4.047cm" svg:x="17.47cm" svg:y="5.737cm">
          <draw:image xlink:href="Pictures/10000201000002FE00000286453EC0BA879FAF9E.png" xlink:type="simple" xlink:show="embed" xlink:actuate="onLoad">
            <text:p/>
          </draw:image>
        </draw:frame>
        <presentation:notes draw:style-name="dp2">
          <draw:page-thumbnail draw:name="Google Shape;77;g3b0ad707ea8_0_4:notes" draw:style-name="gr1" draw:layer="layout" svg:width="16.932cm" svg:height="9.524cm" svg:x="1.059cm" svg:y="1.905cm" draw:page-number="5" presentation:class="page"/>
          <draw:frame draw:name="Google Shape;78;g3b0ad707ea8_0_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variants" draw:style-name="dp1" draw:master-page-name="TITLE_5f_AND_5f_BODY" presentation:presentation-page-layout-name="AL2T1">
        <draw:frame draw:name="Google Shape;90;p1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ed Services – variants</text:span></text:p>
          </draw:text-box>
        </draw:frame>
        <draw:frame draw:name="Google Shape;91;p18" presentation:style-name="pr14" draw:text-style-name="P7" draw:layer="layout" svg:width="15.473cm" svg:height="7.37cm" svg:x="9.06cm" svg:y="3.201cm" presentation:class="outline" presentation:user-transformed="true">
          <draw:text-box>
            <text:p text:style-name="P17"><text:span text:style-name="T12">The most common orchestrated architecture is </text:span><text:span text:style-name="T13">3-Layered Services</text:span><text:span text:style-name="T12">. Each service contains </text:span><text:span text:style-name="T13">application</text:span><text:span text:style-name="T12">, </text:span><text:span text:style-name="T13">domain rules</text:span><text:span text:style-name="T12">, and </text:span><text:span text:style-name="T13">infrastructure</text:span><text:span text:style-name="T12"> layers.</text:span></text:p>
            <text:p text:style-name="P18"><text:span text:style-name="T12">The </text:span><text:span text:style-name="T13">application</text:span><text:span text:style-name="T12">-level components may call each other, linking the services into a coherent whole.</text:span></text:p>
            <text:p text:style-name="P19"><text:span text:style-name="T12">Other layers remain isolated within their services.</text:span></text:p>
          </draw:text-box>
        </draw:frame>
        <draw:frame draw:name="Google Shape;92;p18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5"><text:span text:style-name="T14">Layering isolates interservice dependencies.</text:span></text:p>
            <text:p text:style-name="P20"><text:span text:style-name="T15">But it takes certain effort to implement and maintain.</text:span></text:p>
          </draw:text-box>
        </draw:frame>
        <draw:custom-shape draw:name="Google Shape;93;p18" draw:style-name="gr3" draw:text-style-name="P16" draw:layer="layout" svg:width="7.174cm" svg:height="2.033cm" svg:x="1.098cm" svg:y="8.619cm">
          <text:p text:style-name="P1"><text:span text:style-name="T11">Orchestrated 3-Laye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8" draw:style-name="gr2" draw:text-style-name="P12" draw:layer="layout" svg:width="6.811cm" svg:height="4.689cm" svg:x="1.279cm" svg:y="3.846cm">
          <draw:image xlink:href="Pictures/10000201000003C60000029996332E9FA83380F9.png" xlink:type="simple" xlink:show="embed" xlink:actuate="onLoad">
            <text:p/>
          </draw:image>
        </draw:frame>
        <presentation:notes draw:style-name="dp2">
          <draw:page-thumbnail draw:name="Google Shape;87;g3aac8fdbe74_0_51:notes" draw:style-name="gr1" draw:layer="layout" svg:width="16.932cm" svg:height="9.524cm" svg:x="1.059cm" svg:y="1.905cm" draw:page-number="6" presentation:class="page"/>
          <draw:frame draw:name="Google Shape;88;g3aac8fdbe74_0_5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variants" draw:style-name="dp1" draw:master-page-name="TITLE_5f_AND_5f_BODY" presentation:presentation-page-layout-name="AL2T1">
        <draw:frame draw:name="Google Shape;99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ed Services – variants</text:span></text:p>
          </draw:text-box>
        </draw:frame>
        <draw:frame draw:name="Google Shape;100;p19" presentation:style-name="pr14" draw:text-style-name="P7" draw:layer="layout" svg:width="11.834cm" svg:height="7.37cm" svg:x="12.7cm" svg:y="3.201cm" presentation:class="outline" presentation:user-transformed="true">
          <draw:text-box>
            <text:p text:style-name="P17"><text:span text:style-name="T12">A choreographed system has no application layer. The use cases are encoded in the connections between the services which make a </text:span><text:span text:style-name="T13">Pipeline</text:span><text:span text:style-name="T12">.</text:span></text:p>
            <text:p text:style-name="P18"><text:span text:style-name="T12">In </text:span><text:span text:style-name="T13">2-Layered Services</text:span><text:span text:style-name="T12"> each service stores its data in a private database for the sake of encapsulation.</text:span></text:p>
            <text:p text:style-name="P19"><text:span text:style-name="T12"/></text:p>
          </draw:text-box>
        </draw:frame>
        <draw:frame draw:name="Google Shape;101;p19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5"><text:span text:style-name="T14">Private databases make the services almost perfectly independent.</text:span></text:p>
            <text:p text:style-name="P20"><text:span text:style-name="T15">But they add to operational complexity.</text:span></text:p>
          </draw:text-box>
        </draw:frame>
        <draw:custom-shape draw:name="Google Shape;102;p19" draw:style-name="gr3" draw:text-style-name="P16" draw:layer="layout" svg:width="10.799cm" svg:height="1.271cm" svg:x="0.996cm" svg:y="8.636cm">
          <text:p text:style-name="P1"><text:span text:style-name="T11">Choreographed 2-Laye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9" draw:style-name="gr2" draw:text-style-name="P12" draw:layer="layout" svg:width="9.931cm" svg:height="4.271cm" svg:x="1.43cm" svg:y="4.181cm">
          <draw:image xlink:href="Pictures/1000020100000414000001C11151AE4B3626AF30.png" xlink:type="simple" xlink:show="embed" xlink:actuate="onLoad">
            <text:p/>
          </draw:image>
        </draw:frame>
        <presentation:notes draw:style-name="dp2">
          <draw:page-thumbnail draw:name="Google Shape;96;g3b0ad707ea8_0_15:notes" draw:style-name="gr1" draw:layer="layout" svg:width="16.932cm" svg:height="9.524cm" svg:x="1.059cm" svg:y="1.905cm" draw:page-number="7" presentation:class="page"/>
          <draw:frame draw:name="Google Shape;97;g3b0ad707ea8_0_1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variants" draw:style-name="dp1" draw:master-page-name="TITLE_5f_AND_5f_BODY" presentation:presentation-page-layout-name="AL2T1">
        <draw:frame draw:name="Google Shape;108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ed Services – variants</text:span></text:p>
          </draw:text-box>
        </draw:frame>
        <draw:frame draw:name="Google Shape;109;p20" presentation:style-name="pr14" draw:text-style-name="P7" draw:layer="layout" svg:width="16.784cm" svg:height="7.37cm" svg:x="7.749cm" svg:y="3.201cm" presentation:class="outline" presentation:user-transformed="true">
          <draw:text-box>
            <text:p text:style-name="P17"><text:span text:style-name="T12">When one service handles all write requests (</text:span><text:span text:style-name="T13">commands</text:span><text:span text:style-name="T12">) while another one is dedicated to reading (</text:span><text:span text:style-name="T13">queries</text:span><text:span text:style-name="T12">), that’s </text:span><text:span text:style-name="T13">Command-Query Responsibility Segregation</text:span><text:span text:style-name="T12"> (</text:span><text:span text:style-name="T13">CQRS</text:span><text:span text:style-name="T12">).</text:span></text:p>
            <text:p text:style-name="P19"><text:span text:style-name="T12">The </text:span><text:span text:style-name="T13">command</text:span><text:span text:style-name="T12"> and </text:span><text:span text:style-name="T13">query</text:span><text:span text:style-name="T12"> services may have separate databases (</text:span><text:span text:style-name="T13">OLTP</text:span><text:span text:style-name="T12"> and </text:span><text:span text:style-name="T13">OLAP</text:span><text:span text:style-name="T12">, respectively) and the </text:span><text:span text:style-name="T13">query</text:span><text:span text:style-name="T12"> service may scale independently.</text:span></text:p>
          </draw:text-box>
        </draw:frame>
        <draw:frame draw:name="Google Shape;110;p20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5"><text:span text:style-name="T14">CQRS may simplify both commands and queries.</text:span></text:p>
            <text:p text:style-name="P20"><text:span text:style-name="T15">But in many cases it may be an overkill or a wrong abstraction.</text:span></text:p>
          </draw:text-box>
        </draw:frame>
        <draw:custom-shape draw:name="Google Shape;111;p20" draw:style-name="gr3" draw:text-style-name="P16" draw:layer="layout" svg:width="6.422cm" svg:height="1.383cm" svg:x="0.896cm" svg:y="9.127cm">
          <text:p text:style-name="P15"><text:span text:style-name="T11">CQ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0" draw:style-name="gr2" draw:text-style-name="P12" draw:layer="layout" svg:width="6.089cm" svg:height="5.135cm" svg:x="1.062cm" svg:y="3.828cm">
          <draw:image xlink:href="Pictures/10000201000002FE00000286453EC0BA879FAF9E.png" xlink:type="simple" xlink:show="embed" xlink:actuate="onLoad">
            <text:p/>
          </draw:image>
        </draw:frame>
        <presentation:notes draw:style-name="dp2">
          <draw:page-thumbnail draw:name="Google Shape;105;g3b0ad707ea8_0_23:notes" draw:style-name="gr1" draw:layer="layout" svg:width="16.932cm" svg:height="9.524cm" svg:x="1.059cm" svg:y="1.905cm" draw:page-number="8" presentation:class="page"/>
          <draw:frame draw:name="Google Shape;106;g3b0ad707ea8_0_2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" draw:style-name="dp1" draw:master-page-name="SECTION_5f_HEADER">
        <draw:frame draw:name="Google Shape;117;p21" presentation:style-name="pr8" draw:text-style-name="P13" draw:layer="layout" svg:width="23.667cm" svg:height="2.337cm" svg:x="0.866cm" svg:y="4.805cm" presentation:class="title" presentation:user-transformed="true">
          <draw:text-box>
            <text:p text:style-name="P1"><text:span text:style-name="T9">Polyglot Persistence</text:span></text:p>
          </draw:text-box>
        </draw:frame>
        <draw:frame draw:name="Google Shape;118;p21" presentation:style-name="pr9" draw:text-style-name="P14" draw:layer="layout" svg:width="23.667cm" svg:height="2.201cm" svg:x="0.866cm" svg:y="7.144cm" presentation:class="subtitle" presentation:user-transformed="true">
          <draw:text-box>
            <text:p text:style-name="P11"><text:span text:style-name="T10">Multiple storages</text:span></text:p>
          </draw:text-box>
        </draw:frame>
        <presentation:notes draw:style-name="dp2">
          <draw:page-thumbnail draw:name="Google Shape;114;g3ace7d219c8_0_8:notes" draw:style-name="gr1" draw:layer="layout" svg:width="16.932cm" svg:height="9.524cm" svg:x="1.059cm" svg:y="1.905cm" draw:page-number="9" presentation:class="page"/>
          <draw:frame draw:name="Google Shape;115;g3ace7d219c8_0_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overview" draw:style-name="dp1" draw:master-page-name="TITLE_5f_AND_5f_BODY" presentation:presentation-page-layout-name="AL2T1">
        <draw:frame draw:name="Google Shape;123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overview</text:span></text:p>
          </draw:text-box>
        </draw:frame>
        <draw:frame draw:name="Google Shape;124;p22" presentation:style-name="pr14" draw:text-style-name="P7" draw:layer="layout" svg:width="15.39cm" svg:height="6.991cm" svg:x="9.143cm" svg:y="3.201cm" presentation:class="outline" presentation:user-transformed="true">
          <draw:text-box>
            <text:p text:style-name="P17"><text:span text:style-name="T12">You can rely on dedicated storage technologies for different kinds of data or patterns of data access in your system.</text:span></text:p>
            <text:p text:style-name="P19"><text:span text:style-name="T12">The storages may be independent or one may derive its data from another. They may be private to a service or shared within the system.</text:span></text:p>
          </draw:text-box>
        </draw:frame>
        <draw:frame draw:name="Google Shape;125;p22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5"><text:span text:style-name="T16">Polyglot Persistence</text:span><text:span text:style-name="T14"> is found in high-load or low latency systems.</text:span></text:p>
            <text:p text:style-name="P20"><text:span text:style-name="T15">It may be too complicated and fragile for general use.</text:span></text:p>
          </draw:text-box>
        </draw:frame>
        <draw:custom-shape draw:name="Google Shape;126;p22" draw:style-name="gr3" draw:text-style-name="P16" draw:layer="layout" svg:width="6.359cm" svg:height="1.271cm" svg:x="1.509cm" svg:y="9.289cm">
          <text:p text:style-name="P1"><text:span text:style-name="T11">Polyglot Persis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2" draw:style-name="gr2" draw:text-style-name="P12" draw:layer="layout" svg:width="7.103cm" svg:height="5.693cm" svg:x="1.137cm" svg:y="3.499cm">
          <draw:image xlink:href="Pictures/1000020100000326000002860BA93E31DB4686C5.png" xlink:type="simple" xlink:show="embed" xlink:actuate="onLoad">
            <text:p/>
          </draw:image>
        </draw:frame>
        <presentation:notes draw:style-name="dp2">
          <draw:page-thumbnail draw:name="Google Shape;120;g3acdfc7e991_0_20:notes" draw:style-name="gr1" draw:layer="layout" svg:width="16.932cm" svg:height="9.524cm" svg:x="1.059cm" svg:y="1.905cm" draw:page-number="10" presentation:class="page"/>
          <draw:frame draw:name="Google Shape;121;g3acdfc7e991_0_2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trade-offs" draw:style-name="dp1" draw:master-page-name="TITLE_5f_AND_5f_TWO_5f_COLUMNS" presentation:presentation-page-layout-name="AL3T3">
        <draw:frame draw:name="Google Shape;132;p23" presentation:style-name="pr11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trade-offs</text:span></text:p>
          </draw:text-box>
        </draw:frame>
        <draw:frame draw:name="Google Shape;133;p23" presentation:style-name="pr20" draw:text-style-name="P16" draw:layer="layout" svg:width="11.11cm" svg:height="9.061cm" svg:x="0.866cm" svg:y="3.201cm" presentation:class="outline" presentation:user-transformed="true">
          <draw:text-box>
            <text:p text:style-name="P21"><text:span text:style-name="T17">Performance is fine-tuned for multiple access patterns</text:span></text:p>
            <text:p text:style-name="P19"><text:span text:style-name="T17">The load is distributed among the datastores in use</text:span></text:p>
          </draw:text-box>
        </draw:frame>
        <draw:frame draw:name="Google Shape;134;p23" presentation:style-name="pr21" draw:text-style-name="P16" draw:layer="layout" svg:width="11.457cm" svg:height="9.061cm" svg:x="13.076cm" svg:y="3.201cm" presentation:class="outline" presentation:user-transformed="true">
          <draw:text-box>
            <text:p text:style-name="P21"><text:span text:style-name="T18">Multiple technologies need to be mastered</text:span></text:p>
            <text:p text:style-name="P18"><text:span text:style-name="T18">There is more operational complexity and more points of failure</text:span></text:p>
            <text:p text:style-name="P19"><text:span text:style-name="T18">Data consistency becomes an issue</text:span></text:p>
          </draw:text-box>
        </draw:frame>
        <presentation:notes draw:style-name="dp2">
          <draw:page-thumbnail draw:name="Google Shape;129;g3acdfc7e991_0_28:notes" draw:style-name="gr1" draw:layer="layout" svg:width="16.932cm" svg:height="9.524cm" svg:x="1.059cm" svg:y="1.905cm" draw:page-number="11" presentation:class="page"/>
          <draw:frame draw:name="Google Shape;130;g3acdfc7e991_0_2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independent DBs" draw:style-name="dp1" draw:master-page-name="TITLE_5f_AND_5f_BODY" presentation:presentation-page-layout-name="AL2T1">
        <draw:frame draw:name="Google Shape;139;p24" presentation:style-name="pr23" draw:text-style-name="P7" draw:layer="layout" svg:width="11.421cm" svg:height="6.949cm" svg:x="7.315cm" svg:y="3.953cm" presentation:class="outline" presentation:user-transformed="true">
          <draw:text-box>
            <text:p text:style-name="P22"><text:span text:style-name="T12">If </text:span><text:span text:style-name="T13">Shards</text:span><text:span text:style-name="T12"> or </text:span><text:span text:style-name="T13">Services</text:span><text:span text:style-name="T12"> become coupled through a small subset of the system’s data, that subset can be extracted into a </text:span><text:span text:style-name="T13">Shared Database</text:span><text:span text:style-name="T12">, while the main dataset remains private.</text:span></text:p>
          </draw:text-box>
        </draw:frame>
        <draw:custom-shape draw:name="Google Shape;140;p24" draw:style-name="gr3" draw:text-style-name="P16" draw:layer="layout" svg:width="4.494cm" svg:height="3.557cm" svg:x="1.686cm" svg:y="9.604cm">
          <text:p text:style-name="P1"><text:span text:style-name="T11">Private and Shared Databases fo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4" draw:style-name="gr3" draw:text-style-name="P16" draw:layer="layout" svg:width="4.912cm" svg:height="3.557cm" svg:x="19.182cm" svg:y="9.604cm">
          <text:p text:style-name="P1"><text:span text:style-name="T11">Private and Shared Databases for Sh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independent DBs</text:span></text:p>
          </draw:text-box>
        </draw:frame>
        <draw:frame draw:name="Google Shape;143;p24" draw:style-name="gr2" draw:text-style-name="P12" draw:layer="layout" svg:width="4.832cm" svg:height="4.848cm" svg:x="1.517cm" svg:y="4.431cm">
          <draw:image xlink:href="Pictures/100002010000025E0000026091DB5F38C082803E.png" xlink:type="simple" xlink:show="embed" xlink:actuate="onLoad">
            <text:p/>
          </draw:image>
        </draw:frame>
        <draw:frame draw:name="Google Shape;144;p24" draw:style-name="gr2" draw:text-style-name="P12" draw:layer="layout" svg:width="3.875cm" svg:height="4.848cm" svg:x="19.7cm" svg:y="4.431cm">
          <draw:image xlink:href="Pictures/10000201000001E600000260E74DE61E9EF8DEA9.png" xlink:type="simple" xlink:show="embed" xlink:actuate="onLoad">
            <text:p/>
          </draw:image>
        </draw:frame>
        <presentation:notes draw:style-name="dp2">
          <draw:page-thumbnail draw:name="Google Shape;136;g3b0ad707ea8_0_37:notes" draw:style-name="gr1" draw:layer="layout" svg:width="16.932cm" svg:height="9.524cm" svg:x="1.059cm" svg:y="1.905cm" draw:page-number="12" presentation:class="page"/>
          <draw:frame draw:name="Google Shape;137;g3b0ad707ea8_0_3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independent DBs" draw:style-name="dp1" draw:master-page-name="TITLE_5f_AND_5f_BODY" presentation:presentation-page-layout-name="AL2T1">
        <draw:frame draw:name="Google Shape;149;p2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independent DBs</text:span></text:p>
          </draw:text-box>
        </draw:frame>
        <draw:frame draw:name="Google Shape;150;p25" presentation:style-name="pr14" draw:text-style-name="P7" draw:layer="layout" svg:width="14.362cm" svg:height="8.612cm" svg:x="9.425cm" svg:y="3.201cm" presentation:class="outline" presentation:user-transformed="true">
          <draw:text-box>
            <text:p text:style-name="P17"><text:span text:style-name="T12">There are many database engine technologies, each optimized for a small number of use cases and data types.</text:span></text:p>
            <text:p text:style-name="P19"><text:span text:style-name="T12">If you need top-grade performance, you can hand-pick databases that best fit the structure and access patterns for subsets of of your data.</text:span></text:p>
          </draw:text-box>
        </draw:frame>
        <draw:custom-shape draw:name="Google Shape;151;p25" draw:style-name="gr3" draw:text-style-name="P16" draw:layer="layout" svg:width="5.82cm" svg:height="2.033cm" svg:x="1.882cm" svg:y="9.238cm">
          <text:p text:style-name="P1"><text:span text:style-name="T11">Specialized Data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5" draw:style-name="gr2" draw:text-style-name="P12" draw:layer="layout" svg:width="4.191cm" svg:height="5.286cm" svg:x="2.697cm" svg:y="3.63cm">
          <draw:image xlink:href="Pictures/10000201000001C000000235C765076FAD839E80.png" xlink:type="simple" xlink:show="embed" xlink:actuate="onLoad">
            <text:p/>
          </draw:image>
        </draw:frame>
        <presentation:notes draw:style-name="dp2">
          <draw:page-thumbnail draw:name="Google Shape;146;g3ad2927f46e_0_7:notes" draw:style-name="gr1" draw:layer="layout" svg:width="16.932cm" svg:height="9.524cm" svg:x="1.059cm" svg:y="1.905cm" draw:page-number="13" presentation:class="page"/>
          <draw:frame draw:name="Google Shape;147;g3ad2927f46e_0_7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independent DBs" draw:style-name="dp1" draw:master-page-name="TITLE_5f_AND_5f_BODY" presentation:presentation-page-layout-name="AL2T1">
        <draw:frame draw:name="Google Shape;157;p2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independent DBs</text:span></text:p>
          </draw:text-box>
        </draw:frame>
        <draw:frame draw:name="Google Shape;158;p26" presentation:style-name="pr14" draw:text-style-name="P7" draw:layer="layout" svg:width="14.013cm" svg:height="8.612cm" svg:x="10.521cm" svg:y="3.201cm" presentation:class="outline" presentation:user-transformed="true">
          <draw:text-box>
            <text:p text:style-name="P17"><text:span text:style-name="T12">Some data types, such as web page templates, images, or videos, are best served from files.</text:span></text:p>
            <text:p text:style-name="P18"><text:span text:style-name="T12">A </text:span><text:span text:style-name="T13">Content Delivery Network</text:span><text:span text:style-name="T12"> (</text:span><text:span text:style-name="T13">CDN</text:span><text:span text:style-name="T12">) is a distributed file storage that replicates web content over the globe so that every user downloads it from the nearest data center.</text:span></text:p>
            <text:p text:style-name="P19"><text:span text:style-name="T12"/></text:p>
          </draw:text-box>
        </draw:frame>
        <draw:custom-shape draw:name="Google Shape;159;p26" draw:style-name="gr3" draw:text-style-name="P16" draw:layer="layout" svg:width="5.82cm" svg:height="2.795cm" svg:x="2.649cm" svg:y="9.437cm">
          <text:p text:style-name="P1"><text:span text:style-name="T11">Data File and Content Delivery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6" draw:style-name="gr2" draw:text-style-name="P12" draw:layer="layout" svg:width="7.447cm" svg:height="5.2cm" svg:x="1.836cm" svg:y="3.798cm">
          <draw:image xlink:href="Pictures/10000201000002B8000001E63E43A0653292E316.png" xlink:type="simple" xlink:show="embed" xlink:actuate="onLoad">
            <text:p/>
          </draw:image>
        </draw:frame>
        <presentation:notes draw:style-name="dp2">
          <draw:page-thumbnail draw:name="Google Shape;154;g3b0ad707ea8_0_31:notes" draw:style-name="gr1" draw:layer="layout" svg:width="16.932cm" svg:height="9.524cm" svg:x="1.059cm" svg:y="1.905cm" draw:page-number="14" presentation:class="page"/>
          <draw:frame draw:name="Google Shape;155;g3b0ad707ea8_0_3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65;p2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166;p27" presentation:style-name="pr14" draw:text-style-name="P7" draw:layer="layout" svg:width="13.665cm" svg:height="8.612cm" svg:x="10.869cm" svg:y="3.201cm" presentation:class="outline" presentation:user-transformed="true">
          <draw:text-box>
            <text:p text:style-name="P17"><text:span text:style-name="T12">Read-heavy systems benefit from running multiple read-only </text:span><text:span text:style-name="T13">replicas</text:span><text:span text:style-name="T12"> of the database.</text:span></text:p>
            <text:p text:style-name="P18"><text:span text:style-name="T12">One instance of the database, called </text:span><text:span text:style-name="T13">leader</text:span><text:span text:style-name="T12">, accepts all write requests and propagates changes to other </text:span><text:span text:style-name="T13">replicas</text:span><text:span text:style-name="T12"> used in read-only queries.</text:span></text:p>
            <text:p text:style-name="P18"><text:span text:style-name="T12">If the </text:span><text:span text:style-name="T13">leader</text:span><text:span text:style-name="T12"> becomes unavailable, any other </text:span><text:span text:style-name="T13">replica</text:span><text:span text:style-name="T12"> is promoted to the </text:span><text:span text:style-name="T13">leader</text:span><text:span text:style-name="T12"> role.</text:span></text:p>
            <text:p text:style-name="P19"><text:span text:style-name="T12"/></text:p>
          </draw:text-box>
        </draw:frame>
        <draw:custom-shape draw:name="Google Shape;167;p27" draw:style-name="gr3" draw:text-style-name="P16" draw:layer="layout" svg:width="6.975cm" svg:height="1.271cm" svg:x="2.3cm" svg:y="11.528cm">
          <text:p text:style-name="P1"><text:span text:style-name="T11">Read-Only 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7" draw:style-name="gr2" draw:text-style-name="P12" draw:layer="layout" svg:width="3.663cm" svg:height="7.267cm" svg:x="4.248cm" svg:y="3.874cm">
          <draw:image xlink:href="Pictures/10000201000001AD00000353CE31F4AEAD2149BE.png" xlink:type="simple" xlink:show="embed" xlink:actuate="onLoad">
            <text:p/>
          </draw:image>
        </draw:frame>
        <presentation:notes draw:style-name="dp2">
          <draw:page-thumbnail draw:name="Google Shape;162;g3b0ad707ea8_0_47:notes" draw:style-name="gr1" draw:layer="layout" svg:width="16.932cm" svg:height="9.524cm" svg:x="1.059cm" svg:y="1.905cm" draw:page-number="15" presentation:class="page"/>
          <draw:frame draw:name="Google Shape;163;g3b0ad707ea8_0_4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73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174;p28" presentation:style-name="pr14" draw:text-style-name="P7" draw:layer="layout" svg:width="22.698cm" svg:height="3.942cm" svg:x="1.836cm" svg:y="3.201cm" presentation:class="outline" presentation:user-transformed="true">
          <draw:text-box>
            <text:p text:style-name="P17"><text:span text:style-name="T12">A </text:span><text:span text:style-name="T13">Database Cache</text:span><text:span text:style-name="T12"> stores the most recent database queries and their results in memory to bypass the main database when a known query is repeated.</text:span></text:p>
            <text:p text:style-name="P19"><text:span text:style-name="T12">The hard part is keeping the data in the </text:span><text:span text:style-name="T13">Cache</text:span><text:span text:style-name="T12"> and the database in sync.</text:span></text:p>
          </draw:text-box>
        </draw:frame>
        <draw:custom-shape draw:name="Google Shape;175;p28" draw:style-name="gr3" draw:text-style-name="P16" draw:layer="layout" svg:width="22.698cm" svg:height="1.271cm" svg:x="1.35cm" svg:y="12.192cm">
          <text:p text:style-name="P1"><text:span text:style-name="T11">Cache-Aside, Database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8" draw:style-name="gr2" draw:text-style-name="P12" draw:layer="layout" svg:width="12.008cm" svg:height="5.45cm" svg:x="6.696cm" svg:y="6.812cm">
          <draw:image xlink:href="Pictures/1000020100000646000002D98892664704A220F5.png" xlink:type="simple" xlink:show="embed" xlink:actuate="onLoad">
            <text:p/>
          </draw:image>
        </draw:frame>
        <presentation:notes draw:style-name="dp2">
          <draw:page-thumbnail draw:name="Google Shape;170;g3b0ad707ea8_0_98:notes" draw:style-name="gr1" draw:layer="layout" svg:width="16.932cm" svg:height="9.524cm" svg:x="1.059cm" svg:y="1.905cm" draw:page-number="16" presentation:class="page"/>
          <draw:frame draw:name="Google Shape;171;g3b0ad707ea8_0_98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81;p29" presentation:style-name="pr23" draw:text-style-name="P7" draw:layer="layout" svg:width="12.652cm" svg:height="6.949cm" svg:x="6.529cm" svg:y="3.936cm" presentation:class="outline" presentation:user-transformed="true">
          <draw:text-box>
            <text:p text:style-name="P21"><text:span text:style-name="T12">A </text:span><text:span text:style-name="T13">Memory Image</text:span><text:span text:style-name="T12"> aggregates events into an up-to-date snapshot of the (sub-)system’s state.</text:span></text:p>
            <text:p text:style-name="P19"><text:span text:style-name="T12">It is queryable, unlike the </text:span><text:span text:style-name="T13">event store</text:span><text:span text:style-name="T12">.</text:span></text:p>
          </draw:text-box>
        </draw:frame>
        <draw:custom-shape draw:name="Google Shape;182;p29" draw:style-name="gr3" draw:text-style-name="P16" draw:layer="layout" svg:width="4.912cm" svg:height="2.033cm" svg:x="0.965cm" svg:y="10.066cm">
          <text:p text:style-name="P1"><text:span text:style-name="T11">Memory Image </text:span></text:p>
          <text:p text:style-name="P1"><text:span text:style-name="T19">– </text:span><text:span text:style-name="T19">sta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custom-shape draw:name="Google Shape;184;p29" draw:style-name="gr3" draw:text-style-name="P16" draw:layer="layout" svg:width="4.912cm" svg:height="2.033cm" svg:x="19.423cm" svg:y="10.066cm">
          <text:p text:style-name="P1"><text:span text:style-name="T11">Memory Image </text:span></text:p>
          <text:p text:style-name="P1"><text:span text:style-name="T19">– </text:span><text:span text:style-name="T19">ru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9" draw:style-name="gr2" draw:text-style-name="P12" draw:layer="layout" svg:width="3.747cm" svg:height="4.098cm" svg:x="1.547cm" svg:y="5.851cm">
          <draw:image xlink:href="Pictures/1000020100000196000001BCB59EBA26A23274C4.png" xlink:type="simple" xlink:show="embed" xlink:actuate="onLoad">
            <text:p/>
          </draw:image>
        </draw:frame>
        <draw:frame draw:name="Google Shape;186;p29" draw:style-name="gr2" draw:text-style-name="P12" draw:layer="layout" svg:width="3.747cm" svg:height="5.612cm" svg:x="20.005cm" svg:y="4.337cm">
          <draw:image xlink:href="Pictures/10000201000001A00000026F4DB4DC68E9447537.png" xlink:type="simple" xlink:show="embed" xlink:actuate="onLoad">
            <text:p/>
          </draw:image>
        </draw:frame>
        <presentation:notes draw:style-name="dp2">
          <draw:page-thumbnail draw:name="Google Shape;178;g3b0ad707ea8_0_61:notes" draw:style-name="gr1" draw:layer="layout" svg:width="16.932cm" svg:height="9.524cm" svg:x="1.059cm" svg:y="1.905cm" draw:page-number="17" presentation:class="page"/>
          <draw:frame draw:name="Google Shape;179;g3b0ad707ea8_0_6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91;p30" presentation:style-name="pr23" draw:text-style-name="P7" draw:layer="layout" svg:width="10.481cm" svg:height="9.156cm" svg:x="7.459cm" svg:y="3.356cm" presentation:class="outline" presentation:user-transformed="true">
          <draw:text-box>
            <text:p text:style-name="P21"><text:span text:style-name="T12">Here we have dedicated </text:span><text:span text:style-name="T13">OLTP</text:span><text:span text:style-name="T12"> (</text:span><text:span text:style-name="T13">commands</text:span><text:span text:style-name="T12">) and </text:span><text:span text:style-name="T13">OLAP</text:span><text:span text:style-name="T12"> (</text:span><text:span text:style-name="T13">queries</text:span><text:span text:style-name="T12">) databases.</text:span></text:p>
            <text:list text:style-name="L11">
              <text:list-item>
                <text:p text:style-name="P18"><text:span text:style-name="T12">A </text:span><text:span text:style-name="T13">Reporting Database</text:span><text:span text:style-name="T12"> exposes the dataset of this service to external queries.</text:span></text:p>
              </text:list-item>
              <text:list-item>
                <text:p text:style-name="P21"><text:span text:style-name="T12">A </text:span><text:span text:style-name="T13">CQRS View</text:span><text:span text:style-name="T12"> aggregates events from another service into a queryable state.</text:span></text:p>
              </text:list-item>
            </text:list>
          </draw:text-box>
        </draw:frame>
        <draw:custom-shape draw:name="Google Shape;192;p30" draw:style-name="gr3" draw:text-style-name="P16" draw:layer="layout" svg:width="4.494cm" svg:height="1.271cm" svg:x="18.786cm" svg:y="9.873cm">
          <text:p text:style-name="P1"><text:span text:style-name="T11">CQRS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0" draw:style-name="gr3" draw:text-style-name="P16" draw:layer="layout" svg:width="4.807cm" svg:height="2.033cm" svg:x="1.166cm" svg:y="9.873cm">
          <text:p text:style-name="P1"><text:span text:style-name="T11">Reporting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195;p30" draw:style-name="gr2" draw:text-style-name="P12" draw:layer="layout" svg:width="5.52cm" svg:height="5.52cm" svg:x="1.166cm" svg:y="4.037cm">
          <draw:image xlink:href="Pictures/100002010000025E0000025E0AED3AD5B601AC19.png" xlink:type="simple" xlink:show="embed" xlink:actuate="onLoad">
            <text:p/>
          </draw:image>
        </draw:frame>
        <draw:frame draw:name="Google Shape;196;p30" draw:style-name="gr2" draw:text-style-name="P12" draw:layer="layout" svg:width="5.936cm" svg:height="4.38cm" svg:x="18.065cm" svg:y="5.177cm">
          <draw:image xlink:href="Pictures/10000201000002FF000002360F1E544714CA8E1F.png" xlink:type="simple" xlink:show="embed" xlink:actuate="onLoad">
            <text:p/>
          </draw:image>
        </draw:frame>
        <presentation:notes draw:style-name="dp2">
          <draw:page-thumbnail draw:name="Google Shape;188;g3b0ad707ea8_0_53:notes" draw:style-name="gr1" draw:layer="layout" svg:width="16.932cm" svg:height="9.524cm" svg:x="1.059cm" svg:y="1.905cm" draw:page-number="18" presentation:class="page"/>
          <draw:frame draw:name="Google Shape;189;g3b0ad707ea8_0_5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201;p3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202;p31" presentation:style-name="pr14" draw:text-style-name="P7" draw:layer="layout" svg:width="10.811cm" svg:height="8.612cm" svg:x="13.109cm" svg:y="3.599cm" presentation:class="outline" presentation:user-transformed="true">
          <draw:text-box>
            <text:p text:style-name="P23"><text:span text:style-name="T12">A </text:span><text:span text:style-name="T13">Query Service</text:span><text:span text:style-name="T12"> is a shared </text:span><text:span text:style-name="T13">CQRS View</text:span><text:span text:style-name="T12">. It aggregates events from multiple services to provide a consistent, queryable representation of the state of the whole system.</text:span></text:p>
          </draw:text-box>
        </draw:frame>
        <draw:custom-shape draw:name="Google Shape;203;p31" draw:style-name="gr3" draw:text-style-name="P16" draw:layer="layout" svg:width="5.82cm" svg:height="1.271cm" svg:x="3.995cm" svg:y="9.236cm">
          <text:p text:style-name="P1"><text:span text:style-name="T11">Query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31" draw:style-name="gr2" draw:text-style-name="P12" draw:layer="layout" svg:width="9.972cm" svg:height="5.28cm" svg:x="1.919cm" svg:y="3.599cm">
          <draw:image xlink:href="Pictures/100002010000042D00000236F159194E75F1BFA4.png" xlink:type="simple" xlink:show="embed" xlink:actuate="onLoad">
            <text:p/>
          </draw:image>
        </draw:frame>
        <presentation:notes draw:style-name="dp2">
          <draw:page-thumbnail draw:name="Google Shape;198;g3b0ad707ea8_0_70:notes" draw:style-name="gr1" draw:layer="layout" svg:width="16.932cm" svg:height="9.524cm" svg:x="1.059cm" svg:y="1.905cm" draw:page-number="19" presentation:class="page"/>
          <draw:frame draw:name="Google Shape;199;g3b0ad707ea8_0_7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209;p32" presentation:style-name="pr23" draw:text-style-name="P7" draw:layer="layout" svg:width="11.863cm" svg:height="7.734cm" svg:x="6.768cm" svg:y="3.466cm" presentation:class="outline" presentation:user-transformed="true">
          <draw:text-box>
            <text:p text:style-name="P21"><text:span text:style-name="T12">An </text:span><text:span text:style-name="T13">External Index</text:span><text:span text:style-name="T12"> is a query engine dedicated to an uncommon technology, such as NLP or geospatial data.</text:span></text:p>
            <text:p text:style-name="P19"><text:span text:style-name="T12">You can use it to get a list of all the rows in your main database that match a special kind of query not supported by your primary database.</text:span></text:p>
          </draw:text-box>
        </draw:frame>
        <draw:custom-shape draw:name="Google Shape;210;p32" draw:style-name="gr3" draw:text-style-name="P16" draw:layer="layout" svg:width="4.912cm" svg:height="2.033cm" svg:x="1.238cm" svg:y="9.67cm">
          <text:p text:style-name="P1"><text:span text:style-name="T11">External Index </text:span></text:p>
          <text:p text:style-name="P1"><text:span text:style-name="T19">– </text:span><text:span text:style-name="T19">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custom-shape draw:name="Google Shape;212;p32" draw:style-name="gr3" draw:text-style-name="P16" draw:layer="layout" svg:width="4.912cm" svg:height="2.033cm" svg:x="19.249cm" svg:y="9.67cm">
          <text:p text:style-name="P1"><text:span text:style-name="T11">External Index</text:span></text:p>
          <text:p text:style-name="P1"><text:span text:style-name="T19">– </text:span><text:span text:style-name="T19">fi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2" draw:style-name="gr2" draw:text-style-name="P12" draw:layer="layout" svg:width="4.392cm" svg:height="5.558cm" svg:x="1.498cm" svg:y="3.801cm">
          <draw:image xlink:href="Pictures/10000201000001E600000267F12FFBF3729573AA.png" xlink:type="simple" xlink:show="embed" xlink:actuate="onLoad">
            <text:p/>
          </draw:image>
        </draw:frame>
        <draw:frame draw:name="Google Shape;214;p32" draw:style-name="gr2" draw:text-style-name="P12" draw:layer="layout" svg:width="4.392cm" svg:height="5.492cm" svg:x="19.509cm" svg:y="3.834cm">
          <draw:image xlink:href="Pictures/10000201000001E7000002619DABB59A10999DB4.png" xlink:type="simple" xlink:show="embed" xlink:actuate="onLoad">
            <text:p/>
          </draw:image>
        </draw:frame>
        <presentation:notes draw:style-name="dp2">
          <draw:page-thumbnail draw:name="Google Shape;206;g3b0ad707ea8_0_84:notes" draw:style-name="gr1" draw:layer="layout" svg:width="16.932cm" svg:height="9.524cm" svg:x="1.059cm" svg:y="1.905cm" draw:page-number="20" presentation:class="page"/>
          <draw:frame draw:name="Google Shape;207;g3b0ad707ea8_0_8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219;p3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220;p33" presentation:style-name="pr14" draw:text-style-name="P7" draw:layer="layout" svg:width="14.519cm" svg:height="8.612cm" svg:x="9.741cm" svg:y="3.201cm" presentation:class="outline" presentation:user-transformed="true">
          <draw:text-box>
            <text:p text:style-name="P17"><text:span text:style-name="T12">Keeping old data which is not going ever to change together with the most recent records bloats and slows down your main OLTP database.</text:span></text:p>
            <text:p text:style-name="P18"><text:span text:style-name="T12">Therefore you should periodically move the old data to a read-only archive OLAP storage.</text:span></text:p>
            <text:p text:style-name="P19"><text:span text:style-name="T12"/></text:p>
          </draw:text-box>
        </draw:frame>
        <draw:custom-shape draw:name="Google Shape;221;p33" draw:style-name="gr3" draw:text-style-name="P16" draw:layer="layout" svg:width="5.82cm" svg:height="1.271cm" svg:x="1.97cm" svg:y="9.271cm">
          <text:p text:style-name="P1"><text:span text:style-name="T11">Data Archiv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3" draw:style-name="gr2" draw:text-style-name="P12" draw:layer="layout" svg:width="6.089cm" svg:height="5.006cm" svg:x="1.836cm" svg:y="3.753cm">
          <draw:image xlink:href="Pictures/10000201000002AE00000234A292D0A036E52E63.png" xlink:type="simple" xlink:show="embed" xlink:actuate="onLoad">
            <text:p/>
          </draw:image>
        </draw:frame>
        <presentation:notes draw:style-name="dp2">
          <draw:page-thumbnail draw:name="Google Shape;216;g3b0ad707ea8_0_92:notes" draw:style-name="gr1" draw:layer="layout" svg:width="16.932cm" svg:height="9.524cm" svg:x="1.059cm" svg:y="1.905cm" draw:page-number="21" presentation:class="page"/>
          <draw:frame draw:name="Google Shape;217;g3b0ad707ea8_0_92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ends for Frontends" draw:style-name="dp1" draw:master-page-name="SECTION_5f_HEADER">
        <draw:frame draw:name="Google Shape;227;p34" presentation:style-name="pr8" draw:text-style-name="P13" draw:layer="layout" svg:width="23.667cm" svg:height="2.337cm" svg:x="0.866cm" svg:y="4.805cm" presentation:class="title" presentation:user-transformed="true">
          <draw:text-box>
            <text:p text:style-name="P1"><text:span text:style-name="T9">Backends for Frontends</text:span></text:p>
          </draw:text-box>
        </draw:frame>
        <draw:frame draw:name="Google Shape;228;p34" presentation:style-name="pr9" draw:text-style-name="P14" draw:layer="layout" svg:width="23.667cm" svg:height="2.201cm" svg:x="0.866cm" svg:y="7.144cm" presentation:class="subtitle" presentation:user-transformed="true">
          <draw:text-box>
            <text:p text:style-name="P11"><text:span text:style-name="T10">Each kind of client gets a dedicated service</text:span></text:p>
          </draw:text-box>
        </draw:frame>
        <presentation:notes draw:style-name="dp2">
          <draw:page-thumbnail draw:name="Google Shape;224;g3ad3d35e571_0_0:notes" draw:style-name="gr1" draw:layer="layout" svg:width="16.932cm" svg:height="9.524cm" svg:x="1.059cm" svg:y="1.905cm" draw:page-number="22" presentation:class="page"/>
          <draw:frame draw:name="Google Shape;225;g3ad3d35e571_0_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overview" draw:style-name="dp1" draw:master-page-name="TITLE_5f_AND_5f_BODY" presentation:presentation-page-layout-name="AL2T1">
        <draw:frame draw:name="Google Shape;233;p3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FF – overview</text:span></text:p>
          </draw:text-box>
        </draw:frame>
        <draw:frame draw:name="Google Shape;234;p35" presentation:style-name="pr14" draw:text-style-name="P7" draw:layer="layout" svg:width="13.739cm" svg:height="6.903cm" svg:x="9.873cm" svg:y="3.201cm" presentation:class="outline" presentation:user-transformed="true">
          <draw:text-box>
            <text:p text:style-name="P17"><text:span text:style-name="T12">If you clients differ in their protocols and/or workflows, you can dedicate a component (</text:span><text:span text:style-name="T13">Backend for Frontend</text:span><text:span text:style-name="T12">, </text:span><text:span text:style-name="T13">BFF</text:span><text:span text:style-name="T12">) to each kind of client.</text:span></text:p>
            <text:p text:style-name="P19"><text:span text:style-name="T12">The </text:span><text:span text:style-name="T13">BFF</text:span><text:span text:style-name="T12">s may act as </text:span><text:span text:style-name="T13">Proxies</text:span><text:span text:style-name="T12">, </text:span><text:span text:style-name="T13">Orchestrators</text:span><text:span text:style-name="T12">, or their combinations.</text:span></text:p>
          </draw:text-box>
        </draw:frame>
        <draw:frame draw:name="Google Shape;235;p35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5"><text:span text:style-name="T16">BFF</text:span><text:span text:style-name="T14"> is useful with dissimilar client protocols, UIs or workflows.</text:span></text:p>
            <text:p text:style-name="P20"><text:span text:style-name="T15">Its use with closely related clients asks for trouble.</text:span></text:p>
          </draw:text-box>
        </draw:frame>
        <draw:custom-shape draw:name="Google Shape;236;p35" draw:style-name="gr3" draw:text-style-name="P16" draw:layer="layout" svg:width="7.314cm" svg:height="1.271cm" svg:x="1.267cm" svg:y="9.455cm">
          <text:p text:style-name="P1"><text:span text:style-name="T11">Backends for Front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5" draw:style-name="gr2" draw:text-style-name="P12" draw:layer="layout" svg:width="6.047cm" svg:height="6.068cm" svg:x="1.9cm" svg:y="3.483cm">
          <draw:image xlink:href="Pictures/100002010000037000000373B690797B9CB47098.png" xlink:type="simple" xlink:show="embed" xlink:actuate="onLoad">
            <text:p/>
          </draw:image>
        </draw:frame>
        <presentation:notes draw:style-name="dp2">
          <draw:page-thumbnail draw:name="Google Shape;230;g3ad3d35e571_0_5:notes" draw:style-name="gr1" draw:layer="layout" svg:width="16.932cm" svg:height="9.524cm" svg:x="1.059cm" svg:y="1.905cm" draw:page-number="23" presentation:class="page"/>
          <draw:frame draw:name="Google Shape;231;g3ad3d35e571_0_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trade-offs" draw:style-name="dp1" draw:master-page-name="TITLE_5f_AND_5f_TWO_5f_COLUMNS" presentation:presentation-page-layout-name="AL3T3">
        <draw:frame draw:name="Google Shape;242;p36" presentation:style-name="pr11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FF – trade-offs</text:span></text:p>
          </draw:text-box>
        </draw:frame>
        <draw:frame draw:name="Google Shape;243;p36" presentation:style-name="pr20" draw:text-style-name="P16" draw:layer="layout" svg:width="11.11cm" svg:height="9.061cm" svg:x="0.866cm" svg:y="3.201cm" presentation:class="outline" presentation:user-transformed="true">
          <draw:text-box>
            <text:p text:style-name="P21"><text:span text:style-name="T17">Clients and the teams that support them become independent</text:span></text:p>
            <text:p text:style-name="P19"><text:span text:style-name="T17">Each of the multiple BFFs tends to be much simpler than a universal layer</text:span></text:p>
          </draw:text-box>
        </draw:frame>
        <draw:frame draw:name="Google Shape;244;p36" presentation:style-name="pr21" draw:text-style-name="P16" draw:layer="layout" svg:width="11.341cm" svg:height="9.061cm" svg:x="13.192cm" svg:y="3.201cm" presentation:class="outline" presentation:user-transformed="true">
          <draw:text-box>
            <text:p text:style-name="P21"><text:span text:style-name="T18">It’s hard to share code between BFFs</text:span></text:p>
            <text:p text:style-name="P19"><text:span text:style-name="T18">BFFs increase operational complexity</text:span></text:p>
          </draw:text-box>
        </draw:frame>
        <presentation:notes draw:style-name="dp2">
          <draw:page-thumbnail draw:name="Google Shape;239;g3ad3d35e571_0_13:notes" draw:style-name="gr1" draw:layer="layout" svg:width="16.932cm" svg:height="9.524cm" svg:x="1.059cm" svg:y="1.905cm" draw:page-number="24" presentation:class="page"/>
          <draw:frame draw:name="Google Shape;240;g3ad3d35e571_0_13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49;p3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50;p37" presentation:style-name="pr14" draw:text-style-name="P7" draw:layer="layout" svg:width="15.681cm" svg:height="8.513cm" svg:x="8.546cm" svg:y="3.201cm" presentation:class="outline" presentation:user-transformed="true">
          <draw:text-box>
            <text:p text:style-name="P17"><text:span text:style-name="T12">Multiple </text:span><text:span text:style-name="T13">Proxies</text:span><text:span text:style-name="T12"> are made use of to support clients that differ in their protocols but not workflows.</text:span></text:p>
            <text:p text:style-name="P18"><text:span text:style-name="T12">An example is accessing the system from the internal network and via a VPN.</text:span></text:p>
            <text:p text:style-name="P19"><text:span text:style-name="T13">Proxies</text:span><text:span text:style-name="T12"> are often available off the shelf and don’t require much effort to set up.</text:span></text:p>
          </draw:text-box>
        </draw:frame>
        <draw:custom-shape draw:name="Google Shape;251;p37" draw:style-name="gr3" draw:text-style-name="P16" draw:layer="layout" svg:width="5.82cm" svg:height="1.271cm" svg:x="1.748cm" svg:y="9.741cm">
          <text:p text:style-name="P1"><text:span text:style-name="T11">Prox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7" draw:style-name="gr2" draw:text-style-name="P12" draw:layer="layout" svg:width="6.374cm" svg:height="5.798cm" svg:x="1.471cm" svg:y="3.715cm">
          <draw:image xlink:href="Pictures/1000020100000376000003266A5A308E54814A14.png" xlink:type="simple" xlink:show="embed" xlink:actuate="onLoad">
            <text:p/>
          </draw:image>
        </draw:frame>
        <presentation:notes draw:style-name="dp2">
          <draw:page-thumbnail draw:name="Google Shape;246;g3ad3d35e571_0_100:notes" draw:style-name="gr1" draw:layer="layout" svg:width="16.932cm" svg:height="9.524cm" svg:x="1.059cm" svg:y="1.905cm" draw:page-number="25" presentation:class="page"/>
          <draw:frame draw:name="Google Shape;247;g3ad3d35e571_0_100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57;p3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58;p38" presentation:style-name="pr14" draw:text-style-name="P7" draw:layer="layout" svg:width="15.988cm" svg:height="8.513cm" svg:x="8.546cm" svg:y="3.201cm" presentation:class="outline" presentation:user-transformed="true">
          <draw:text-box>
            <text:p text:style-name="P17"><text:span text:style-name="T13">BFF</text:span><text:span text:style-name="T12"> </text:span><text:span text:style-name="T13">Orchestrators</text:span><text:span text:style-name="T12"> deal with workflows but not protocols.</text:span></text:p>
            <text:p text:style-name="P18"><text:span text:style-name="T12">For example, an online store may use different </text:span><text:span text:style-name="T13">Orchestrators</text:span><text:span text:style-name="T12"> for buyers and sellers.</text:span></text:p>
            <text:p text:style-name="P19"><text:span text:style-name="T12">Each </text:span><text:span text:style-name="T13">Orchestrator</text:span><text:span text:style-name="T12"> is likely to remain relatively small and simple thanks to the separation of concerns.</text:span></text:p>
          </draw:text-box>
        </draw:frame>
        <draw:custom-shape draw:name="Google Shape;259;p38" draw:style-name="gr3" draw:text-style-name="P16" draw:layer="layout" svg:width="5.82cm" svg:height="1.271cm" svg:x="1.616cm" svg:y="9.99cm">
          <text:p text:style-name="P1"><text:span text:style-name="T11">Orchest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8" draw:style-name="gr2" draw:text-style-name="P12" draw:layer="layout" svg:width="6.082cm" svg:height="6.082cm" svg:x="1.485cm" svg:y="3.665cm">
          <draw:image xlink:href="Pictures/1000020100000326000003262EDAAE42069657C8.png" xlink:type="simple" xlink:show="embed" xlink:actuate="onLoad">
            <text:p/>
          </draw:image>
        </draw:frame>
        <presentation:notes draw:style-name="dp2">
          <draw:page-thumbnail draw:name="Google Shape;254;g3b0ad707ea8_0_122:notes" draw:style-name="gr1" draw:layer="layout" svg:width="16.932cm" svg:height="9.524cm" svg:x="1.059cm" svg:y="1.905cm" draw:page-number="26" presentation:class="page"/>
          <draw:frame draw:name="Google Shape;255;g3b0ad707ea8_0_122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65;p3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66;p39" presentation:style-name="pr14" draw:text-style-name="P7" draw:layer="layout" svg:width="14.652cm" svg:height="8.513cm" svg:x="8.546cm" svg:y="3.201cm" presentation:class="outline" presentation:user-transformed="true">
          <draw:text-box>
            <text:p text:style-name="P17"><text:span text:style-name="T12">When the clients differ in both protocol or security, and their workflows, </text:span><text:span text:style-name="T13">Proxy</text:span><text:span text:style-name="T12"> + </text:span><text:span text:style-name="T13">Orchestrator</text:span><text:span text:style-name="T12"> pairs are used.</text:span></text:p>
            <text:p text:style-name="P19"><text:span text:style-name="T12">This also allows for reusing </text:span><text:span text:style-name="T13">Proxies</text:span><text:span text:style-name="T12"> and/or </text:span><text:span text:style-name="T13">Orchestrators</text:span><text:span text:style-name="T12"> in different combinations.</text:span></text:p>
          </draw:text-box>
        </draw:frame>
        <draw:custom-shape draw:name="Google Shape;267;p39" draw:style-name="gr3" draw:text-style-name="P16" draw:layer="layout" svg:width="5.82cm" svg:height="2.033cm" svg:x="1.748cm" svg:y="10.75cm">
          <text:p text:style-name="P1"><text:span text:style-name="T11">Proxy + Orchestrator </text:span><text:span text:style-name="T19">pai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9" draw:style-name="gr2" draw:text-style-name="P12" draw:layer="layout" svg:width="5.777cm" svg:height="7.211cm" svg:x="1.769cm" svg:y="3.538cm">
          <draw:image xlink:href="Pictures/1000020100000326000003EEAC51AB82F306612A.png" xlink:type="simple" xlink:show="embed" xlink:actuate="onLoad">
            <text:p/>
          </draw:image>
        </draw:frame>
        <presentation:notes draw:style-name="dp2">
          <draw:page-thumbnail draw:name="Google Shape;262;g3b0ad707ea8_0_116:notes" draw:style-name="gr1" draw:layer="layout" svg:width="16.932cm" svg:height="9.524cm" svg:x="1.059cm" svg:y="1.905cm" draw:page-number="27" presentation:class="page"/>
          <draw:frame draw:name="Google Shape;263;g3b0ad707ea8_0_11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73;p4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74;p40" presentation:style-name="pr14" draw:text-style-name="P7" draw:layer="layout" svg:width="15.988cm" svg:height="8.513cm" svg:x="8.546cm" svg:y="3.201cm" presentation:class="outline" presentation:user-transformed="true">
          <draw:text-box>
            <text:p text:style-name="P23"><text:span text:style-name="T12">An </text:span><text:span text:style-name="T13">API Gateway</text:span><text:span text:style-name="T12"> implements aspects of both a </text:span><text:span text:style-name="T13">Proxy</text:span><text:span text:style-name="T12"> and </text:span><text:span text:style-name="T13">Orchestrator</text:span><text:span text:style-name="T12">. Therefore it can be used as a more convenient alternative to a </text:span><text:span text:style-name="T13">Proxy</text:span><text:span text:style-name="T12"> + </text:span><text:span text:style-name="T13">Orchestrator</text:span><text:span text:style-name="T12"> pair.</text:span></text:p>
          </draw:text-box>
        </draw:frame>
        <draw:custom-shape draw:name="Google Shape;275;p40" draw:style-name="gr3" draw:text-style-name="P16" draw:layer="layout" svg:width="5.82cm" svg:height="1.271cm" svg:x="1.748cm" svg:y="10.886cm">
          <text:p text:style-name="P1"><text:span text:style-name="T11">API Gate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40" draw:style-name="gr2" draw:text-style-name="P12" draw:layer="layout" svg:width="6.276cm" svg:height="7.211cm" svg:x="1.519cm" svg:y="3.538cm">
          <draw:image xlink:href="Pictures/10000201000003260000039EAC2240B04AD8560E.png" xlink:type="simple" xlink:show="embed" xlink:actuate="onLoad">
            <text:p/>
          </draw:image>
        </draw:frame>
        <presentation:notes draw:style-name="dp2">
          <draw:page-thumbnail draw:name="Google Shape;270;g3b0ad707ea8_0_104:notes" draw:style-name="gr1" draw:layer="layout" svg:width="16.932cm" svg:height="9.524cm" svg:x="1.059cm" svg:y="1.905cm" draw:page-number="28" presentation:class="page"/>
          <draw:frame draw:name="Google Shape;271;g3b0ad707ea8_0_10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81;p4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82;p41" presentation:style-name="pr14" draw:text-style-name="P7" draw:layer="layout" svg:width="15.988cm" svg:height="9.459cm" svg:x="8.546cm" svg:y="3.201cm" presentation:class="outline" presentation:user-transformed="true">
          <draw:text-box>
            <text:p text:style-name="P17"><text:span text:style-name="T12">An </text:span><text:span text:style-name="T13">Event Mediator</text:span><text:span text:style-name="T12"> is an </text:span><text:span text:style-name="T13">orchestrating</text:span><text:span text:style-name="T12"> </text:span><text:span text:style-name="T13">Middleware</text:span><text:span text:style-name="T12">. There are reports of using an </text:span><text:span text:style-name="T13">Event Mediator</text:span><text:span text:style-name="T12"> per kind of system’s clients to achieve the following benefits:</text:span></text:p>
            <text:list text:style-name="L11">
              <text:list-item>
                <text:p text:style-name="P18"><text:span text:style-name="T12">Smaller and more cohesive orchestration logic for each kind of client.</text:span></text:p>
              </text:list-item>
              <text:list-item>
                <text:p text:style-name="P17"><text:span text:style-name="T12">If one </text:span><text:span text:style-name="T13">Event Mediator</text:span><text:span text:style-name="T12"> malfunctions, the system remains available to other kinds of clients.</text:span></text:p>
              </text:list-item>
            </text:list>
          </draw:text-box>
        </draw:frame>
        <draw:custom-shape draw:name="Google Shape;283;p41" draw:style-name="gr3" draw:text-style-name="P16" draw:layer="layout" svg:width="5.82cm" svg:height="1.271cm" svg:x="1.748cm" svg:y="10.77cm">
          <text:p text:style-name="P1"><text:span text:style-name="T11">Event Medi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41" draw:style-name="gr2" draw:text-style-name="P12" draw:layer="layout" svg:width="6.013cm" svg:height="6.61cm" svg:x="1.651cm" svg:y="3.838cm">
          <draw:image xlink:href="Pictures/100002010000032600000376EBBB6A024EBA6EA8.png" xlink:type="simple" xlink:show="embed" xlink:actuate="onLoad">
            <text:p/>
          </draw:image>
        </draw:frame>
        <presentation:notes draw:style-name="dp2">
          <draw:page-thumbnail draw:name="Google Shape;278;g3b0ad707ea8_0_110:notes" draw:style-name="gr1" draw:layer="layout" svg:width="16.932cm" svg:height="9.524cm" svg:x="1.059cm" svg:y="1.905cm" draw:page-number="29" presentation:class="page"/>
          <draw:frame draw:name="Google Shape;279;g3b0ad707ea8_0_110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-Oriented Architecture" draw:style-name="dp1" draw:master-page-name="SECTION_5f_HEADER">
        <draw:frame draw:name="Google Shape;289;p42" presentation:style-name="pr8" draw:text-style-name="P13" draw:layer="layout" svg:width="23.667cm" svg:height="2.337cm" svg:x="0.866cm" svg:y="4.805cm" presentation:class="title" presentation:user-transformed="true">
          <draw:text-box>
            <text:p text:style-name="P1"><text:span text:style-name="T9">Service-Oriented Architecture</text:span></text:p>
          </draw:text-box>
        </draw:frame>
        <draw:frame draw:name="Google Shape;290;p42" presentation:style-name="pr9" draw:text-style-name="P14" draw:layer="layout" svg:width="23.667cm" svg:height="2.201cm" svg:x="0.866cm" svg:y="7.144cm" presentation:class="subtitle" presentation:user-transformed="true">
          <draw:text-box>
            <text:p text:style-name="P11"><text:span text:style-name="T10">Each layer is made of services</text:span></text:p>
          </draw:text-box>
        </draw:frame>
        <presentation:notes draw:style-name="dp2">
          <draw:page-thumbnail draw:name="Google Shape;286;g3ad72b8a13e_0_0:notes" draw:style-name="gr1" draw:layer="layout" svg:width="16.932cm" svg:height="9.524cm" svg:x="1.059cm" svg:y="1.905cm" draw:page-number="30" presentation:class="page"/>
          <draw:frame draw:name="Google Shape;287;g3ad72b8a13e_0_0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overview" draw:style-name="dp1" draw:master-page-name="TITLE_5f_AND_5f_BODY" presentation:presentation-page-layout-name="AL2T1">
        <draw:frame draw:name="Google Shape;295;p4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OA – overview</text:span></text:p>
          </draw:text-box>
        </draw:frame>
        <draw:frame draw:name="Google Shape;296;p43" presentation:style-name="pr14" draw:text-style-name="P7" draw:layer="layout" svg:width="13.788cm" svg:height="6.903cm" svg:x="10.321cm" svg:y="3.201cm" presentation:class="outline" presentation:user-transformed="true">
          <draw:text-box>
            <text:p text:style-name="P17"><text:span text:style-name="T13">Service-Oriented Architecture</text:span><text:span text:style-name="T12"> (</text:span><text:span text:style-name="T13">SOA</text:span><text:span text:style-name="T12">) first splits a system into </text:span><text:span text:style-name="T13">Layers</text:span><text:span text:style-name="T12">, then divides each layer into </text:span><text:span text:style-name="T13">Services</text:span><text:span text:style-name="T12">. This is similar to how OOP/OOD treats a complex project.</text:span></text:p>
            <text:p text:style-name="P19"><text:span text:style-name="T12">The resulting architecture addresses the complexity of the domain, but is itself quite complicated.</text:span></text:p>
          </draw:text-box>
        </draw:frame>
        <draw:frame draw:name="Google Shape;297;p43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5"><text:span text:style-name="T16">SOA</text:span><text:span text:style-name="T14"> suits huge projects, often with heterogeneous hardware.</text:span></text:p>
            <text:p text:style-name="P20"><text:span text:style-name="T15">But don’t expect fast-paced development or low latency.</text:span></text:p>
          </draw:text-box>
        </draw:frame>
        <draw:custom-shape draw:name="Google Shape;298;p43" draw:style-name="gr3" draw:text-style-name="P16" draw:layer="layout" svg:width="9.372cm" svg:height="1.271cm" svg:x="0.949cm" svg:y="9.641cm">
          <text:p text:style-name="P1"><text:span text:style-name="T11">Service-Orient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43" draw:style-name="gr2" draw:text-style-name="P12" draw:layer="layout" svg:width="6.996cm" svg:height="6.16cm" svg:x="2.137cm" svg:y="3.48cm">
          <draw:image xlink:href="Pictures/100002010000048C0000040117C3FDD0B8CE2FFE.png" xlink:type="simple" xlink:show="embed" xlink:actuate="onLoad">
            <text:p/>
          </draw:image>
        </draw:frame>
        <presentation:notes draw:style-name="dp2">
          <draw:page-thumbnail draw:name="Google Shape;292;g3ad72b8a13e_0_5:notes" draw:style-name="gr1" draw:layer="layout" svg:width="16.932cm" svg:height="9.524cm" svg:x="1.059cm" svg:y="1.905cm" draw:page-number="31" presentation:class="page"/>
          <draw:frame draw:name="Google Shape;293;g3ad72b8a13e_0_5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trade-offs" draw:style-name="dp1" draw:master-page-name="TITLE_5f_AND_5f_TWO_5f_COLUMNS" presentation:presentation-page-layout-name="AL3T3">
        <draw:frame draw:name="Google Shape;304;p44" presentation:style-name="pr11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OA – trade-offs</text:span></text:p>
          </draw:text-box>
        </draw:frame>
        <draw:frame draw:name="Google Shape;305;p44" presentation:style-name="pr20" draw:text-style-name="P16" draw:layer="layout" svg:width="11.11cm" svg:height="9.061cm" svg:x="0.866cm" svg:y="3.201cm" presentation:class="outline" presentation:user-transformed="true">
          <draw:text-box>
            <text:p text:style-name="P21"><text:span text:style-name="T17">Supports huge codebases with many development teams and technologies</text:span></text:p>
            <text:p text:style-name="P19"><text:span text:style-name="T17">Provides fine-grained scalability and deployment to dedicated hardware</text:span></text:p>
          </draw:text-box>
        </draw:frame>
        <draw:frame draw:name="Google Shape;306;p44" presentation:style-name="pr21" draw:text-style-name="P16" draw:layer="layout" svg:width="11.11cm" svg:height="9.061cm" svg:x="13.423cm" svg:y="3.201cm" presentation:class="outline" presentation:user-transformed="true">
          <draw:text-box>
            <text:p text:style-name="P21"><text:span text:style-name="T18">The teams are interdependent, which slows down development</text:span></text:p>
            <text:p text:style-name="P18"><text:span text:style-name="T18">The excessive distribution makes the system slow, fragile, and hard to debug</text:span></text:p>
            <text:p text:style-name="P19"><text:span text:style-name="T18">The system is hard to maintain or test because it contains many tightly interacting components</text:span></text:p>
          </draw:text-box>
        </draw:frame>
        <presentation:notes draw:style-name="dp2">
          <draw:page-thumbnail draw:name="Google Shape;301;g3ad72b8a13e_0_13:notes" draw:style-name="gr1" draw:layer="layout" svg:width="16.932cm" svg:height="9.524cm" svg:x="1.059cm" svg:y="1.905cm" draw:page-number="32" presentation:class="page"/>
          <draw:frame draw:name="Google Shape;302;g3ad72b8a13e_0_13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examples" draw:style-name="dp1" draw:master-page-name="TITLE_5f_AND_5f_BODY" presentation:presentation-page-layout-name="AL2T1">
        <draw:frame draw:name="Google Shape;311;p4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OA – examples</text:span></text:p>
          </draw:text-box>
        </draw:frame>
        <draw:frame draw:name="Google Shape;312;p45" presentation:style-name="pr14" draw:text-style-name="P7" draw:layer="layout" svg:width="13.357cm" svg:height="9.699cm" svg:x="10.77cm" svg:y="3.277cm" presentation:class="outline" presentation:user-transformed="true">
          <draw:text-box>
            <text:p text:style-name="P17"><text:span text:style-name="T12">Enterprises used to enlarge by acquiring smaller companies, each with its own homegrown software system that had to be integrated into the enterprise’s architecture.</text:span></text:p>
            <text:p text:style-name="P18"><text:span text:style-name="T12">The integration was mediated by an </text:span><text:span text:style-name="T13">Enterprise Service Bus</text:span><text:span text:style-name="T12"> (</text:span><text:span text:style-name="T13">ESB</text:span><text:span text:style-name="T12">) responsible for both protocol translation and orchestration.</text:span></text:p>
            <text:p text:style-name="P18"><text:span text:style-name="T12">However, the resulting complexity of the </text:span><text:span text:style-name="T13">ESB</text:span><text:span text:style-name="T12"> made everyone hate it.</text:span></text:p>
            <text:p text:style-name="P19"><text:span text:style-name="T20"/></text:p>
          </draw:text-box>
        </draw:frame>
        <draw:custom-shape draw:name="Google Shape;313;p45" draw:style-name="gr3" draw:text-style-name="P16" draw:layer="layout" svg:width="7.488cm" svg:height="1.271cm" svg:x="1.73cm" svg:y="11.318cm">
          <text:p text:style-name="P1"><text:span text:style-name="T11">Enterprise SO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45" draw:style-name="gr2" draw:text-style-name="P12" draw:layer="layout" svg:width="8.464cm" svg:height="7.532cm" svg:x="1.242cm" svg:y="3.597cm">
          <draw:image xlink:href="Pictures/10000201000004C00000043AB2D4566BB54A2DCC.png" xlink:type="simple" xlink:show="embed" xlink:actuate="onLoad">
            <text:p/>
          </draw:image>
        </draw:frame>
        <presentation:notes draw:style-name="dp2">
          <draw:page-thumbnail draw:name="Google Shape;308;g3af9f17ed48_0_37:notes" draw:style-name="gr1" draw:layer="layout" svg:width="16.932cm" svg:height="9.524cm" svg:x="1.059cm" svg:y="1.905cm" draw:page-number="33" presentation:class="page"/>
          <draw:frame draw:name="Google Shape;309;g3af9f17ed48_0_37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examples" draw:style-name="dp1" draw:master-page-name="TITLE_5f_AND_5f_BODY" presentation:presentation-page-layout-name="AL2T1">
        <draw:frame draw:name="Google Shape;319;p4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OA – examples</text:span></text:p>
          </draw:text-box>
        </draw:frame>
        <draw:frame draw:name="Google Shape;320;p46" presentation:style-name="pr14" draw:text-style-name="P7" draw:layer="layout" svg:width="13.291cm" svg:height="8.388cm" svg:x="10.371cm" svg:y="3.692cm" presentation:class="outline" presentation:user-transformed="true">
          <draw:text-box>
            <text:p text:style-name="P17"><text:span text:style-name="T13">Domain-Oriented Microservice Architecture</text:span><text:span text:style-name="T12"> (</text:span><text:span text:style-name="T13">DOMA</text:span><text:span text:style-name="T12">) is made up of </text:span><text:span text:style-name="T13">Cells</text:span><text:span text:style-name="T12"> (</text:span><text:span text:style-name="T13">domains</text:span><text:span text:style-name="T12">, groups of related services) instead of plain services. It relies on </text:span><text:span text:style-name="T13">Plugins</text:span><text:span text:style-name="T12"> for cross-</text:span><text:span text:style-name="T13">domain</text:span><text:span text:style-name="T12"> customization.</text:span></text:p>
            <text:p text:style-name="P19"><text:span text:style-name="T13">DOMA</text:span><text:span text:style-name="T12"> seems to be a flexible real-world architecture suitable for huge projects.</text:span></text:p>
          </draw:text-box>
        </draw:frame>
        <draw:custom-shape draw:name="Google Shape;321;p46" draw:style-name="gr3" draw:text-style-name="P16" draw:layer="layout" svg:width="13.161cm" svg:height="1.271cm" svg:x="8.477cm" svg:y="11.774cm">
          <text:p text:style-name="P1"><text:span text:style-name="T11">Domain-Oriented Microservice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46" draw:style-name="gr2" draw:text-style-name="P12" draw:layer="layout" svg:width="5.485cm" svg:height="8.758cm" svg:x="2.545cm" svg:y="3.983cm">
          <draw:image xlink:href="Pictures/10000201000003EC00000643B7A89E9C10A45FE3.png" xlink:type="simple" xlink:show="embed" xlink:actuate="onLoad">
            <text:p/>
          </draw:image>
        </draw:frame>
        <presentation:notes draw:style-name="dp2">
          <draw:page-thumbnail draw:name="Google Shape;316;g3b0ad707ea8_0_134:notes" draw:style-name="gr1" draw:layer="layout" svg:width="16.932cm" svg:height="9.524cm" svg:x="1.059cm" svg:y="1.905cm" draw:page-number="34" presentation:class="page"/>
          <draw:frame draw:name="Google Shape;317;g3b0ad707ea8_0_134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examples" draw:style-name="dp1" draw:master-page-name="TITLE_5f_AND_5f_BODY" presentation:presentation-page-layout-name="AL2T1">
        <draw:frame draw:name="Google Shape;327;p4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OA – examples</text:span></text:p>
          </draw:text-box>
        </draw:frame>
        <draw:frame draw:name="Google Shape;328;p47" presentation:style-name="pr14" draw:text-style-name="P7" draw:layer="layout" svg:width="11.963cm" svg:height="7.227cm" svg:x="12.147cm" svg:y="3.692cm" presentation:class="outline" presentation:user-transformed="true">
          <draw:text-box>
            <text:p text:style-name="P17"><text:span text:style-name="T13">AUTOSAR Classic</text:span><text:span text:style-name="T12"> from the automotive industry is marketed as a </text:span><text:span text:style-name="T13">SOA</text:span><text:span text:style-name="T12"> (with its </text:span><text:span text:style-name="T13">Virtual Function Bus</text:span><text:span text:style-name="T12"> matching </text:span><text:span text:style-name="T13">ESB</text:span><text:span text:style-name="T12">) but, on closer inspection, it looks like a </text:span><text:span text:style-name="T13">Microkernel</text:span><text:span text:style-name="T12">.</text:span></text:p>
            <text:p text:style-name="P19"><text:span text:style-name="T20"/></text:p>
          </draw:text-box>
        </draw:frame>
        <draw:custom-shape draw:name="Google Shape;329;p47" draw:style-name="gr3" draw:text-style-name="P16" draw:layer="layout" svg:width="7.488cm" svg:height="1.271cm" svg:x="1.882cm" svg:y="11.16cm">
          <text:p text:style-name="P1"><text:span text:style-name="T11">Automotive SO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47" draw:style-name="gr2" draw:text-style-name="P12" draw:layer="layout" svg:width="9.443cm" svg:height="7.143cm" svg:x="1.801cm" svg:y="3.733cm">
          <draw:image xlink:href="Pictures/10000201000004FD000003C6AD8FAB71C76D601B.png" xlink:type="simple" xlink:show="embed" xlink:actuate="onLoad">
            <text:p/>
          </draw:image>
        </draw:frame>
        <presentation:notes draw:style-name="dp2">
          <draw:page-thumbnail draw:name="Google Shape;324;g3b0ad707ea8_0_128:notes" draw:style-name="gr1" draw:layer="layout" svg:width="16.932cm" svg:height="9.524cm" svg:x="1.059cm" svg:y="1.905cm" draw:page-number="35" presentation:class="page"/>
          <draw:frame draw:name="Google Shape;325;g3b0ad707ea8_0_12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" draw:style-name="dp1" draw:master-page-name="SECTION_5f_HEADER">
        <draw:frame draw:name="Google Shape;335;p48" presentation:style-name="pr8" draw:text-style-name="P13" draw:layer="layout" svg:width="23.667cm" svg:height="2.337cm" svg:x="0.866cm" svg:y="4.805cm" presentation:class="title" presentation:user-transformed="true">
          <draw:text-box>
            <text:p text:style-name="P1"><text:span text:style-name="T9">Hierarchy</text:span></text:p>
          </draw:text-box>
        </draw:frame>
        <draw:frame draw:name="Google Shape;336;p48" presentation:style-name="pr9" draw:text-style-name="P14" draw:layer="layout" svg:width="23.667cm" svg:height="2.201cm" svg:x="0.866cm" svg:y="7.144cm" presentation:class="subtitle" presentation:user-transformed="true">
          <draw:text-box>
            <text:p text:style-name="P11"><text:span text:style-name="T10">A recursive structure</text:span></text:p>
          </draw:text-box>
        </draw:frame>
        <presentation:notes draw:style-name="dp2">
          <draw:page-thumbnail draw:name="Google Shape;332;g3ada4842c12_0_0:notes" draw:style-name="gr1" draw:layer="layout" svg:width="16.932cm" svg:height="9.524cm" svg:x="1.059cm" svg:y="1.905cm" draw:page-number="36" presentation:class="page"/>
          <draw:frame draw:name="Google Shape;333;g3ada4842c12_0_0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overview" draw:style-name="dp1" draw:master-page-name="TITLE_5f_AND_5f_BODY" presentation:presentation-page-layout-name="AL2T1">
        <draw:frame draw:name="Google Shape;341;p4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ierarchy – overview</text:span></text:p>
          </draw:text-box>
        </draw:frame>
        <draw:frame draw:name="Google Shape;342;p49" presentation:style-name="pr14" draw:text-style-name="P7" draw:layer="layout" svg:width="15.225cm" svg:height="7.169cm" svg:x="9.309cm" svg:y="3.201cm" presentation:class="outline" presentation:user-transformed="true">
          <draw:text-box>
            <text:p text:style-name="P17"><text:span text:style-name="T13">Hierarchy</text:span><text:span text:style-name="T12"> distributes complexity over a tree-like structure. It is straightforward, convenient, and agile, but few domains are truly hierarchical.</text:span></text:p>
            <text:p text:style-name="P18"><text:span text:style-name="T12">A Hierarchy can be built:</text:span></text:p>
            <text:list text:style-name="L11">
              <text:list-item>
                <text:p text:style-name="P18"><text:span text:style-name="T13">Top-Down</text:span><text:span text:style-name="T12"> (</text:span><text:span text:style-name="T13">Orchestrator of Orchestrators</text:span><text:span text:style-name="T12">)</text:span></text:p>
              </text:list-item>
              <text:list-item>
                <text:p text:style-name="P17"><text:span text:style-name="T13">Bottom-Up</text:span><text:span text:style-name="T12"> (</text:span><text:span text:style-name="T13">Bus of Buses</text:span><text:span text:style-name="T12">)</text:span></text:p>
              </text:list-item>
              <text:list-item>
                <text:p text:style-name="P17"><text:span text:style-name="T13">In-Depth</text:span><text:span text:style-name="T12"> (</text:span><text:span text:style-name="T13">Cell-Based Architecture</text:span><text:span text:style-name="T12">)</text:span></text:p>
              </text:list-item>
            </text:list>
          </draw:text-box>
        </draw:frame>
        <draw:frame draw:name="Google Shape;343;p49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5"><text:span text:style-name="T16">Hierarchy</text:span><text:span text:style-name="T14"> shines with large projects and/or physical devices (IoT).</text:span></text:p>
            <text:p text:style-name="P20"><text:span text:style-name="T15">Making a good hierarchical decomposition may be hard or impossible.</text:span></text:p>
          </draw:text-box>
        </draw:frame>
        <draw:custom-shape draw:name="Google Shape;344;p49" draw:style-name="gr3" draw:text-style-name="P16" draw:layer="layout" svg:width="5.82cm" svg:height="1.271cm" svg:x="1.956cm" svg:y="9.289cm">
          <text:p text:style-name="P1"><text:span text:style-name="T11">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49" draw:style-name="gr2" draw:text-style-name="P12" draw:layer="layout" svg:width="6.877cm" svg:height="5.44cm" svg:x="1.427cm" svg:y="3.715cm">
          <draw:image xlink:href="Pictures/10000201000002FE0000025E42A3F611060B5D68.png" xlink:type="simple" xlink:show="embed" xlink:actuate="onLoad">
            <text:p/>
          </draw:image>
        </draw:frame>
        <presentation:notes draw:style-name="dp2">
          <draw:page-thumbnail draw:name="Google Shape;338;g3ada4842c12_0_5:notes" draw:style-name="gr1" draw:layer="layout" svg:width="16.932cm" svg:height="9.524cm" svg:x="1.059cm" svg:y="1.905cm" draw:page-number="37" presentation:class="page"/>
          <draw:frame draw:name="Google Shape;339;g3ada4842c12_0_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trade-offs" draw:style-name="dp1" draw:master-page-name="TITLE_5f_AND_5f_TWO_5f_COLUMNS" presentation:presentation-page-layout-name="AL3T3">
        <draw:frame draw:name="Google Shape;350;p50" presentation:style-name="pr11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ierarchy – trade-offs</text:span></text:p>
          </draw:text-box>
        </draw:frame>
        <draw:frame draw:name="Google Shape;351;p50" presentation:style-name="pr20" draw:text-style-name="P16" draw:layer="layout" svg:width="11.11cm" svg:height="9.061cm" svg:x="0.866cm" svg:y="3.201cm" presentation:class="outline" presentation:user-transformed="true">
          <draw:text-box>
            <text:p text:style-name="P21"><text:span text:style-name="T17">It’s good in decoupling logic</text:span></text:p>
            <text:p text:style-name="P18"><text:span text:style-name="T17">Multiple development teams are supported</text:span></text:p>
            <text:p text:style-name="P18"><text:span text:style-name="T17">Low-level components are easy to add or replace</text:span></text:p>
            <text:p text:style-name="P19"><text:span text:style-name="T17">The system is quite fault-tolerant as its parts may act independently</text:span></text:p>
          </draw:text-box>
        </draw:frame>
        <draw:frame draw:name="Google Shape;352;p50" presentation:style-name="pr21" draw:text-style-name="P16" draw:layer="layout" svg:width="11.11cm" svg:height="9.061cm" svg:x="13.423cm" svg:y="3.201cm" presentation:class="outline" presentation:user-transformed="true">
          <draw:text-box>
            <text:p text:style-name="P21"><text:span text:style-name="T18">System-wide use cases are slow and hard to debug</text:span></text:p>
            <text:p text:style-name="P18"><text:span text:style-name="T18">Hierarchy has high operational complexity</text:span></text:p>
            <text:p text:style-name="P19"><text:span text:style-name="T18">It also requires much planning or trial and error to discover good interfaces</text:span></text:p>
          </draw:text-box>
        </draw:frame>
        <presentation:notes draw:style-name="dp2">
          <draw:page-thumbnail draw:name="Google Shape;347;g3ada4842c12_0_13:notes" draw:style-name="gr1" draw:layer="layout" svg:width="16.932cm" svg:height="9.524cm" svg:x="1.059cm" svg:y="1.905cm" draw:page-number="38" presentation:class="page"/>
          <draw:frame draw:name="Google Shape;348;g3ada4842c12_0_13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variants" draw:style-name="dp1" draw:master-page-name="TITLE_5f_AND_5f_BODY" presentation:presentation-page-layout-name="AL2T1">
        <draw:frame draw:name="Google Shape;357;p5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ierarchy – variants</text:span></text:p>
          </draw:text-box>
        </draw:frame>
        <draw:frame draw:name="Google Shape;358;p51" presentation:style-name="pr14" draw:text-style-name="P7" draw:layer="layout" svg:width="14.427cm" svg:height="8.786cm" svg:x="10.106cm" svg:y="3.692cm" presentation:class="outline" presentation:user-transformed="true">
          <draw:text-box>
            <text:p text:style-name="P17"><text:span text:style-name="T12">A </text:span><text:span text:style-name="T13">Top-Down Hierarchy</text:span><text:span text:style-name="T12"> (</text:span><text:span text:style-name="T13">Orchestrator of Orchestrators</text:span><text:span text:style-name="T12">) builds a tree whose root deals with high-level commands or notifications while its leaves are responsible for concrete actions. </text:span></text:p>
            <text:p text:style-name="P18"><text:span text:style-name="T12">Examples include:</text:span></text:p>
            <text:list text:style-name="L11">
              <text:list-item>
                <text:p text:style-name="P18"><text:span text:style-name="T12">Product filters in web marketplaces.</text:span></text:p>
              </text:list-item>
              <text:list-item>
                <text:p text:style-name="P17"><text:span text:style-name="T12">Automation of industrial complexes (IIoT).</text:span></text:p>
              </text:list-item>
              <text:list-item>
                <text:p text:style-name="P17"><text:span text:style-name="T12">Hierarchical UIs (</text:span><text:span text:style-name="T13">PAC</text:span><text:span text:style-name="T12"> and </text:span><text:span text:style-name="T13">HMVC</text:span><text:span text:style-name="T12">).</text:span></text:p>
              </text:list-item>
            </text:list>
          </draw:text-box>
        </draw:frame>
        <draw:custom-shape draw:name="Google Shape;359;p51" draw:style-name="gr3" draw:text-style-name="P16" draw:layer="layout" svg:width="8.385cm" svg:height="1.271cm" svg:x="1.104cm" svg:y="10.416cm">
          <text:p text:style-name="P1"><text:span text:style-name="T11">Top-Down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51" draw:style-name="gr2" draw:text-style-name="P12" draw:layer="layout" svg:width="6.392cm" svg:height="5.716cm" svg:x="2.1cm" svg:y="4.285cm">
          <draw:image xlink:href="Pictures/10000201000002FE000002AD7F3CC79B60F13B6D.png" xlink:type="simple" xlink:show="embed" xlink:actuate="onLoad">
            <text:p/>
          </draw:image>
        </draw:frame>
        <presentation:notes draw:style-name="dp2">
          <draw:page-thumbnail draw:name="Google Shape;354;g3ada4842c12_0_35:notes" draw:style-name="gr1" draw:layer="layout" svg:width="16.932cm" svg:height="9.524cm" svg:x="1.059cm" svg:y="1.905cm" draw:page-number="39" presentation:class="page"/>
          <draw:frame draw:name="Google Shape;355;g3ada4842c12_0_3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variants" draw:style-name="dp1" draw:master-page-name="TITLE_5f_AND_5f_BODY" presentation:presentation-page-layout-name="AL2T1">
        <draw:frame draw:name="Google Shape;365;p5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ierarchy – variants</text:span></text:p>
          </draw:text-box>
        </draw:frame>
        <draw:frame draw:name="Google Shape;366;p52" presentation:style-name="pr14" draw:text-style-name="P7" draw:layer="layout" svg:width="11.833cm" svg:height="8.786cm" svg:x="12.7cm" svg:y="3.692cm" presentation:class="outline" presentation:user-transformed="true">
          <draw:text-box>
            <text:p text:style-name="P17"><text:span text:style-name="T12">A </text:span><text:span text:style-name="T13">Bottom-Up Hierarchy</text:span><text:span text:style-name="T12"> (</text:span><text:span text:style-name="T13">Bus of Buses</text:span><text:span text:style-name="T12">) interconnects several networks that differ in their internal protocols.</text:span></text:p>
            <text:p text:style-name="P19"><text:span text:style-name="T12">This is what the Internet is.</text:span></text:p>
          </draw:text-box>
        </draw:frame>
        <draw:custom-shape draw:name="Google Shape;367;p52" draw:style-name="gr3" draw:text-style-name="P16" draw:layer="layout" svg:width="8.385cm" svg:height="1.271cm" svg:x="2.166cm" svg:y="9.653cm">
          <text:p text:style-name="P1"><text:span text:style-name="T11">Bottom-Up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52" draw:style-name="gr2" draw:text-style-name="P12" draw:layer="layout" svg:width="10.576cm" svg:height="5.617cm" svg:x="1.071cm" svg:y="3.692cm">
          <draw:image xlink:href="Pictures/10000201000005A60000030048AC1AF238C1F543.png" xlink:type="simple" xlink:show="embed" xlink:actuate="onLoad">
            <text:p/>
          </draw:image>
        </draw:frame>
        <presentation:notes draw:style-name="dp2">
          <draw:page-thumbnail draw:name="Google Shape;362;g3b0ad707ea8_0_141:notes" draw:style-name="gr1" draw:layer="layout" svg:width="16.932cm" svg:height="9.524cm" svg:x="1.059cm" svg:y="1.905cm" draw:page-number="40" presentation:class="page"/>
          <draw:frame draw:name="Google Shape;363;g3b0ad707ea8_0_141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variants" draw:style-name="dp1" draw:master-page-name="TITLE_5f_AND_5f_BODY" presentation:presentation-page-layout-name="AL2T1">
        <draw:frame draw:name="Google Shape;373;p5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ierarchy – variants</text:span></text:p>
          </draw:text-box>
        </draw:frame>
        <draw:frame draw:name="Google Shape;374;p53" presentation:style-name="pr14" draw:text-style-name="P7" draw:layer="layout" svg:width="22.889cm" svg:height="4.921cm" svg:x="1.005cm" svg:y="3.26cm" presentation:class="outline" presentation:user-transformed="true">
          <draw:text-box>
            <text:p text:style-name="P17"><text:span text:style-name="T12">An </text:span><text:span text:style-name="T13">In-Depth Hierarchy</text:span><text:span text:style-name="T12"> relies on a recursive subdivision of elements. A common example is the WSO2 definition of a </text:span><text:span text:style-name="T13">Cell</text:span><text:span text:style-name="T12"> that is a subsystem made of services which itself takes the place of a single service in a larger system:</text:span></text:p>
            <text:list text:style-name="L11">
              <text:list-item>
                <text:p text:style-name="P18"><text:span text:style-name="T13">Cell-Based Architecture</text:span><text:span text:style-name="T12"> is a single layer of </text:span><text:span text:style-name="T13">Cells</text:span><text:span text:style-name="T12">.</text:span></text:p>
              </text:list-item>
              <text:list-item>
                <text:p text:style-name="P17"><text:span text:style-name="T13">Domain-Oriented Microservice Architecture</text:span><text:span text:style-name="T12"> is a </text:span><text:span text:style-name="T13">SOA</text:span><text:span text:style-name="T12"> made of </text:span><text:span text:style-name="T13">Cells</text:span><text:span text:style-name="T12">.</text:span></text:p>
              </text:list-item>
            </text:list>
          </draw:text-box>
        </draw:frame>
        <draw:custom-shape draw:name="Google Shape;375;p53" draw:style-name="gr3" draw:text-style-name="P16" draw:layer="layout" svg:width="20.724cm" svg:height="1.271cm" svg:x="2.088cm" svg:y="12.559cm">
          <text:p text:style-name="P1"><text:span text:style-name="T11">In-Depth Hierarchy, Cell-Bas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53" draw:style-name="gr2" draw:text-style-name="P12" draw:layer="layout" svg:width="11.141cm" svg:height="3.943cm" svg:x="6.88cm" svg:y="8.615cm">
          <draw:image xlink:href="Pictures/1000020100000800000002D5656E635519479055.png" xlink:type="simple" xlink:show="embed" xlink:actuate="onLoad">
            <text:p/>
          </draw:image>
        </draw:frame>
        <presentation:notes draw:style-name="dp2">
          <draw:page-thumbnail draw:name="Google Shape;370;g3b0ad707ea8_0_147:notes" draw:style-name="gr1" draw:layer="layout" svg:width="16.932cm" svg:height="9.524cm" svg:x="1.059cm" svg:y="1.905cm" draw:page-number="41" presentation:class="page"/>
          <draw:frame draw:name="Google Shape;371;g3b0ad707ea8_0_147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81;p54" presentation:style-name="pr8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9">Conclusion</text:span></text:p>
          </draw:text-box>
        </draw:frame>
        <presentation:notes draw:style-name="dp2">
          <draw:page-thumbnail draw:name="Google Shape;378;g39ecdd5df51_0_44:notes" draw:style-name="gr1" draw:layer="layout" svg:width="16.932cm" svg:height="9.524cm" svg:x="1.059cm" svg:y="1.905cm" draw:page-number="42" presentation:class="page"/>
          <draw:frame draw:name="Google Shape;379;g39ecdd5df51_0_44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dividing a component" draw:style-name="dp1" draw:master-page-name="TITLE_5f_AND_5f_BODY" presentation:presentation-page-layout-name="AL2T1">
        <draw:frame draw:name="Google Shape;386;p55" presentation:style-name="pr23" draw:text-style-name="P7" draw:layer="layout" svg:width="23.667cm" svg:height="10.04cm" svg:x="0.866cm" svg:y="3.201cm" presentation:class="outline" presentation:user-transformed="true">
          <draw:text-box>
            <text:p text:style-name="P21"><text:span text:style-name="T12">If a component conjoins loosely coupled segments, subdividing it may:</text:span></text:p>
            <text:list text:style-name="L12">
              <text:list-item>
                <text:p text:style-name="P18"><text:span text:style-name="T17">Yield smaller and better structured code thanks to the separation of concerns.</text:span></text:p>
              </text:list-item>
              <text:list-item>
                <text:p text:style-name="P17"><text:span text:style-name="T17">Improve performance through the careful selection of technologies.</text:span></text:p>
              </text:list-item>
              <text:list-item>
                <text:p text:style-name="P17"><text:span text:style-name="T17">Improve fault tolerance if the newly created parts of the system may act independently.</text:span></text:p>
              </text:list-item>
            </text:list>
            <text:p text:style-name="P18"><text:span text:style-name="T12">However, it also:</text:span></text:p>
            <text:list text:style-name="L14">
              <text:list-item>
                <text:p text:style-name="P18"><text:span text:style-name="T18">Increases operational complexity and latency.</text:span></text:p>
              </text:list-item>
              <text:list-item>
                <text:p text:style-name="P17"><text:span text:style-name="T18">Makes sharing code inconvenient.</text:span></text:p>
              </text:list-item>
            </text:list>
          </draw:text-box>
        </draw:frame>
        <draw:frame draw:name="Google Shape;387;p5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ubdividing a component</text:span></text:p>
          </draw:text-box>
        </draw:frame>
        <presentation:notes draw:style-name="dp2">
          <draw:page-thumbnail draw:name="Google Shape;383;g3afbd97c74f_0_0:notes" draw:style-name="gr1" draw:layer="layout" svg:width="16.932cm" svg:height="9.524cm" svg:x="1.059cm" svg:y="1.905cm" draw:page-number="43" presentation:class="page"/>
          <draw:frame draw:name="Google Shape;384;g3afbd97c74f_0_0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392;p5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inks</text:span></text:p>
          </draw:text-box>
        </draw:frame>
        <draw:frame draw:name="Google Shape;393;p56" presentation:style-name="pr23" draw:text-style-name="P7" draw:layer="layout" svg:width="23.667cm" svg:height="6.506cm" svg:x="0.866cm" svg:y="3.201cm" presentation:class="outline" presentation:user-transformed="true">
          <draw:text-box>
            <text:p text:style-name="P17"><text:span text:style-name="T12">This was a brief summary of part 4 of </text:span><text:span text:style-name="T13">Architectural Metapatterns</text:span><text:span text:style-name="T12">:</text:span></text:p>
            <text:p text:style-name="P18"><text:span text:style-name="T12">– </text:span><text:span text:style-name="T12">read it online at </text:span><text:span text:style-name="T21"><text:a xlink:href="https://metapatterns.io/" xlink:type="simple">metapatterns.io</text:a></text:span></text:p>
            <text:p text:style-name="P18"><text:span text:style-name="T12">– </text:span><text:span text:style-name="T12">download the eBook from </text:span><text:span text:style-name="T21"><text:a xlink:href="https://leanpub.com/metapatterns" xlink:type="simple">leanpub.com/metapatterns</text:a></text:span></text:p>
            <text:p text:style-name="P19"><text:span text:style-name="T12">The diagrams and the ODT source file are available under the CC BY license.</text:span></text:p>
          </draw:text-box>
        </draw:frame>
        <draw:frame draw:name="Google Shape;394;p56" presentation:style-name="pr4" draw:text-style-name="P7" draw:layer="layout" svg:width="23.667cm" svg:height="3.218cm" svg:x="0.866cm" svg:y="9.708cm" presentation:class="outline" presentation:user-transformed="true">
          <draw:text-box>
            <text:p text:style-name="P15"><text:span text:style-name="T22">If you like this book, please tell your friends about it.</text:span></text:p>
            <text:p text:style-name="P15"><text:span text:style-name="T22">I have no way to promote it on my own.</text:span></text:p>
          </draw:text-box>
        </draw:frame>
        <presentation:notes draw:style-name="dp2">
          <draw:page-thumbnail draw:name="Google Shape;389;g39ecdd5df51_0_53:notes" draw:style-name="gr1" draw:layer="layout" svg:width="16.932cm" svg:height="9.524cm" svg:x="1.059cm" svg:y="1.905cm" draw:page-number="44" presentation:class="page"/>
          <draw:frame draw:name="Google Shape;390;g39ecdd5df51_0_53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4"/>
    <meta:generator>LibreOfficeDev/6.0.5.2$Linux_X86_64 LibreOffice_project/</meta:generator>
  </office:meta>
</office:document-meta>
</file>