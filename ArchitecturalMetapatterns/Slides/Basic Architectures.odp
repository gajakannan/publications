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60000034AB8769B9E9F892171.png" manifest:media-type="image/png"/>
  <manifest:file-entry manifest:full-path="Pictures/1000020100000354000001963CBCF7601171781C.png" manifest:media-type="image/png"/>
  <manifest:file-entry manifest:full-path="Pictures/10000201000001E6000001BEFD31F459833BF22C.png" manifest:media-type="image/png"/>
  <manifest:file-entry manifest:full-path="Pictures/10000201000002D6000001E6F0F0FA15FCC0D519.png" manifest:media-type="image/png"/>
  <manifest:file-entry manifest:full-path="Pictures/100002010000025E00000329C304F0A24A7EF952.png" manifest:media-type="image/png"/>
  <manifest:file-entry manifest:full-path="Pictures/10000201000005560000034BF747893BDCD98BE1.png" manifest:media-type="image/png"/>
  <manifest:file-entry manifest:full-path="Pictures/100002010000025E000003295759957F8FDE4685.png" manifest:media-type="image/png"/>
  <manifest:file-entry manifest:full-path="Pictures/100002010000025E0000032A8E6CEF1EEA9F663D.png" manifest:media-type="image/png"/>
  <manifest:file-entry manifest:full-path="Pictures/100002010000025E000003295ECB7B90938A9C2F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2010000046900000211C439E9E71429E954.png" manifest:media-type="image/png"/>
  <manifest:file-entry manifest:full-path="Pictures/10000201000003A60000034D084555380552E2C2.png" manifest:media-type="image/png"/>
  <manifest:file-entry manifest:full-path="Pictures/100002010000039D000002FD3AE4381D72FD9B15.png" manifest:media-type="image/png"/>
  <manifest:file-entry manifest:full-path="Pictures/1000020100000196000002DCE25C1C6A415FF957.png" manifest:media-type="image/png"/>
  <manifest:file-entry manifest:full-path="Pictures/TablePreview2.svm" manifest:media-type=""/>
  <manifest:file-entry manifest:full-path="Pictures/10000201000003510000019678C0F046B9830EDD.png" manifest:media-type="image/png"/>
  <manifest:file-entry manifest:full-path="Pictures/TablePreview1.svm" manifest:media-type=""/>
  <manifest:file-entry manifest:full-path="Pictures/100002010000039D000002FDD1CA37D5E217D17F.png" manifest:media-type="image/png"/>
  <manifest:file-entry manifest:full-path="Pictures/10000201000001E6000001E6B2BCDEEB7AEC150E.png" manifest:media-type="image/png"/>
  <manifest:file-entry manifest:full-path="Pictures/100002010000034E000001A28C9BEF15358C3914.png" manifest:media-type="image/png"/>
  <manifest:file-entry manifest:full-path="Pictures/1000020100000196000002DC2D7D1131A1CB1E2B.png" manifest:media-type="image/png"/>
  <manifest:file-entry manifest:full-path="Pictures/1000020100000196000002DCE3D1144AB7C4EE55.png" manifest:media-type="image/png"/>
  <manifest:file-entry manifest:full-path="Pictures/100002010000023C000001E678FE7365EF2F0A36.png" manifest:media-type="image/png"/>
  <manifest:file-entry manifest:full-path="Pictures/100002010000019E000001974F1C49A74A062EA6.png" manifest:media-type="image/png"/>
  <manifest:file-entry manifest:full-path="Pictures/10000201000001E6000002FED1936FF41FF9508C.png" manifest:media-type="image/png"/>
  <manifest:file-entry manifest:full-path="Pictures/100002010000025E00000329223FA742B5A7595C.png" manifest:media-type="image/png"/>
  <manifest:file-entry manifest:full-path="Pictures/10000201000002EF000002D67A2AEE6182D8FD5C.png" manifest:media-type="image/png"/>
  <manifest:file-entry manifest:full-path="Pictures/1000020100000214000002FE3D611CAE9D0F79F2.png" manifest:media-type="image/png"/>
  <manifest:file-entry manifest:full-path="Pictures/10000201000001E6000002FE2F6D567D1BBAF2AD.png" manifest:media-type="image/png"/>
  <manifest:file-entry manifest:full-path="Pictures/10000201000002D60000025D3B486C812F687622.png" manifest:media-type="image/png"/>
  <manifest:file-entry manifest:full-path="Pictures/10000201000001E6000002AE3371865D29404F71.png" manifest:media-type="image/png"/>
  <manifest:file-entry manifest:full-path="Pictures/10000201000002360000034E5F63497929F237FB.png" manifest:media-type="image/png"/>
  <manifest:file-entry manifest:full-path="Pictures/TablePreview3.svm" manifest:media-type=""/>
  <manifest:file-entry manifest:full-path="Pictures/10000201000001E6000002AE9A7D44083973D73C.png" manifest:media-type="image/png"/>
  <manifest:file-entry manifest:full-path="Pictures/10000201000002860000025DE7D050F41E874375.png" manifest:media-type="image/png"/>
  <manifest:file-entry manifest:full-path="Pictures/10000201000002850000020E72A0E3126B40E309.png" manifest:media-type="image/png"/>
  <manifest:file-entry manifest:full-path="Pictures/10000201000001BF00000199B5208CB1CFA815E6.png" manifest:media-type="image/png"/>
  <manifest:file-entry manifest:full-path="Pictures/TablePreview4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508cm" fo:padding-bottom="0.508cm" fo:padding-left="0.508cm" fo:padding-right="0.508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4.772cm" fo:padding-top="0.508cm" fo:padding-bottom="0.508cm" fo:padding-left="0.508cm" fo:padding-right="0.508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16.322cm" fo:padding-top="0.508cm" fo:padding-bottom="0.508cm" fo:padding-left="0.508cm" fo:padding-right="0.508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4.772cm" fo:padding-top="0.508cm" fo:padding-bottom="0.508cm" fo:padding-left="0.508cm" fo:padding-right="0.508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4.772cm" fo:padding-top="0.508cm" fo:padding-bottom="0.508cm" fo:padding-left="0.508cm" fo:padding-right="0.508cm" fo:wrap-option="wrap"/>
    </style:style>
    <style:style style:name="pr9" style:family="presentation" style:parent-style-name="SECTION_5f_HEADER-subtitle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pr10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6.322cm" fo:padding-top="0.508cm" fo:padding-bottom="0.508cm" fo:padding-left="0.508cm" fo:padding-right="0.508cm" fo:wrap-option="wrap"/>
    </style:style>
    <style:style style:name="pr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title">
      <style:graphic-properties draw:stroke="none" svg:stroke-width="0cm" draw:fill="none" draw:textarea-vertical-align="middle" draw:auto-grow-height="false" draw:fit-to-size="false" style:shrink-to-fit="false" fo:min-height="4.772cm" fo:padding-top="0.508cm" fo:padding-bottom="0.508cm" fo:padding-left="0.508cm" fo:padding-right="0.508cm" fo:wrap-option="wrap"/>
    </style:style>
    <style:style style:name="pr14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16.322cm" fo:padding-top="0.508cm" fo:padding-bottom="0.508cm" fo:padding-left="0.508cm" fo:padding-right="0.508cm" fo:wrap-option="wrap"/>
    </style:style>
    <style:style style:name="pr1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16.322cm" fo:padding-top="0.508cm" fo:padding-bottom="0.508cm" fo:padding-left="0.508cm" fo:padding-right="0.508cm" fo:wrap-option="wrap"/>
    </style:style>
    <style:style style:name="pr16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outline1">
      <style:graphic-properties draw:stroke="none" svg:stroke-width="0cm" draw:fill="none" draw:textarea-vertical-align="middle" draw:auto-grow-height="false" draw:fit-to-size="false" style:shrink-to-fit="false" fo:min-height="16.322cm" fo:padding-top="0.508cm" fo:padding-bottom="0.508cm" fo:padding-left="0.508cm" fo:padding-right="0.508cm" fo:wrap-option="wrap"/>
    </style:style>
    <style:style style:name="pr18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16.322cm" fo:padding-top="0.508cm" fo:padding-bottom="0.508cm" fo:padding-left="0.508cm" fo:padding-right="0.508cm" fo:wrap-option="wrap"/>
    </style:style>
    <style:style style:name="pr3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9.106cm" style:use-optimal-column-width="false"/>
    </style:style>
    <style:style style:name="co2" style:family="table-column">
      <style:table-column-properties style:column-width="22.264cm" style:use-optimal-column-width="false"/>
    </style:style>
    <style:style style:name="co3" style:family="table-column">
      <style:table-column-properties style:column-width="13.48cm" style:use-optimal-column-width="false"/>
    </style:style>
    <style:style style:name="co4" style:family="table-column">
      <style:table-column-properties style:column-width="12.763cm" style:use-optimal-column-width="false"/>
    </style:style>
    <style:style style:name="co5" style:family="table-column">
      <style:table-column-properties style:column-width="14.596cm" style:use-optimal-column-width="false"/>
    </style:style>
    <style:style style:name="co6" style:family="table-column">
      <style:table-column-properties style:column-width="16.142cm" style:use-optimal-column-width="false"/>
    </style:style>
    <style:style style:name="co7" style:family="table-column">
      <style:table-column-properties style:column-width="12.895cm" style:use-optimal-column-width="false"/>
    </style:style>
    <style:style style:name="co8" style:family="table-column">
      <style:table-column-properties style:column-width="16.189cm" style:use-optimal-column-width="false"/>
    </style:style>
    <style:style style:name="co9" style:family="table-column">
      <style:table-column-properties style:column-width="14.417cm" style:use-optimal-column-width="false"/>
    </style:style>
    <style:style style:name="co10" style:family="table-column">
      <style:table-column-properties style:column-width="12.099cm" style:use-optimal-column-width="false"/>
    </style:style>
    <style:style style:name="co11" style:family="table-column">
      <style:table-column-properties style:column-width="16.322cm" style:use-optimal-column-width="false"/>
    </style:style>
    <style:style style:name="co12" style:family="table-column">
      <style:table-column-properties style:column-width="15.08cm" style:use-optimal-column-width="false"/>
    </style:style>
    <style:style style:name="co13" style:family="table-column">
      <style:table-column-properties style:column-width="12.431cm" style:use-optimal-column-width="false"/>
    </style:style>
    <style:style style:name="co14" style:family="table-column">
      <style:table-column-properties style:column-width="9.85cm" style:use-optimal-column-width="false"/>
    </style:style>
    <style:style style:name="co15" style:family="table-column">
      <style:table-column-properties style:column-width="21.22cm" style:use-optimal-column-width="false"/>
    </style:style>
    <style:style style:name="co16" style:family="table-column">
      <style:table-column-properties style:column-width="8.992cm" style:use-optimal-column-width="false"/>
    </style:style>
    <style:style style:name="co17" style:family="table-column">
      <style:table-column-properties style:column-width="8.994cm" style:use-optimal-column-width="false"/>
    </style:style>
    <style:style style:name="ro1" style:family="table-row">
      <style:table-row-properties style:row-height="2.437cm"/>
    </style:style>
    <style:style style:name="ro2" style:family="table-row">
      <style:table-row-properties style:row-height="15.682cm"/>
    </style:style>
    <style:style style:name="ro3" style:family="table-row">
      <style:table-row-properties style:row-height="3.713cm"/>
    </style:style>
    <style:style style:name="ro4" style:family="table-row">
      <style:table-row-properties style:row-height="5.987cm"/>
    </style:style>
    <style:style style:name="ro5" style:family="table-row">
      <style:table-row-properties style:row-height="4.565cm"/>
    </style:style>
    <style:style style:name="ro6" style:family="table-row">
      <style:table-row-properties style:row-height="3.859cm"/>
    </style:style>
    <style:style style:name="ro7" style:family="table-row">
      <style:table-row-properties style:row-height="11.355cm"/>
    </style:style>
    <style:style style:name="ro8" style:family="table-row">
      <style:table-row-properties style:row-height="4.131cm"/>
    </style:style>
    <style:style style:name="ce1" style:family="table-cell">
      <loext:graphic-properties draw:fill="none" draw:textarea-vertical-align="top" fo:padding-top="0.507cm" fo:padding-bottom="0.507cm" fo:padding-left="0.507cm" fo:padding-right="0.507cm"/>
      <style:paragraph-properties fo:border="0.37pt solid #9e9e9e"/>
    </style:style>
    <style:style style:name="ce2" style:family="table-cell">
      <loext:graphic-properties draw:fill="none" draw:textarea-vertical-align="top" fo:padding-top="0.507cm" fo:padding-bottom="0.507cm" fo:padding-left="0.507cm" fo:padding-right="0.507cm"/>
      <style:paragraph-properties fo:border="0.74pt solid #adadad"/>
    </style:style>
    <style:style style:name="ce3" style:family="table-cell">
      <loext:graphic-properties draw:fill="none" draw:textarea-vertical-align="top" fo:padding-top="0.507cm" fo:padding-bottom="0.507cm" fo:padding-left="0.507cm" fo:padding-right="0.507cm"/>
      <style:paragraph-properties fo:border-left="0.74pt solid #adadad" fo:border-right="0.74pt solid #adadad" fo:border-top="0.74pt solid #adadad" fo:border-bottom="0.74pt solid #9e9e9e"/>
    </style:style>
    <style:style style:name="ce4" style:family="table-cell">
      <loext:graphic-properties draw:fill="none" draw:textarea-vertical-align="top" fo:padding-top="0.507cm" fo:padding-bottom="0.507cm" fo:padding-left="0.507cm" fo:padding-right="0.507cm"/>
      <style:paragraph-properties fo:border-left="0.74pt solid #adadad" fo:border-right="0.74pt solid #adadad" fo:border-top="0.74pt solid #9e9e9e" fo:border-bottom="0.74pt solid #adadad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0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5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706cm" fo:margin-bottom="0cm" fo:line-height="105%" fo:text-align="start" fo:text-indent="0cm" style:writing-mode="lr-tb"/>
    </style:style>
    <style:style style:name="P6" style:family="paragraph">
      <style:paragraph-properties fo:margin-left="0cm" fo:margin-right="0cm" fo:margin-top="0.706cm" fo:margin-bottom="0.706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9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847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847cm" fo:margin-bottom="0.847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847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84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847cm" fo:margin-bottom="0.847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847cm" fo:margin-bottom="0.847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.70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706cm" fo:margin-bottom="0.847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5" style:family="paragraph">
      <style:paragraph-properties fo:margin-left="0cm" fo:margin-right="0cm" fo:margin-top="0.70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7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706cm" fo:margin-bottom="0.706cm" fo:line-height="105%" fo:text-align="center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04pt" fo:letter-spacing="normal" fo:font-style="normal" style:text-underline-style="none" fo:font-weight="normal" style:font-name-asian="Arial" style:font-size-asian="104pt" style:font-style-asian="normal" style:font-weight-asian="normal" style:font-name-complex="Arial" style:font-size-complex="104pt" style:font-style-complex="normal" style:font-weight-complex="normal"/>
    </style:style>
    <style:style style:name="T2" style:family="text">
      <style:text-properties fo:font-variant="normal" fo:text-transform="none" fo:color="#eeeeee" style:text-line-through-style="none" style:text-line-through-type="none" style:text-position="0% 100%" style:font-name="Arial" fo:font-size="56pt" fo:letter-spacing="normal" fo:font-style="normal" style:text-underline-style="none" fo:font-weight="normal" style:font-name-asian="Arial" style:font-size-asian="56pt" style:font-style-asian="normal" style:font-weight-asian="normal" style:font-name-complex="Arial" style:font-size-complex="56pt" style:font-style-complex="normal" style:font-weight-complex="normal"/>
    </style:style>
    <style:style style:name="T3" style:family="text">
      <style:text-properties fo:font-variant="normal" fo:text-transform="none" fo:color="#eedd00" style:text-line-through-style="none" style:text-line-through-type="none" style:text-position="0% 100%" style:font-name="Arial" fo:font-size="48pt" fo:letter-spacing="normal" fo:font-style="italic" style:text-underline-style="none" fo:font-weight="normal" style:font-name-asian="Arial" style:font-size-asian="48pt" style:font-style-asian="italic" style:font-weight-asian="normal" style:font-name-complex="Arial" style:font-size-complex="48pt" style:font-style-complex="italic" style:font-weight-complex="normal"/>
    </style:style>
    <style:style style:name="T4" style:family="text">
      <style:text-properties fo:font-variant="normal" fo:text-transform="none" fo:color="#eeeeee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5" style:family="text">
      <style:text-properties fo:font-variant="normal" fo:text-transform="none" fo:color="#11dd11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8" style:family="text">
      <style:text-properties fo:font-variant="normal" fo:text-transform="none" fo:color="#11dd11" style:text-line-through-style="none" style:text-line-through-type="none" style:text-position="0% 100%" style:font-name="Arial" fo:font-size="48pt" fo:letter-spacing="normal" fo:font-style="italic" style:text-underline-style="none" fo:font-weight="normal" style:font-name-asian="Arial" style:font-size-asian="48pt" style:font-style-asian="italic" style:font-weight-asian="normal" style:font-name-complex="Arial" style:font-size-complex="48pt" style:font-style-complex="italic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96pt" fo:letter-spacing="normal" fo:font-style="normal" style:text-underline-style="none" fo:font-weight="normal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2" style:family="text">
      <style:text-properties fo:font-variant="normal" fo:text-transform="none" fo:color="#eeeeee" style:text-line-through-style="none" style:text-line-through-type="none" style:text-position="0% 100%" style:font-name="Arial" fo:font-size="36pt" fo:letter-spacing="normal" fo:font-style="italic" style:text-underline-style="none" fo:font-weight="normal" style:font-name-asian="Ari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13" style:family="text">
      <style:text-properties fo:font-variant="normal" fo:text-transform="none" fo:color="#11dd11" style:text-line-through-style="none" style:text-line-through-type="none" style:text-position="0% 100%" style:font-name="Arial" fo:font-size="44pt" fo:letter-spacing="normal" fo:font-style="italic" style:text-underline-style="none" fo:font-weight="normal" style:font-name-asian="Arial" style:font-size-asian="44pt" style:font-style-asian="italic" style:font-weight-asian="normal" style:font-name-complex="Arial" style:font-size-complex="44pt" style:font-style-complex="italic" style:font-weight-complex="normal"/>
    </style:style>
    <style:style style:name="T14" style:family="text">
      <style:text-properties fo:font-variant="normal" fo:text-transform="none" fo:color="#11dd11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15" style:family="text">
      <style:text-properties fo:font-variant="normal" fo:text-transform="none" fo:color="#ff4455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16" style:family="text">
      <style:text-properties fo:font-variant="normal" fo:text-transform="none" fo:color="#eedd00" style:text-line-through-style="none" style:text-line-through-type="none" style:text-position="0% 100%" style:font-name="Arial" fo:font-size="36pt" fo:letter-spacing="normal" fo:font-style="italic" style:text-underline-style="none" fo:font-weight="normal" style:font-name-asian="Ari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17" style:family="text">
      <style:text-properties fo:font-variant="normal" fo:text-transform="none" fo:color="#11dd11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8" style:family="text">
      <style:text-properties fo:font-variant="normal" fo:text-transform="none" fo:color="#ff4455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9" style:family="text">
      <style:text-properties fo:font-variant="normal" fo:text-transform="none" fo:color="#ff4455" style:text-line-through-style="none" style:text-line-through-type="none" style:text-position="0% 100%" style:font-name="Arial" fo:font-size="36pt" fo:letter-spacing="normal" fo:font-style="italic" style:text-underline-style="none" fo:font-weight="normal" style:font-name-asian="Ari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20" style:family="text">
      <style:text-properties fo:font-variant="normal" fo:text-transform="none" fo:color="#eedd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1" style:family="text">
      <style:text-properties fo:font-variant="normal" fo:text-transform="none" fo:color="#eeeeee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2" style:family="text">
      <style:text-properties fo:font-variant="normal" fo:text-transform="none" fo:color="#ff4455" style:text-line-through-style="none" style:text-line-through-type="none" style:text-position="0% 100%" style:font-name="Arial" fo:font-size="44pt" fo:letter-spacing="normal" fo:font-style="italic" style:text-underline-style="none" fo:font-weight="normal" style:font-name-asian="Arial" style:font-size-asian="44pt" style:font-style-asian="italic" style:font-weight-asian="normal" style:font-name-complex="Arial" style:font-size-complex="44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eedd00" style:text-line-through-style="none" style:text-line-through-type="none" style:text-position="0% 100%" style:font-name="Arial" fo:font-size="32pt" fo:letter-spacing="normal" fo:font-style="italic" style:text-underline-style="none" fo:font-weight="normal" style:font-name-asian="Arial" style:font-size-asian="32pt" style:font-style-asian="italic" style:font-weight-asian="normal" style:font-name-complex="Arial" style:font-size-complex="32pt" style:font-style-complex="italic" style:font-weight-complex="normal"/>
    </style:style>
    <style:style style:name="T25" style:family="text">
      <style:text-properties fo:font-variant="normal" fo:text-transform="none" fo:color="#eeeeee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6" style:family="text">
      <style:text-properties fo:font-variant="normal" fo:text-transform="none" fo:color="#4dd0e1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24cm" text:min-label-width="2.116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424cm" text:min-label-width="2.116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36cm" text:min-label-width="1.904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636cm" text:min-label-width="1.904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47.336cm" svg:height="11.402cm" svg:x="1.732cm" svg:y="4.137cm" presentation:class="title" presentation:user-transformed="true">
          <draw:text-box>
            <text:p text:style-name="P1"><text:span text:style-name="T1">Basic Architectures</text:span></text:p>
          </draw:text-box>
        </draw:frame>
        <draw:frame draw:name="Google Shape;55;p13" presentation:style-name="pr2" draw:text-style-name="P3" draw:layer="layout" svg:width="47.336cm" svg:height="4.402cm" svg:x="1.732cm" svg:y="15.745cm" presentation:class="subtitle" presentation:user-transformed="true">
          <draw:text-box>
            <text:p text:style-name="P1"><text:span text:style-name="T2">The building blocks for complex system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TITLE_5f_AND_5f_BODY" presentation:presentation-page-layout-name="AL2T1">
        <draw:frame draw:name="Google Shape;60;p14" presentation:style-name="pr4" draw:text-style-name="P7" draw:layer="layout" svg:width="47.336cm" svg:height="19.016cm" svg:x="1.732cm" svg:y="6.804cm" presentation:class="outline" presentation:user-transformed="true">
          <draw:text-box>
            <text:list text:style-name="L3">
              <text:list-item>
                <text:p text:style-name="P5"><text:span text:style-name="T3">Monolith</text:span><text:span text:style-name="T4"> – a cohesive codebase.</text:span></text:p>
              </text:list-item>
              <text:list-item>
                <text:p text:style-name="P5"><text:span text:style-name="T3">Shards</text:span><text:span text:style-name="T4"> – multiple instances of a (sub)system.</text:span></text:p>
              </text:list-item>
              <text:list-item>
                <text:p text:style-name="P5"><text:span text:style-name="T3">Layers</text:span><text:span text:style-name="T4"> – subdivision by the level of abstractness.</text:span></text:p>
              </text:list-item>
              <text:list-item>
                <text:p text:style-name="P5"><text:span text:style-name="T3">Services</text:span><text:span text:style-name="T4"> – components, dedicated to subdomains.</text:span></text:p>
              </text:list-item>
              <text:list-item>
                <text:p text:style-name="P5"><text:span text:style-name="T3">Pipeline</text:span><text:span text:style-name="T4"> – a chain of data processing steps.</text:span></text:p>
              </text:list-item>
            </text:list>
            <text:p text:style-name="P6"><text:span text:style-name="T5">… </text:span><text:span text:style-name="T5">and common variants of each of the architectures.</text:span></text:p>
          </draw:text-box>
        </draw:frame>
        <draw:frame draw:name="Google Shape;61;p14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Contents</text:span></text:p>
          </draw:text-box>
        </draw:frame>
        <presentation:notes draw:style-name="dp2">
          <draw:page-thumbnail draw:name="Google Shape;57;g36fa2bd9aed_0_190:notes" draw:style-name="gr1" draw:layer="layout" svg:width="16.932cm" svg:height="9.524cm" svg:x="1.059cm" svg:y="1.905cm" draw:page-number="2" presentation:class="page"/>
          <draw:frame draw:name="Google Shape;58;g36fa2bd9aed_0_19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bit of background" draw:style-name="dp1" draw:master-page-name="TITLE_5f_AND_5f_BODY" presentation:presentation-page-layout-name="AL2T1">
        <draw:frame draw:name="Google Shape;66;p15" presentation:style-name="pr4" draw:text-style-name="P7" draw:layer="layout" svg:width="25.017cm" svg:height="16.662cm" svg:x="1.732cm" svg:y="6.466cm" presentation:class="outline" presentation:user-transformed="true">
          <draw:text-box>
            <text:p text:style-name="P9"><text:span text:style-name="T7">We are comparing patterns by drawing them with common axes:</text:span></text:p>
            <text:p text:style-name="P10"><text:span text:style-name="T7">– </text:span><text:span text:style-name="T7">Abstractness</text:span></text:p>
            <text:p text:style-name="P10"><text:span text:style-name="T7">– </text:span><text:span text:style-name="T7">Subdomain</text:span></text:p>
            <text:p text:style-name="P11"><text:span text:style-name="T7">– </text:span><text:span text:style-name="T7">Sharding</text:span></text:p>
          </draw:text-box>
        </draw:frame>
        <draw:frame draw:name="Google Shape;67;p15" presentation:style-name="pr4" draw:text-style-name="P7" draw:layer="layout" svg:width="46.451cm" svg:height="4.017cm" svg:x="1.732cm" svg:y="23.129cm" presentation:class="outline" presentation:user-transformed="true">
          <draw:text-box>
            <text:p text:style-name="P12"><text:span text:style-name="T8">A basic architecture is partitioned along one of these axes </text:span></text:p>
          </draw:text-box>
        </draw:frame>
        <draw:frame draw:name="Google Shape;68;p15" draw:style-name="gr2" draw:text-style-name="P13" draw:layer="layout" svg:width="16.324cm" svg:height="15.781cm" svg:x="28.536cm" svg:y="7.347cm">
          <draw:image xlink:href="Pictures/10000201000002EF000002D67A2AEE6182D8FD5C.png" xlink:type="simple" xlink:show="embed" xlink:actuate="onLoad">
            <text:p/>
          </draw:image>
        </draw:frame>
        <draw:frame draw:name="Google Shape;69;p15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A bit of background</text:span></text:p>
          </draw:text-box>
        </draw:frame>
        <presentation:notes draw:style-name="dp2">
          <draw:page-thumbnail draw:name="Google Shape;63;g39ecdd5df51_0_0:notes" draw:style-name="gr1" draw:layer="layout" svg:width="16.932cm" svg:height="9.524cm" svg:x="1.059cm" svg:y="1.905cm" draw:page-number="3" presentation:class="page"/>
          <draw:frame draw:name="Google Shape;64;g39ecdd5df51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Anonymous</dc:creator>
          <dc:date>2025-12-06T13:19:01.848000000</dc:date>
          <text:p>Maybe "Basic architectures are partitioned along these axes"</text:p>
        </officeooo:annotation>
        <officeooo:annotation svg:x="26.978cm" svg:y="0cm">
          <dc:creator>Denys Poltorak</dc:creator>
          <dc:date>2025-12-06T13:14:50.602000000</dc:date>
          <text:p>"Each basic architecture is partitioned along one of these axes" is too long for the presentation.</text:p>
          <text:p/>
          <text:p>Just "along these axes" misses the point that partitioning along two axes simultaneously results in an advanced architecture.</text:p>
        </officeooo:annotation>
        <officeooo:annotation svg:x="26.978cm" svg:y="0cm">
          <dc:creator>Denys Poltorak</dc:creator>
          <dc:date>2025-12-06T13:19:01.848000000</dc:date>
          <text:p>Maybe "A basic architecture is partitioned along one of these axes"?</text:p>
        </officeooo:annotation>
      </draw:page>
      <draw:page draw:name="Monolith" draw:style-name="dp1" draw:master-page-name="SECTION_5f_HEADER">
        <draw:frame draw:name="Google Shape;74;p16" presentation:style-name="pr8" draw:text-style-name="P14" draw:layer="layout" svg:width="47.336cm" svg:height="4.676cm" svg:x="1.732cm" svg:y="9.611cm" presentation:class="title" presentation:user-transformed="true">
          <draw:text-box>
            <text:p text:style-name="P1"><text:span text:style-name="T9">Monolith</text:span></text:p>
          </draw:text-box>
        </draw:frame>
        <draw:frame draw:name="Google Shape;75;p16" presentation:style-name="pr9" draw:text-style-name="P15" draw:layer="layout" svg:width="47.336cm" svg:height="4.402cm" svg:x="1.732cm" svg:y="14.288cm" presentation:class="subtitle" presentation:user-transformed="true">
          <draw:text-box>
            <text:p text:style-name="P12"><text:span text:style-name="T10">A cohesive (sub-)system</text:span></text:p>
          </draw:text-box>
        </draw:frame>
        <presentation:notes draw:style-name="dp2">
          <draw:page-thumbnail draw:name="Google Shape;71;g3ace7d219c8_0_0:notes" draw:style-name="gr1" draw:layer="layout" svg:width="16.932cm" svg:height="9.524cm" svg:x="1.059cm" svg:y="1.905cm" draw:page-number="4" presentation:class="page"/>
          <draw:frame draw:name="Google Shape;72;g3ace7d219c8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overview" draw:style-name="dp1" draw:master-page-name="TITLE_5f_AND_5f_BODY" presentation:presentation-page-layout-name="AL2T1">
        <draw:frame draw:name="Google Shape;80;p17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onolith – overview</text:span></text:p>
          </draw:text-box>
        </draw:frame>
        <draw:frame draw:name="Google Shape;81;p17" presentation:style-name="pr11" draw:text-style-name="P7" draw:layer="layout" svg:width="32.939cm" svg:height="13.807cm" svg:x="16.129cm" svg:y="6.403cm" presentation:class="outline" presentation:user-transformed="true">
          <draw:text-box>
            <text:p text:style-name="P16"><text:span text:style-name="T11">A </text:span><text:span text:style-name="T12">Monolith</text:span><text:span text:style-name="T11"> (“single stone”) is a cohesive (sub-)system.</text:span></text:p>
            <text:list text:style-name="L11">
              <text:list-item>
                <text:p text:style-name="P17"><text:span text:style-name="T11">In a strict sense, it cannot be subdivided.</text:span></text:p>
              </text:list-item>
              <text:list-item>
                <text:p text:style-name="P16"><text:span text:style-name="T11">In a loose sense, we don’t want to look inside it.</text:span></text:p>
              </text:list-item>
            </text:list>
            <text:p text:style-name="P18"><text:span text:style-name="T11">The word “</text:span><text:span text:style-name="T12">Monolith</text:span><text:span text:style-name="T11">” has been redefined several times (the latest version being “a single unit of deployment”) but we’ll stick to its original meaning.</text:span></text:p>
          </draw:text-box>
        </draw:frame>
        <draw:frame draw:name="Google Shape;82;p17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9"><text:span text:style-name="T13">Monolith</text:span><text:span text:style-name="T14"> is good for quickly coding a tiny one-off project.</text:span></text:p>
            <text:p text:style-name="P20"><text:span text:style-name="T15">Anything larger or longer-living will be difficult to support.</text:span></text:p>
          </draw:text-box>
        </draw:frame>
        <draw:custom-shape draw:name="Google Shape;83;p17" draw:style-name="gr3" draw:text-style-name="P21" draw:layer="layout" svg:width="11.641cm" svg:height="4.065cm" svg:x="2.672cm" svg:y="17.271cm">
          <text:p text:style-name="P1"><text:span text:style-name="T16">Monolith, </text:span></text:p>
          <text:p text:style-name="P1"><text:span text:style-name="T16">Big Ball of M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7" draw:style-name="gr2" draw:text-style-name="P13" draw:layer="layout" svg:width="9.691cm" svg:height="9.691cm" svg:x="3.647cm" svg:y="7.347cm">
          <draw:image xlink:href="Pictures/10000201000001E6000001E6B2BCDEEB7AEC150E.png" xlink:type="simple" xlink:show="embed" xlink:actuate="onLoad">
            <text:p/>
          </draw:image>
        </draw:frame>
        <presentation:notes draw:style-name="dp2">
          <draw:page-thumbnail draw:name="Google Shape;77;g3aac8fdbe74_0_51:notes" draw:style-name="gr1" draw:layer="layout" svg:width="16.932cm" svg:height="9.524cm" svg:x="1.059cm" svg:y="1.905cm" draw:page-number="5" presentation:class="page"/>
          <draw:frame draw:name="Google Shape;78;g3aac8fdbe74_0_5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trade-offs" draw:style-name="dp1" draw:master-page-name="TITLE_5f_AND_5f_TWO_5f_COLUMNS" presentation:presentation-page-layout-name="AL3T3">
        <draw:frame draw:name="Google Shape;89;p18" presentation:style-name="pr13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onolith – trade-offs</text:span></text:p>
          </draw:text-box>
        </draw:frame>
        <draw:frame draw:name="Google Shape;90;p18" presentation:style-name="pr14" draw:text-style-name="P24" draw:layer="layout" svg:width="22.221cm" svg:height="18.122cm" svg:x="1.732cm" svg:y="6.403cm" presentation:class="outline" presentation:user-transformed="true">
          <draw:text-box>
            <text:p text:style-name="P22"><text:span text:style-name="T17">Is easy to write and debug</text:span></text:p>
            <text:p text:style-name="P17"><text:span text:style-name="T17">Allows for low latency</text:span></text:p>
            <text:p text:style-name="P22"><text:span text:style-name="T17">Permits thorough performance optimizations</text:span></text:p>
            <text:p text:style-name="P23"><text:span text:style-name="T17">Maintains a self-consistent state</text:span></text:p>
          </draw:text-box>
        </draw:frame>
        <draw:frame draw:name="Google Shape;91;p18" presentation:style-name="pr15" draw:text-style-name="P24" draw:layer="layout" svg:width="22.221cm" svg:height="18.122cm" svg:x="26.847cm" svg:y="6.403cm" presentation:class="outline" presentation:user-transformed="true">
          <draw:text-box>
            <text:p text:style-name="P22"><text:span text:style-name="T18">Is hard to read, change, and support</text:span></text:p>
            <text:p text:style-name="P17"><text:span text:style-name="T18">Does not scale</text:span></text:p>
            <text:p text:style-name="P22"><text:span text:style-name="T18">Is not fault tolerant</text:span></text:p>
            <text:p text:style-name="P22"><text:span text:style-name="T18">Is developed by a single team</text:span></text:p>
            <text:p text:style-name="P22"><text:span text:style-name="T18">Is limited to one technology and style</text:span></text:p>
            <text:p text:style-name="P23"><text:span text:style-name="T18">Aligns with a single set of forces</text:span></text:p>
          </draw:text-box>
        </draw:frame>
        <presentation:notes draw:style-name="dp2">
          <draw:page-thumbnail draw:name="Google Shape;86;g3aac8fdbe74_0_56:notes" draw:style-name="gr1" draw:layer="layout" svg:width="16.932cm" svg:height="9.524cm" svg:x="1.059cm" svg:y="1.905cm" draw:page-number="6" presentation:class="page"/>
          <draw:frame draw:name="Google Shape;87;g3aac8fdbe74_0_5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misnomers" draw:style-name="dp1" draw:master-page-name="TITLE_5f_AND_5f_TWO_5f_COLUMNS" presentation:presentation-page-layout-name="AL3T3">
        <draw:frame draw:name="Google Shape;96;p19" presentation:style-name="pr13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onolith – misnomers</text:span></text:p>
          </draw:text-box>
        </draw:frame>
        <draw:frame draw:name="Google Shape;97;p19" draw:style-name="standard" draw:layer="layout" svg:width="41.369cm" svg:height="12.184cm" svg:x="4.715cm" svg:y="12.69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11">Name</text:span></text:p>
              </table:table-cell>
              <table:table-cell>
                <text:p text:style-name="P25"><text:span text:style-name="T11">Meaning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18">Monolithic Lambda (</text:span><text:span text:style-name="T19">Lambdalith</text:span><text:span text:style-name="T18">)</text:span></text:p>
              </table:table-cell>
              <table:table-cell>
                <text:p text:style-name="P26"><text:span text:style-name="T20">Stateless </text:span><text:span text:style-name="T16">Shards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18">Layered Monolith</text:span></text:p>
              </table:table-cell>
              <table:table-cell>
                <text:p text:style-name="P26"><text:span text:style-name="T16">Layers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18">Modular Monolith (</text:span><text:span text:style-name="T19">Modulith</text:span><text:span text:style-name="T18">)</text:span></text:p>
              </table:table-cell>
              <table:table-cell>
                <text:p text:style-name="P26"><text:span text:style-name="T20">Co-located </text:span><text:span text:style-name="T16">Services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18">Distributed Monolith</text:span></text:p>
              </table:table-cell>
              <table:table-cell>
                <text:p text:style-name="P26"><text:span text:style-name="T20">Usually </text:span><text:span text:style-name="T16">Service-Oriented Architectu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98;p19" presentation:style-name="pr17" draw:text-style-name="P24" draw:layer="layout" svg:width="27.644cm" svg:height="4.899cm" svg:x="11.578cm" svg:y="6.345cm" presentation:class="outline" presentation:user-transformed="true">
          <draw:text-box>
            <text:p text:style-name="P27"><text:span text:style-name="T4">A few non-monolithic architectures are often called “monoliths”:</text:span></text:p>
          </draw:text-box>
        </draw:frame>
        <presentation:notes draw:style-name="dp2">
          <draw:page-thumbnail draw:name="Google Shape;93;g3917cb495d8_0_0:notes" draw:style-name="gr1" draw:layer="layout" svg:width="16.932cm" svg:height="9.524cm" svg:x="1.059cm" svg:y="1.905cm" draw:page-number="7" presentation:class="page"/>
          <draw:frame draw:name="Google Shape;94;g3917cb495d8_0_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event handling" draw:style-name="dp1" draw:master-page-name="TITLE_5f_AND_5f_TWO_5f_COLUMNS" presentation:presentation-page-layout-name="AL3T3">
        <draw:frame draw:name="Google Shape;103;p20" presentation:style-name="pr13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onolith – event handling</text:span></text:p>
          </draw:text-box>
        </draw:frame>
        <draw:frame draw:name="Google Shape;104;p20" draw:style-name="standard" draw:layer="layout" svg:width="40.439cm" svg:height="19.394cm" svg:x="5.578cm" svg:y="6.285cm">
          <table:table>
            <table:table-column table:style-name="co3"/>
            <table:table-column table:style-name="co3"/>
            <table:table-column table:style-name="co3"/>
            <table:table-row table:style-name="ro2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19"><text:span text:style-name="T21">A blocking thread per request</text:span></text:p>
              </table:table-cell>
              <table:table-cell>
                <text:p text:style-name="P19"><text:span text:style-name="T21">A single non-blocking thread processes all events</text:span></text:p>
              </table:table-cell>
              <table:table-cell>
                <text:p text:style-name="P19"><text:span text:style-name="T21">A coroutine or fiber per reques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05;p20" draw:style-name="gr2" draw:text-style-name="P13" draw:layer="layout" svg:width="7.937cm" svg:height="14.311cm" svg:x="8.388cm" svg:y="7.131cm">
          <draw:image xlink:href="Pictures/1000020100000196000002DCE3D1144AB7C4EE55.png" xlink:type="simple" xlink:show="embed" xlink:actuate="onLoad">
            <text:p/>
          </draw:image>
        </draw:frame>
        <draw:frame draw:name="Google Shape;106;p20" draw:style-name="gr2" draw:text-style-name="P13" draw:layer="layout" svg:width="7.937cm" svg:height="14.311cm" svg:x="21.829cm" svg:y="7.131cm">
          <draw:image xlink:href="Pictures/1000020100000196000002DC2D7D1131A1CB1E2B.png" xlink:type="simple" xlink:show="embed" xlink:actuate="onLoad">
            <text:p/>
          </draw:image>
        </draw:frame>
        <draw:frame draw:name="Google Shape;107;p20" draw:style-name="gr2" draw:text-style-name="P13" draw:layer="layout" svg:width="7.937cm" svg:height="14.312cm" svg:x="35.27cm" svg:y="7.131cm">
          <draw:image xlink:href="Pictures/1000020100000196000002DCE25C1C6A415FF957.png" xlink:type="simple" xlink:show="embed" xlink:actuate="onLoad">
            <text:p/>
          </draw:image>
        </draw:frame>
        <presentation:notes draw:style-name="dp2">
          <draw:page-thumbnail draw:name="Google Shape;100;g3acb68e016c_0_0:notes" draw:style-name="gr1" draw:layer="layout" svg:width="16.932cm" svg:height="9.524cm" svg:x="1.059cm" svg:y="1.905cm" draw:page-number="8" presentation:class="page"/>
          <draw:frame draw:name="Google Shape;101;g3acb68e016c_0_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event handling" draw:style-name="dp1" draw:master-page-name="TITLE_5f_AND_5f_BODY" presentation:presentation-page-layout-name="AL2T1">
        <draw:frame draw:name="Google Shape;112;p21" draw:style-name="gr2" draw:text-style-name="P13" draw:layer="layout" svg:width="14.96cm" svg:height="12.372cm" svg:x="2.506cm" svg:y="7.231cm">
          <draw:image xlink:href="Pictures/100002010000039D000002FDD1CA37D5E217D17F.png" xlink:type="simple" xlink:show="embed" xlink:actuate="onLoad">
            <text:p/>
          </draw:image>
        </draw:frame>
        <draw:frame draw:name="Google Shape;113;p21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onolith – event handling</text:span></text:p>
          </draw:text-box>
        </draw:frame>
        <draw:frame draw:name="Google Shape;114;p21" presentation:style-name="pr11" draw:text-style-name="P7" draw:layer="layout" svg:width="31.977cm" svg:height="13.807cm" svg:x="17.092cm" svg:y="6.403cm" presentation:class="outline" presentation:user-transformed="true">
          <draw:text-box>
            <text:p text:style-name="P16"><text:span text:style-name="T11">A </text:span><text:span text:style-name="T12">Reactor</text:span><text:span text:style-name="T11"> runs each task in a blocking thread.</text:span></text:p>
            <text:list text:style-name="L11">
              <text:list-item>
                <text:p text:style-name="P17"><text:span text:style-name="T11">A backend </text:span><text:span text:style-name="T12">Reactor</text:span><text:span text:style-name="T11"> uses OS threads to execute many requests in parallel. Any shared resources must be protected with locks.</text:span></text:p>
              </text:list-item>
              <text:list-item>
                <text:p text:style-name="P16"><text:span text:style-name="T11">An embedded system may wrap a physical device with a single-threaded </text:span><text:span text:style-name="T12">Reactor</text:span><text:span text:style-name="T11"> to avoid race conditions in the hardware.</text:span></text:p>
              </text:list-item>
            </text:list>
          </draw:text-box>
        </draw:frame>
        <draw:frame draw:name="Google Shape;115;p21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9"><text:span text:style-name="T13">Reactor</text:span><text:span text:style-name="T14">’s code is simple &amp; stupid.</text:span></text:p>
            <text:p text:style-name="P20"><text:span text:style-name="T15">However, each thread takes a lot of system resources.</text:span></text:p>
          </draw:text-box>
        </draw:frame>
        <draw:custom-shape draw:name="Google Shape;116;p21" draw:style-name="gr3" draw:text-style-name="P21" draw:layer="layout" svg:width="11.641cm" svg:height="2.541cm" svg:x="3.502cm" svg:y="18.38cm">
          <text:p text:style-name="P1"><text:span text:style-name="T16">Re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3acc1a533ae_0_0:notes" draw:style-name="gr1" draw:layer="layout" svg:width="16.932cm" svg:height="9.524cm" svg:x="1.059cm" svg:y="1.905cm" draw:page-number="9" presentation:class="page"/>
          <draw:frame draw:name="Google Shape;110;g3acc1a533ae_0_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event handling" draw:style-name="dp1" draw:master-page-name="TITLE_5f_AND_5f_BODY" presentation:presentation-page-layout-name="AL2T1">
        <draw:frame draw:name="Google Shape;121;p22" draw:style-name="gr2" draw:text-style-name="P13" draw:layer="layout" svg:width="14.915cm" svg:height="12.335cm" svg:x="2.539cm" svg:y="7.238cm">
          <draw:image xlink:href="Pictures/100002010000039D000002FD3AE4381D72FD9B15.png" xlink:type="simple" xlink:show="embed" xlink:actuate="onLoad">
            <text:p/>
          </draw:image>
        </draw:frame>
        <draw:frame draw:name="Google Shape;122;p22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onolith – event handling</text:span></text:p>
          </draw:text-box>
        </draw:frame>
        <draw:frame draw:name="Google Shape;123;p22" presentation:style-name="pr11" draw:text-style-name="P7" draw:layer="layout" svg:width="31.977cm" svg:height="13.807cm" svg:x="17.092cm" svg:y="6.403cm" presentation:class="outline" presentation:user-transformed="true">
          <draw:text-box>
            <text:p text:style-name="P16"><text:span text:style-name="T11">A </text:span><text:span text:style-name="T12">Proactor</text:span><text:span text:style-name="T11"> handles everything with a single non-blocking thread.</text:span></text:p>
            <text:p text:style-name="P18"><text:span text:style-name="T11">There is no need for locks and no associated delays, therefore the system reacts to events in real time and its state is always up-to-date.</text:span></text:p>
          </draw:text-box>
        </draw:frame>
        <draw:frame draw:name="Google Shape;124;p22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9"><text:span text:style-name="T13">Proactor</text:span><text:span text:style-name="T14"> fits real-time control systems.</text:span></text:p>
            <text:p text:style-name="P20"><text:span text:style-name="T15">Sadly, its logic is dispersed over many event handlers.</text:span></text:p>
          </draw:text-box>
        </draw:frame>
        <draw:custom-shape draw:name="Google Shape;125;p22" draw:style-name="gr3" draw:text-style-name="P21" draw:layer="layout" svg:width="11.641cm" svg:height="2.541cm" svg:x="3.303cm" svg:y="18.28cm">
          <text:p text:style-name="P1"><text:span text:style-name="T16">Pro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3acdfc7e991_0_1:notes" draw:style-name="gr1" draw:layer="layout" svg:width="16.932cm" svg:height="9.524cm" svg:x="1.059cm" svg:y="1.905cm" draw:page-number="10" presentation:class="page"/>
          <draw:frame draw:name="Google Shape;119;g3acdfc7e991_0_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 – event handling" draw:style-name="dp1" draw:master-page-name="TITLE_5f_AND_5f_BODY" presentation:presentation-page-layout-name="AL2T1">
        <draw:frame draw:name="Google Shape;130;p23" draw:style-name="gr2" draw:text-style-name="P13" draw:layer="layout" svg:width="15.068cm" svg:height="13.633cm" svg:x="2.307cm" svg:y="7.175cm">
          <draw:image xlink:href="Pictures/10000201000003A60000034D084555380552E2C2.png" xlink:type="simple" xlink:show="embed" xlink:actuate="onLoad">
            <text:p/>
          </draw:image>
        </draw:frame>
        <draw:frame draw:name="Google Shape;131;p23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Monolith – event handling</text:span></text:p>
          </draw:text-box>
        </draw:frame>
        <draw:frame draw:name="Google Shape;132;p23" presentation:style-name="pr11" draw:text-style-name="P7" draw:layer="layout" svg:width="31.977cm" svg:height="13.807cm" svg:x="17.092cm" svg:y="6.403cm" presentation:class="outline" presentation:user-transformed="true">
          <draw:text-box>
            <text:p text:style-name="P16"><text:span text:style-name="T11">A </text:span><text:span text:style-name="T12">Half-Sync / Half-Async</text:span><text:span text:style-name="T11"> system allocates a blocking coroutine for each task. All the coroutines run in the same thread or thread pool.</text:span></text:p>
            <text:list text:style-name="L11">
              <text:list-item>
                <text:p text:style-name="P17"><text:span text:style-name="T11">The upper half of the system is like a </text:span><text:span text:style-name="T12">Reactor</text:span><text:span text:style-name="T11">.</text:span></text:p>
              </text:list-item>
              <text:list-item>
                <text:p text:style-name="P16"><text:span text:style-name="T11">The lower half is a </text:span><text:span text:style-name="T12">Proactor</text:span><text:span text:style-name="T11">.</text:span></text:p>
              </text:list-item>
            </text:list>
          </draw:text-box>
        </draw:frame>
        <draw:frame draw:name="Google Shape;133;p23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9"><text:span text:style-name="T14">The code of each coroutine is simple.</text:span></text:p>
            <text:p text:style-name="P20"><text:span text:style-name="T15">But the underlying framework is complex.</text:span></text:p>
          </draw:text-box>
        </draw:frame>
        <draw:custom-shape draw:name="Google Shape;134;p23" draw:style-name="gr3" draw:text-style-name="P21" draw:layer="layout" svg:width="7.516cm" svg:height="4.065cm" svg:x="2.307cm" svg:y="19.176cm">
          <text:p text:style-name="P1"><text:span text:style-name="T16">Half-Sync / </text:span></text:p>
          <text:p text:style-name="P1"><text:span text:style-name="T16">Half-Asy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3acdfc7e991_0_9:notes" draw:style-name="gr1" draw:layer="layout" svg:width="16.932cm" svg:height="9.524cm" svg:x="1.059cm" svg:y="1.905cm" draw:page-number="11" presentation:class="page"/>
          <draw:frame draw:name="Google Shape;128;g3acdfc7e991_0_9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" draw:style-name="dp1" draw:master-page-name="SECTION_5f_HEADER">
        <draw:frame draw:name="Google Shape;139;p24" presentation:style-name="pr8" draw:text-style-name="P14" draw:layer="layout" svg:width="47.336cm" svg:height="4.676cm" svg:x="1.732cm" svg:y="9.611cm" presentation:class="title" presentation:user-transformed="true">
          <draw:text-box>
            <text:p text:style-name="P1"><text:span text:style-name="T9">Shards</text:span></text:p>
          </draw:text-box>
        </draw:frame>
        <draw:frame draw:name="Google Shape;140;p24" presentation:style-name="pr9" draw:text-style-name="P15" draw:layer="layout" svg:width="47.336cm" svg:height="4.402cm" svg:x="1.732cm" svg:y="14.288cm" presentation:class="subtitle" presentation:user-transformed="true">
          <draw:text-box>
            <text:p text:style-name="P12"><text:span text:style-name="T10">Multiple instances of a (sub-)system</text:span></text:p>
          </draw:text-box>
        </draw:frame>
        <presentation:notes draw:style-name="dp2">
          <draw:page-thumbnail draw:name="Google Shape;136;g3ace7d219c8_0_8:notes" draw:style-name="gr1" draw:layer="layout" svg:width="16.932cm" svg:height="9.524cm" svg:x="1.059cm" svg:y="1.905cm" draw:page-number="12" presentation:class="page"/>
          <draw:frame draw:name="Google Shape;137;g3ace7d219c8_0_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overview" draw:style-name="dp1" draw:master-page-name="TITLE_5f_AND_5f_BODY" presentation:presentation-page-layout-name="AL2T1">
        <draw:frame draw:name="Google Shape;145;p25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hards – overview</text:span></text:p>
          </draw:text-box>
        </draw:frame>
        <draw:frame draw:name="Google Shape;146;p25" presentation:style-name="pr11" draw:text-style-name="P7" draw:layer="layout" svg:width="30.781cm" svg:height="13.807cm" svg:x="18.287cm" svg:y="6.403cm" presentation:class="outline" presentation:user-transformed="true">
          <draw:text-box>
            <text:p text:style-name="P16"><text:span text:style-name="T12">Shards</text:span><text:span text:style-name="T11"> are multiple instances of a component.</text:span></text:p>
            <text:p text:style-name="P17"><text:span text:style-name="T11">They may or may not differ in their data.</text:span></text:p>
            <text:p text:style-name="P18"><text:span text:style-name="T11">In most systems shards don’t intercommunicate directly.</text:span></text:p>
          </draw:text-box>
        </draw:frame>
        <draw:frame draw:name="Google Shape;147;p25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9"><text:span text:style-name="T13">Shards</text:span><text:span text:style-name="T14"> provide scalability and fault tolerance…</text:span></text:p>
            <text:p text:style-name="P20"><text:span text:style-name="T15">…</text:span><text:span text:style-name="T15">as long as there is no shared data.</text:span></text:p>
          </draw:text-box>
        </draw:frame>
        <draw:custom-shape draw:name="Google Shape;148;p25" draw:style-name="gr3" draw:text-style-name="P21" draw:layer="layout" svg:width="11.641cm" svg:height="4.065cm" svg:x="2.853cm" svg:y="16.45cm">
          <text:p text:style-name="P1"><text:span text:style-name="T16">Shards, Instances, </text:span></text:p>
          <text:p text:style-name="P1"><text:span text:style-name="T16">Repl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25" draw:style-name="gr2" draw:text-style-name="P13" draw:layer="layout" svg:width="11.405cm" svg:height="9.691cm" svg:x="3.834cm" svg:y="6.501cm">
          <draw:image xlink:href="Pictures/100002010000023C000001E678FE7365EF2F0A36.png" xlink:type="simple" xlink:show="embed" xlink:actuate="onLoad">
            <text:p/>
          </draw:image>
        </draw:frame>
        <presentation:notes draw:style-name="dp2">
          <draw:page-thumbnail draw:name="Google Shape;142;g3acdfc7e991_0_20:notes" draw:style-name="gr1" draw:layer="layout" svg:width="16.932cm" svg:height="9.524cm" svg:x="1.059cm" svg:y="1.905cm" draw:page-number="13" presentation:class="page"/>
          <draw:frame draw:name="Google Shape;143;g3acdfc7e991_0_2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trade-offs" draw:style-name="dp1" draw:master-page-name="TITLE_5f_AND_5f_TWO_5f_COLUMNS" presentation:presentation-page-layout-name="AL3T3">
        <draw:frame draw:name="Google Shape;154;p26" presentation:style-name="pr13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hards – trade-offs</text:span></text:p>
          </draw:text-box>
        </draw:frame>
        <draw:frame draw:name="Google Shape;155;p26" presentation:style-name="pr14" draw:text-style-name="P24" draw:layer="layout" svg:width="22.221cm" svg:height="18.122cm" svg:x="1.732cm" svg:y="6.403cm" presentation:class="outline" presentation:user-transformed="true">
          <draw:text-box>
            <text:p text:style-name="P22"><text:span text:style-name="T17">The (sub-)system becomes scalable</text:span></text:p>
            <text:p text:style-name="P18"><text:span text:style-name="T17">Sharding may be used to improve latency and / or fault tolerance</text:span></text:p>
          </draw:text-box>
        </draw:frame>
        <draw:frame draw:name="Google Shape;156;p26" presentation:style-name="pr15" draw:text-style-name="P24" draw:layer="layout" svg:width="22.221cm" svg:height="18.122cm" svg:x="26.847cm" svg:y="6.403cm" presentation:class="outline" presentation:user-transformed="true">
          <draw:text-box>
            <text:p text:style-name="P22"><text:span text:style-name="T18">It is hard to achieve state consistency </text:span></text:p>
            <text:p text:style-name="P18"><text:span text:style-name="T18">There is an operational effort to deploy or update the shards </text:span></text:p>
          </draw:text-box>
        </draw:frame>
        <presentation:notes draw:style-name="dp2">
          <draw:page-thumbnail draw:name="Google Shape;151;g3acdfc7e991_0_28:notes" draw:style-name="gr1" draw:layer="layout" svg:width="16.932cm" svg:height="9.524cm" svg:x="1.059cm" svg:y="1.905cm" draw:page-number="14" presentation:class="page"/>
          <draw:frame draw:name="Google Shape;152;g3acdfc7e991_0_28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isolation" draw:style-name="dp1" draw:master-page-name="TITLE_5f_AND_5f_TWO_5f_COLUMNS" presentation:presentation-page-layout-name="AL3T3">
        <draw:frame draw:name="Google Shape;161;p27" presentation:style-name="pr13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hards – isolation</text:span></text:p>
          </draw:text-box>
        </draw:frame>
        <draw:frame draw:name="Google Shape;162;p27" draw:style-name="standard" draw:layer="layout" svg:width="43.5cm" svg:height="13.297cm" svg:x="3.649cm" svg:y="7.331cm">
          <table:table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5"><text:span text:style-name="T11">Isolation</text:span></text:p>
              </table:table-cell>
              <table:table-cell>
                <text:p text:style-name="P25"><text:span text:style-name="T11">Benefits</text:span></text:p>
              </table:table-cell>
              <table:table-cell>
                <text:p text:style-name="P25"><text:span text:style-name="T11">Drawbacks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20">A thread per shard</text:span></text:p>
              </table:table-cell>
              <table:table-cell>
                <text:p text:style-name="P26"><text:span text:style-name="T17">Limited scalability</text:span></text:p>
              </table:table-cell>
              <table:table-cell>
                <text:p text:style-name="P26"><text:span text:style-name="T18">Shared data needs locks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20">A process per shard</text:span></text:p>
              </table:table-cell>
              <table:table-cell>
                <text:p text:style-name="P26"><text:span text:style-name="T17">Software fault tolerance</text:span></text:p>
              </table:table-cell>
              <table:table-cell>
                <text:p text:style-name="P26"><text:span text:style-name="T18">Sharing data is non-trivial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0">A server per shard</text:span></text:p>
              </table:table-cell>
              <table:table-cell>
                <text:p text:style-name="P26"><text:span text:style-name="T17">Full scalability and fault tolerance</text:span></text:p>
              </table:table-cell>
              <table:table-cell>
                <text:p text:style-name="P26"><text:span text:style-name="T18">Sharing data is impossible</text:span></text:p>
                <text:p text:style-name="P26"><text:span text:style-name="T18">State synchronization is complicate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158;g3ad2927f46e_0_0:notes" draw:style-name="gr1" draw:layer="layout" svg:width="16.932cm" svg:height="9.524cm" svg:x="1.059cm" svg:y="1.905cm" draw:page-number="15" presentation:class="page"/>
          <draw:frame draw:name="Google Shape;159;g3ad2927f46e_0_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state" draw:style-name="dp1" draw:master-page-name="TITLE_5f_AND_5f_BODY" presentation:presentation-page-layout-name="AL2T1">
        <draw:frame draw:name="Google Shape;167;p28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hards – state</text:span></text:p>
          </draw:text-box>
        </draw:frame>
        <draw:frame draw:name="Google Shape;168;p28" presentation:style-name="pr11" draw:text-style-name="P7" draw:layer="layout" svg:width="34.102cm" svg:height="14.556cm" svg:x="14.968cm" svg:y="5.654cm" presentation:class="outline" presentation:user-transformed="true">
          <draw:text-box>
            <text:p text:style-name="P16"><text:span text:style-name="T11">Each </text:span><text:span text:style-name="T12">partition</text:span><text:span text:style-name="T11"> owns a slice of the system’s data.</text:span></text:p>
            <text:p text:style-name="P17"><text:span text:style-name="T11">A client’s access is usually limited to one </text:span><text:span text:style-name="T12">partition</text:span><text:span text:style-name="T11">.</text:span></text:p>
            <text:p text:style-name="P18"><text:span text:style-name="T11">A </text:span><text:span text:style-name="T12">Sharding Proxy</text:span><text:span text:style-name="T11"> connects clients to their </text:span><text:span text:style-name="T12">partitions</text:span><text:span text:style-name="T11">.</text:span></text:p>
          </draw:text-box>
        </draw:frame>
        <draw:frame draw:name="Google Shape;169;p28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9"><text:span text:style-name="T13">Partitioning</text:span><text:span text:style-name="T14"> scales the data storage.</text:span></text:p>
            <text:p text:style-name="P20"><text:span text:style-name="T15">No data can be shared among the system’s clients.</text:span></text:p>
          </draw:text-box>
        </draw:frame>
        <draw:custom-shape draw:name="Google Shape;170;p28" draw:style-name="gr3" draw:text-style-name="P21" draw:layer="layout" svg:width="11.641cm" svg:height="2.541cm" svg:x="2.65cm" svg:y="19.206cm">
          <text:p text:style-name="P1"><text:span text:style-name="T16">Shards, Parti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8" draw:style-name="gr2" draw:text-style-name="P13" draw:layer="layout" svg:width="8.109cm" svg:height="12.782cm" svg:x="4.416cm" svg:y="6.423cm">
          <draw:image xlink:href="Pictures/10000201000001E6000002FED1936FF41FF9508C.png" xlink:type="simple" xlink:show="embed" xlink:actuate="onLoad">
            <text:p/>
          </draw:image>
        </draw:frame>
        <presentation:notes draw:style-name="dp2">
          <draw:page-thumbnail draw:name="Google Shape;164;g3ad2927f46e_0_7:notes" draw:style-name="gr1" draw:layer="layout" svg:width="16.932cm" svg:height="9.524cm" svg:x="1.059cm" svg:y="1.905cm" draw:page-number="16" presentation:class="page"/>
          <draw:frame draw:name="Google Shape;165;g3ad2927f46e_0_7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state" draw:style-name="dp1" draw:master-page-name="TITLE_5f_AND_5f_BODY" presentation:presentation-page-layout-name="AL2T1">
        <draw:frame draw:name="Google Shape;176;p29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hards – state</text:span></text:p>
          </draw:text-box>
        </draw:frame>
        <draw:frame draw:name="Google Shape;177;p29" presentation:style-name="pr11" draw:text-style-name="P7" draw:layer="layout" svg:width="34.076cm" svg:height="15.489cm" svg:x="14.993cm" svg:y="5.654cm" presentation:class="outline" presentation:user-transformed="true">
          <draw:text-box>
            <text:p text:style-name="P16"><text:span text:style-name="T11">Each </text:span><text:span text:style-name="T12">replica</text:span><text:span text:style-name="T11"> has a copy of the whole system’s data.</text:span></text:p>
            <text:p text:style-name="P17"><text:span text:style-name="T11">A </text:span><text:span text:style-name="T12">Load Balancer</text:span><text:span text:style-name="T11"> connects new clients to idle </text:span><text:span text:style-name="T12">replicas</text:span><text:span text:style-name="T11">.</text:span></text:p>
            <text:p text:style-name="P17"><text:span text:style-name="T11">The </text:span><text:span text:style-name="T12">replicas</text:span><text:span text:style-name="T11"> need to keep their data in sync:</text:span></text:p>
            <text:list text:style-name="L11">
              <text:list-item>
                <text:p text:style-name="P17"><text:span text:style-name="T11">There may be a </text:span><text:span text:style-name="T12">leader</text:span><text:span text:style-name="T11"> which processes all write requests and broadcasts the changes to the </text:span><text:span text:style-name="T12">followers</text:span><text:span text:style-name="T11">.</text:span></text:p>
              </text:list-item>
              <text:list-item>
                <text:p text:style-name="P16"><text:span text:style-name="T11">Or the data to be changed must be locked in all the </text:span><text:span text:style-name="T12">replicas</text:span><text:span text:style-name="T11"> to avoid write conflicts.</text:span></text:p>
              </text:list-item>
            </text:list>
          </draw:text-box>
        </draw:frame>
        <draw:frame draw:name="Google Shape;178;p29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9"><text:span text:style-name="T13">Replication</text:span><text:span text:style-name="T14"> improves fault tolerance and read performance.</text:span></text:p>
            <text:p text:style-name="P20"><text:span text:style-name="T15">But it is costly and complicates write access to the data.</text:span></text:p>
          </draw:text-box>
        </draw:frame>
        <draw:custom-shape draw:name="Google Shape;179;p29" draw:style-name="gr3" draw:text-style-name="P21" draw:layer="layout" svg:width="11.641cm" svg:height="2.541cm" svg:x="2.514cm" svg:y="19.206cm">
          <text:p text:style-name="P1"><text:span text:style-name="T16">Repl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9" draw:style-name="gr2" draw:text-style-name="P13" draw:layer="layout" svg:width="8.861cm" svg:height="12.759cm" svg:x="4.411cm" svg:y="6.446cm">
          <draw:image xlink:href="Pictures/1000020100000214000002FE3D611CAE9D0F79F2.png" xlink:type="simple" xlink:show="embed" xlink:actuate="onLoad">
            <text:p/>
          </draw:image>
        </draw:frame>
        <presentation:notes draw:style-name="dp2">
          <draw:page-thumbnail draw:name="Google Shape;173;g3ad2927f46e_0_32:notes" draw:style-name="gr1" draw:layer="layout" svg:width="16.932cm" svg:height="9.524cm" svg:x="1.059cm" svg:y="1.905cm" draw:page-number="17" presentation:class="page"/>
          <draw:frame draw:name="Google Shape;174;g3ad2927f46e_0_32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state" draw:style-name="dp1" draw:master-page-name="TITLE_5f_AND_5f_BODY" presentation:presentation-page-layout-name="AL2T1">
        <draw:frame draw:name="Google Shape;185;p30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hards – state</text:span></text:p>
          </draw:text-box>
        </draw:frame>
        <draw:frame draw:name="Google Shape;186;p30" presentation:style-name="pr11" draw:text-style-name="P7" draw:layer="layout" svg:width="34.566cm" svg:height="15.489cm" svg:x="14.503cm" svg:y="5.654cm" presentation:class="outline" presentation:user-transformed="true">
          <draw:text-box>
            <text:p text:style-name="P16"><text:span text:style-name="T11">System </text:span><text:span text:style-name="T12">instances</text:span><text:span text:style-name="T11"> may be stateless.</text:span></text:p>
            <text:p text:style-name="P17"><text:span text:style-name="T11">That requires both a </text:span><text:span text:style-name="T12">Load Balancer</text:span><text:span text:style-name="T11"> to choose an </text:span><text:span text:style-name="T12">instance</text:span><text:span text:style-name="T11"> from the </text:span><text:span text:style-name="T12">pool</text:span><text:span text:style-name="T11"> and a </text:span><text:span text:style-name="T12">Shared Repository</text:span><text:span text:style-name="T11"> to persist the data.</text:span></text:p>
            <text:p text:style-name="P17"><text:span text:style-name="T11">The </text:span><text:span text:style-name="T12">Shared Repository</text:span><text:span text:style-name="T11"> (database or file storage) may become the single point of failure and performance bottleneck.</text:span></text:p>
            <text:p text:style-name="P18"><text:span text:style-name="T11">The number of instances in the </text:span><text:span text:style-name="T12">pool</text:span><text:span text:style-name="T11"> may be fixed or elastic.</text:span></text:p>
          </draw:text-box>
        </draw:frame>
        <draw:frame draw:name="Google Shape;187;p30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9"><text:span text:style-name="T13">Stateless instances</text:span><text:span text:style-name="T14"> are perfectly scalable and fault tolerant</text:span><text:span text:style-name="T13">.</text:span></text:p>
            <text:p text:style-name="P20"><text:span text:style-name="T15">But now the </text:span><text:span text:style-name="T22">Shared Repository</text:span><text:span text:style-name="T15"> becomes the bottleneck.</text:span></text:p>
          </draw:text-box>
        </draw:frame>
        <draw:custom-shape draw:name="Google Shape;188;p30" draw:style-name="gr3" draw:text-style-name="P21" draw:layer="layout" svg:width="12.727cm" svg:height="2.541cm" svg:x="1.543cm" svg:y="19.074cm">
          <text:p text:style-name="P1"><text:span text:style-name="T16">Instances, Lamb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30" draw:style-name="gr2" draw:text-style-name="P13" draw:layer="layout" svg:width="8.123cm" svg:height="12.803cm" svg:x="4.379cm" svg:y="6.403cm">
          <draw:image xlink:href="Pictures/10000201000001E6000002FE2F6D567D1BBAF2AD.png" xlink:type="simple" xlink:show="embed" xlink:actuate="onLoad">
            <text:p/>
          </draw:image>
        </draw:frame>
        <presentation:notes draw:style-name="dp2">
          <draw:page-thumbnail draw:name="Google Shape;182;g3ad2927f46e_0_24:notes" draw:style-name="gr1" draw:layer="layout" svg:width="16.932cm" svg:height="9.524cm" svg:x="1.059cm" svg:y="1.905cm" draw:page-number="18" presentation:class="page"/>
          <draw:frame draw:name="Google Shape;183;g3ad2927f46e_0_24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ds – state" draw:style-name="dp1" draw:master-page-name="TITLE_5f_AND_5f_BODY" presentation:presentation-page-layout-name="AL2T1">
        <draw:frame draw:name="Google Shape;194;p31" draw:style-name="gr2" draw:text-style-name="P13" draw:layer="layout" svg:width="8.565cm" svg:height="12.802cm" svg:x="4.746cm" svg:y="6.403cm">
          <draw:image xlink:href="Pictures/10000201000002360000034E5F63497929F237FB.png" xlink:type="simple" xlink:show="embed" xlink:actuate="onLoad">
            <text:p/>
          </draw:image>
        </draw:frame>
        <draw:frame draw:name="Google Shape;195;p31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hards – state</text:span></text:p>
          </draw:text-box>
        </draw:frame>
        <draw:frame draw:name="Google Shape;196;p31" presentation:style-name="pr11" draw:text-style-name="P7" draw:layer="layout" svg:width="31.977cm" svg:height="13.807cm" svg:x="17.092cm" svg:y="6.403cm" presentation:class="outline" presentation:user-transformed="true">
          <draw:text-box>
            <text:p text:style-name="P16"><text:span text:style-name="T11">A stateful instance of a component can be created for each client.</text:span></text:p>
            <text:p text:style-name="P17"><text:span text:style-name="T11">Such an </text:span><text:span text:style-name="T12">Actor</text:span><text:span text:style-name="T11"> keeps the client’s data readily available in its memory and acts on behalf of its client.</text:span></text:p>
            <text:p text:style-name="P18"><text:span text:style-name="T11">The changes to </text:span><text:span text:style-name="T12">Actors’</text:span><text:span text:style-name="T11"> states are persisted to a database.</text:span></text:p>
          </draw:text-box>
        </draw:frame>
        <draw:frame draw:name="Google Shape;197;p31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9"><text:span text:style-name="T14">Actors grant low request latency and fault isolation between clients.</text:span></text:p>
            <text:p text:style-name="P20"><text:span text:style-name="T15">Complex logic that involves multiple clients is impossible.</text:span></text:p>
          </draw:text-box>
        </draw:frame>
        <draw:custom-shape draw:name="Google Shape;198;p31" draw:style-name="gr3" draw:text-style-name="P21" draw:layer="layout" svg:width="7.466cm" svg:height="2.541cm" svg:x="5.296cm" svg:y="18.977cm">
          <text:p text:style-name="P1"><text:span text:style-name="T16">Ac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3ad2927f46e_0_16:notes" draw:style-name="gr1" draw:layer="layout" svg:width="16.932cm" svg:height="9.524cm" svg:x="1.059cm" svg:y="1.905cm" draw:page-number="19" presentation:class="page"/>
          <draw:frame draw:name="Google Shape;192;g3ad2927f46e_0_16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" draw:style-name="dp1" draw:master-page-name="SECTION_5f_HEADER">
        <draw:frame draw:name="Google Shape;203;p32" presentation:style-name="pr8" draw:text-style-name="P14" draw:layer="layout" svg:width="47.336cm" svg:height="4.676cm" svg:x="1.732cm" svg:y="9.611cm" presentation:class="title" presentation:user-transformed="true">
          <draw:text-box>
            <text:p text:style-name="P1"><text:span text:style-name="T9">Layers</text:span></text:p>
          </draw:text-box>
        </draw:frame>
        <draw:frame draw:name="Google Shape;204;p32" presentation:style-name="pr9" draw:text-style-name="P15" draw:layer="layout" svg:width="47.336cm" svg:height="4.402cm" svg:x="1.732cm" svg:y="14.288cm" presentation:class="subtitle" presentation:user-transformed="true">
          <draw:text-box>
            <text:p text:style-name="P12"><text:span text:style-name="T10">Components that differ in abstractness</text:span></text:p>
          </draw:text-box>
        </draw:frame>
        <presentation:notes draw:style-name="dp2">
          <draw:page-thumbnail draw:name="Google Shape;200;g3ad3d35e571_0_0:notes" draw:style-name="gr1" draw:layer="layout" svg:width="16.932cm" svg:height="9.524cm" svg:x="1.059cm" svg:y="1.905cm" draw:page-number="20" presentation:class="page"/>
          <draw:frame draw:name="Google Shape;201;g3ad3d35e571_0_0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 – overview" draw:style-name="dp1" draw:master-page-name="TITLE_5f_AND_5f_BODY" presentation:presentation-page-layout-name="AL2T1">
        <draw:frame draw:name="Google Shape;209;p33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Layers – overview</text:span></text:p>
          </draw:text-box>
        </draw:frame>
        <draw:frame draw:name="Google Shape;210;p33" presentation:style-name="pr11" draw:text-style-name="P7" draw:layer="layout" svg:width="31.977cm" svg:height="13.807cm" svg:x="17.092cm" svg:y="6.403cm" presentation:class="outline" presentation:user-transformed="true">
          <draw:text-box>
            <text:p text:style-name="P16"><text:span text:style-name="T12">Layers</text:span><text:span text:style-name="T11"> are system-wide components that differ in their abstractness.</text:span></text:p>
            <text:p text:style-name="P17"><text:span text:style-name="T11">An upper </text:span><text:span text:style-name="T12">layer</text:span><text:span text:style-name="T11"> may depend on a lower </text:span><text:span text:style-name="T12">layer</text:span><text:span text:style-name="T11"> or its interface. A lower </text:span><text:span text:style-name="T12">layer</text:span><text:span text:style-name="T11"> knows nothing about the </text:span><text:span text:style-name="T12">layers</text:span><text:span text:style-name="T11"> above it.</text:span></text:p>
            <text:p text:style-name="P18"><text:span text:style-name="T12">Tiers</text:span><text:span text:style-name="T11"> are distributed </text:span><text:span text:style-name="T12">Layers</text:span><text:span text:style-name="T11">.</text:span></text:p>
          </draw:text-box>
        </draw:frame>
        <draw:frame draw:name="Google Shape;211;p33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9"><text:span text:style-name="T13">Layering</text:span><text:span text:style-name="T14"> provides flexibility to small- and medium-sized projects…</text:span></text:p>
            <text:p text:style-name="P20"><text:span text:style-name="T15">…</text:span><text:span text:style-name="T15">at the cost of lost optimization opportunities.</text:span></text:p>
          </draw:text-box>
        </draw:frame>
        <draw:custom-shape draw:name="Google Shape;212;p33" draw:style-name="gr3" draw:text-style-name="P21" draw:layer="layout" svg:width="8.837cm" svg:height="2.541cm" svg:x="6.094cm" svg:y="17.347cm">
          <text:p text:style-name="P1"><text:span text:style-name="T16">Layers, Ti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33" draw:style-name="gr2" draw:text-style-name="P13" draw:layer="layout" svg:width="11.883cm" svg:height="9.691cm" svg:x="3.049cm" svg:y="7.347cm">
          <draw:image xlink:href="Pictures/10000201000002850000020E72A0E3126B40E309.png" xlink:type="simple" xlink:show="embed" xlink:actuate="onLoad">
            <text:p/>
          </draw:image>
        </draw:frame>
        <presentation:notes draw:style-name="dp2">
          <draw:page-thumbnail draw:name="Google Shape;206;g3ad3d35e571_0_5:notes" draw:style-name="gr1" draw:layer="layout" svg:width="16.932cm" svg:height="9.524cm" svg:x="1.059cm" svg:y="1.905cm" draw:page-number="21" presentation:class="page"/>
          <draw:frame draw:name="Google Shape;207;g3ad3d35e571_0_5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 – trade-offs" draw:style-name="dp1" draw:master-page-name="TITLE_5f_AND_5f_TWO_5f_COLUMNS" presentation:presentation-page-layout-name="AL3T3">
        <draw:frame draw:name="Google Shape;218;p34" presentation:style-name="pr13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Layers – trade-offs</text:span></text:p>
          </draw:text-box>
        </draw:frame>
        <draw:frame draw:name="Google Shape;219;p34" presentation:style-name="pr14" draw:text-style-name="P24" draw:layer="layout" svg:width="22.221cm" svg:height="18.122cm" svg:x="1.732cm" svg:y="6.403cm" presentation:class="outline" presentation:user-transformed="true">
          <draw:text-box>
            <text:p text:style-name="P22"><text:span text:style-name="T17">Each layer may be developed by a dedicated team</text:span></text:p>
            <text:p text:style-name="P17"><text:span text:style-name="T17">The layers may differ in technologies, scalability, security, and even hardware and physical location</text:span></text:p>
            <text:p text:style-name="P18"><text:span text:style-name="T17">The business logic is separated from reusable generic code</text:span></text:p>
          </draw:text-box>
        </draw:frame>
        <draw:frame draw:name="Google Shape;220;p34" presentation:style-name="pr15" draw:text-style-name="P24" draw:layer="layout" svg:width="22.221cm" svg:height="18.122cm" svg:x="26.847cm" svg:y="6.403cm" presentation:class="outline" presentation:user-transformed="true">
          <draw:text-box>
            <text:p text:style-name="P22"><text:span text:style-name="T18">The number of layers and associated teams is usually limited to 3 or 4.</text:span></text:p>
            <text:p text:style-name="P18"><text:span text:style-name="T18">The interfaces between layers tend to negatively impact performance</text:span></text:p>
          </draw:text-box>
        </draw:frame>
        <presentation:notes draw:style-name="dp2">
          <draw:page-thumbnail draw:name="Google Shape;215;g3ad3d35e571_0_13:notes" draw:style-name="gr1" draw:layer="layout" svg:width="16.932cm" svg:height="9.524cm" svg:x="1.059cm" svg:y="1.905cm" draw:page-number="22" presentation:class="page"/>
          <draw:frame draw:name="Google Shape;216;g3ad3d35e571_0_13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 – openness" draw:style-name="dp1" draw:master-page-name="TITLE_5f_AND_5f_BODY" presentation:presentation-page-layout-name="AL2T1">
        <draw:frame draw:name="Google Shape;225;p35" presentation:style-name="pr34" draw:text-style-name="P7" draw:layer="layout" svg:width="25.189cm" svg:height="13.899cm" svg:x="13.176cm" svg:y="7.873cm" presentation:class="outline" presentation:user-transformed="true">
          <draw:text-box>
            <text:p text:style-name="P16"><text:span text:style-name="T11">An </text:span><text:span text:style-name="T12">open layer</text:span><text:span text:style-name="T11"> is transparent – the layer above it may directly access the layer below it.</text:span></text:p>
            <text:p text:style-name="P18"><text:span text:style-name="T11">A </text:span><text:span text:style-name="T12">closed layer</text:span><text:span text:style-name="T11"> is opaque – it hides everything below it from its clients.</text:span></text:p>
          </draw:text-box>
        </draw:frame>
        <draw:custom-shape draw:name="Google Shape;226;p35" draw:style-name="gr3" draw:text-style-name="P21" draw:layer="layout" svg:width="9.439cm" svg:height="2.541cm" svg:x="2.44cm" svg:y="17.32cm">
          <text:p text:style-name="P1"><text:span text:style-name="T20">Open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35" draw:style-name="gr3" draw:text-style-name="P21" draw:layer="layout" svg:width="9.439cm" svg:height="2.541cm" svg:x="38.135cm" svg:y="17.32cm">
          <text:p text:style-name="P1"><text:span text:style-name="T20">Closed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8;p35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Layers – openness</text:span></text:p>
          </draw:text-box>
        </draw:frame>
        <draw:frame draw:name="Google Shape;229;p35" draw:style-name="gr2" draw:text-style-name="P13" draw:layer="layout" svg:width="10.089cm" svg:height="9.232cm" svg:x="2.115cm" svg:y="8.087cm">
          <draw:image xlink:href="Pictures/10000201000001BF00000199B5208CB1CFA815E6.png" xlink:type="simple" xlink:show="embed" xlink:actuate="onLoad">
            <text:p/>
          </draw:image>
        </draw:frame>
        <draw:frame draw:name="Google Shape;230;p35" draw:style-name="gr2" draw:text-style-name="P13" draw:layer="layout" svg:width="9.391cm" svg:height="9.232cm" svg:x="38.159cm" svg:y="8.087cm">
          <draw:image xlink:href="Pictures/100002010000019E000001974F1C49A74A062EA6.png" xlink:type="simple" xlink:show="embed" xlink:actuate="onLoad">
            <text:p/>
          </draw:image>
        </draw:frame>
        <presentation:notes draw:style-name="dp2">
          <draw:page-thumbnail draw:name="Google Shape;222;g3ad3d35e571_0_41:notes" draw:style-name="gr1" draw:layer="layout" svg:width="16.932cm" svg:height="9.524cm" svg:x="1.059cm" svg:y="1.905cm" draw:page-number="23" presentation:class="page"/>
          <draw:frame draw:name="Google Shape;223;g3ad3d35e571_0_41:notes" presentation:style-name="pr35" draw:text-style-name="P29" draw:layer="layout" svg:width="15.239cm" svg:height="11.429cm" svg:x="1.905cm" svg:y="12.065cm" presentation:class="notes" presentation:user-transformed="true">
            <draw:text-box>
              <text:p text:style-name="P28"><text:span text:style-name="T23"><text:a xlink:href="https://metapatterns.io/basic-metapatterns/layers/" xlink:type="simple">https://metapatterns.io/basic-metapatterns/layers/</text:a></text:span></text:p>
            </draw:text-box>
          </draw:frame>
        </presentation:notes>
      </draw:page>
      <draw:page draw:name="Layers – isolation" draw:style-name="dp1" draw:master-page-name="TITLE_5f_AND_5f_TWO_5f_COLUMNS" presentation:presentation-page-layout-name="AL3T3">
        <draw:frame draw:name="Google Shape;235;p36" presentation:style-name="pr13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Layers – isolation</text:span></text:p>
          </draw:text-box>
        </draw:frame>
        <draw:frame draw:name="Google Shape;236;p36" draw:style-name="standard" draw:layer="layout" svg:width="43.5cm" svg:height="19.284cm" svg:x="3.649cm" svg:y="6.601cm">
          <table:table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25"><text:span text:style-name="T11">Isolation</text:span></text:p>
              </table:table-cell>
              <table:table-cell>
                <text:p text:style-name="P25"><text:span text:style-name="T11">Benefits</text:span></text:p>
              </table:table-cell>
              <table:table-cell>
                <text:p text:style-name="P25"><text:span text:style-name="T11">Drawbacks</text:span></text:p>
              </table:table-cell>
            </table:table-row>
            <table:table-row table:style-name="ro5" table:default-cell-style-name="ce1">
              <table:table-cell>
                <text:p text:style-name="P26"><text:span text:style-name="T20">Synchronous layers</text:span></text:p>
              </table:table-cell>
              <table:table-cell>
                <text:p text:style-name="P26"><text:span text:style-name="T17">Encapsulation</text:span></text:p>
                <text:p text:style-name="P26"><text:span text:style-name="T17">Multiple teams</text:span></text:p>
              </table:table-cell>
              <table:table-cell>
                <text:p text:style-name="P26"><text:span text:style-name="T18">Lost optimization opportunities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20">Asynchronous layers</text:span></text:p>
              </table:table-cell>
              <table:table-cell>
                <text:p text:style-name="P26"><text:span text:style-name="T17">Low latency</text:span></text:p>
              </table:table-cell>
              <table:table-cell>
                <text:p text:style-name="P26"><text:span text:style-name="T18">Complicated debugging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0">A process per layer</text:span></text:p>
              </table:table-cell>
              <table:table-cell>
                <text:p text:style-name="P26"><text:span text:style-name="T17">Independent technologies, deployment and scalability</text:span></text:p>
                <text:p text:style-name="P26"><text:span text:style-name="T17">Software fault isolation</text:span></text:p>
              </table:table-cell>
              <table:table-cell>
                <text:p text:style-name="P26"><text:span text:style-name="T18">Inconsistent state after errors</text:span></text:p>
              </table:table-cell>
            </table:table-row>
            <table:table-row table:style-name="ro6" table:default-cell-style-name="ce1">
              <table:table-cell>
                <text:p text:style-name="P26"><text:span text:style-name="T20">Distributed tiers</text:span></text:p>
              </table:table-cell>
              <table:table-cell>
                <text:p text:style-name="P26"><text:span text:style-name="T17">Independent hardware and location</text:span></text:p>
              </table:table-cell>
              <table:table-cell>
                <text:p text:style-name="P26"><text:span text:style-name="T18">Slow communication between layer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232;g3ad3d35e571_0_19:notes" draw:style-name="gr1" draw:layer="layout" svg:width="16.932cm" svg:height="9.524cm" svg:x="1.059cm" svg:y="1.905cm" draw:page-number="24" presentation:class="page"/>
          <draw:frame draw:name="Google Shape;233;g3ad3d35e571_0_19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 – examples" draw:style-name="dp1" draw:master-page-name="TITLE_5f_AND_5f_BODY" presentation:presentation-page-layout-name="AL2T1">
        <draw:frame draw:name="Google Shape;241;p37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Layers – examples</text:span></text:p>
          </draw:text-box>
        </draw:frame>
        <draw:frame draw:name="Google Shape;242;p37" presentation:style-name="pr11" draw:text-style-name="P7" draw:layer="layout" svg:width="32.941cm" svg:height="13.807cm" svg:x="16.127cm" svg:y="7.383cm" presentation:class="outline" presentation:user-transformed="true">
          <draw:text-box>
            <text:p text:style-name="P16"><text:span text:style-name="T12">Domain-Driven Design</text:span><text:span text:style-name="T11"> defines the following layers:</text:span></text:p>
            <text:list text:style-name="L11">
              <text:list-item>
                <text:p text:style-name="P17"><text:span text:style-name="T12">Presentation</text:span><text:span text:style-name="T11"> (user interface)</text:span></text:p>
              </text:list-item>
              <text:list-item>
                <text:p text:style-name="P16"><text:span text:style-name="T12">Application</text:span><text:span text:style-name="T11"> (integration or use cases)</text:span></text:p>
              </text:list-item>
              <text:list-item>
                <text:p text:style-name="P16"><text:span text:style-name="T12">Domain</text:span><text:span text:style-name="T11"> (business rules)</text:span></text:p>
              </text:list-item>
              <text:list-item>
                <text:p text:style-name="P16"><text:span text:style-name="T12">Infrastructure</text:span><text:span text:style-name="T11"> (utilities and data access)</text:span></text:p>
              </text:list-item>
            </text:list>
          </draw:text-box>
        </draw:frame>
        <draw:custom-shape draw:name="Google Shape;243;p37" draw:style-name="gr3" draw:text-style-name="P21" draw:layer="layout" svg:width="11.641cm" svg:height="2.541cm" svg:x="4.206cm" svg:y="21.192cm">
          <text:p text:style-name="P1"><text:span text:style-name="T16">DDD Lay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4;p37" draw:style-name="gr2" draw:text-style-name="P13" draw:layer="layout" svg:width="9.439cm" svg:height="13.324cm" svg:x="5.307cm" svg:y="7.383cm">
          <draw:image xlink:href="Pictures/10000201000001E6000002AE9A7D44083973D73C.png" xlink:type="simple" xlink:show="embed" xlink:actuate="onLoad">
            <text:p/>
          </draw:image>
        </draw:frame>
        <presentation:notes draw:style-name="dp2">
          <draw:page-thumbnail draw:name="Google Shape;238;g3ad3d35e571_0_24:notes" draw:style-name="gr1" draw:layer="layout" svg:width="16.932cm" svg:height="9.524cm" svg:x="1.059cm" svg:y="1.905cm" draw:page-number="25" presentation:class="page"/>
          <draw:frame draw:name="Google Shape;239;g3ad3d35e571_0_24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 – examples" draw:style-name="dp1" draw:master-page-name="TITLE_5f_AND_5f_BODY" presentation:presentation-page-layout-name="AL2T1">
        <draw:frame draw:name="Google Shape;249;p38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Layers – examples</text:span></text:p>
          </draw:text-box>
        </draw:frame>
        <draw:frame draw:name="Google Shape;250;p38" presentation:style-name="pr11" draw:text-style-name="P7" draw:layer="layout" svg:width="31.977cm" svg:height="17.027cm" svg:x="17.092cm" svg:y="6.403cm" presentation:class="outline" presentation:user-transformed="true">
          <draw:text-box>
            <text:p text:style-name="P16"><text:span text:style-name="T12">Tiers</text:span><text:span text:style-name="T11"> are distributed </text:span><text:span text:style-name="T12">Layers.</text:span></text:p>
            <text:p text:style-name="P17"><text:span text:style-name="T12">3-Tier Architecture</text:span><text:span text:style-name="T11"> contains:</text:span></text:p>
            <text:list text:style-name="L11">
              <text:list-item>
                <text:p text:style-name="P17"><text:span text:style-name="T12">Frontend</text:span><text:span text:style-name="T11"> (user interface)</text:span></text:p>
              </text:list-item>
              <text:list-item>
                <text:p text:style-name="P16"><text:span text:style-name="T12">Backend</text:span><text:span text:style-name="T11"> (business logic)</text:span></text:p>
              </text:list-item>
              <text:list-item>
                <text:p text:style-name="P16"><text:span text:style-name="T12">Database</text:span><text:span text:style-name="T11"> (persistent data)</text:span></text:p>
              </text:list-item>
            </text:list>
            <text:p text:style-name="P18"><text:span text:style-name="T11">The tiers differ in their scalability, location, and security.</text:span></text:p>
          </draw:text-box>
        </draw:frame>
        <draw:custom-shape draw:name="Google Shape;251;p38" draw:style-name="gr3" draw:text-style-name="P21" draw:layer="layout" svg:width="11.641cm" svg:height="2.541cm" svg:x="4.206cm" svg:y="21.23cm">
          <text:p text:style-name="P1"><text:span text:style-name="T16">3-Tier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38" draw:style-name="gr2" draw:text-style-name="P13" draw:layer="layout" svg:width="9.439cm" svg:height="13.324cm" svg:x="5.307cm" svg:y="7.41cm">
          <draw:image xlink:href="Pictures/10000201000001E6000002AE3371865D29404F71.png" xlink:type="simple" xlink:show="embed" xlink:actuate="onLoad">
            <text:p/>
          </draw:image>
        </draw:frame>
        <presentation:notes draw:style-name="dp2">
          <draw:page-thumbnail draw:name="Google Shape;246;g3ad3d35e571_0_100:notes" draw:style-name="gr1" draw:layer="layout" svg:width="16.932cm" svg:height="9.524cm" svg:x="1.059cm" svg:y="1.905cm" draw:page-number="26" presentation:class="page"/>
          <draw:frame draw:name="Google Shape;247;g3ad3d35e571_0_100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" draw:style-name="dp1" draw:master-page-name="SECTION_5f_HEADER">
        <draw:frame draw:name="Google Shape;257;p39" presentation:style-name="pr8" draw:text-style-name="P14" draw:layer="layout" svg:width="47.336cm" svg:height="4.676cm" svg:x="1.732cm" svg:y="9.611cm" presentation:class="title" presentation:user-transformed="true">
          <draw:text-box>
            <text:p text:style-name="P1"><text:span text:style-name="T9">Services</text:span></text:p>
          </draw:text-box>
        </draw:frame>
        <draw:frame draw:name="Google Shape;258;p39" presentation:style-name="pr9" draw:text-style-name="P15" draw:layer="layout" svg:width="47.336cm" svg:height="4.402cm" svg:x="1.732cm" svg:y="14.288cm" presentation:class="subtitle" presentation:user-transformed="true">
          <draw:text-box>
            <text:p text:style-name="P12"><text:span text:style-name="T10">Subdomain-aligned components</text:span></text:p>
          </draw:text-box>
        </draw:frame>
        <presentation:notes draw:style-name="dp2">
          <draw:page-thumbnail draw:name="Google Shape;254;g3ad72b8a13e_0_0:notes" draw:style-name="gr1" draw:layer="layout" svg:width="16.932cm" svg:height="9.524cm" svg:x="1.059cm" svg:y="1.905cm" draw:page-number="27" presentation:class="page"/>
          <draw:frame draw:name="Google Shape;255;g3ad72b8a13e_0_0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overview" draw:style-name="dp1" draw:master-page-name="TITLE_5f_AND_5f_BODY" presentation:presentation-page-layout-name="AL2T1">
        <draw:frame draw:name="Google Shape;263;p40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ervices – overview</text:span></text:p>
          </draw:text-box>
        </draw:frame>
        <draw:frame draw:name="Google Shape;264;p40" presentation:style-name="pr11" draw:text-style-name="P7" draw:layer="layout" svg:width="30.749cm" svg:height="13.807cm" svg:x="18.32cm" svg:y="6.403cm" presentation:class="outline" presentation:user-transformed="true">
          <draw:text-box>
            <text:p text:style-name="P16"><text:span text:style-name="T12">Services </text:span><text:span text:style-name="T11">employ a component per subdomain.</text:span></text:p>
            <text:p text:style-name="P18"><text:span text:style-name="T11">When the subdomains are loosely coupled, the corresponding services can be developed by fairly independent teams with minimal communication overhead.</text:span></text:p>
          </draw:text-box>
        </draw:frame>
        <draw:frame draw:name="Google Shape;265;p40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9"><text:span text:style-name="T13">Services</text:span><text:span text:style-name="T14"> are good for large projects with several teams.</text:span></text:p>
            <text:p text:style-name="P20"><text:span text:style-name="T15">They require the subdomains to be stable and loosely coupled.</text:span></text:p>
          </draw:text-box>
        </draw:frame>
        <draw:custom-shape draw:name="Google Shape;266;p40" draw:style-name="gr3" draw:text-style-name="P21" draw:layer="layout" svg:width="11.641cm" svg:height="2.541cm" svg:x="3.668cm" svg:y="17.039cm">
          <text:p text:style-name="P1"><text:span text:style-name="T16">Services, Mod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40" draw:style-name="gr2" draw:text-style-name="P13" draw:layer="layout" svg:width="11.629cm" svg:height="9.691cm" svg:x="3.674cm" svg:y="7.347cm">
          <draw:image xlink:href="Pictures/10000201000002D60000025D3B486C812F687622.png" xlink:type="simple" xlink:show="embed" xlink:actuate="onLoad">
            <text:p/>
          </draw:image>
        </draw:frame>
        <presentation:notes draw:style-name="dp2">
          <draw:page-thumbnail draw:name="Google Shape;260;g3ad72b8a13e_0_5:notes" draw:style-name="gr1" draw:layer="layout" svg:width="16.932cm" svg:height="9.524cm" svg:x="1.059cm" svg:y="1.905cm" draw:page-number="28" presentation:class="page"/>
          <draw:frame draw:name="Google Shape;261;g3ad72b8a13e_0_5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trade-offs" draw:style-name="dp1" draw:master-page-name="TITLE_5f_AND_5f_TWO_5f_COLUMNS" presentation:presentation-page-layout-name="AL3T3">
        <draw:frame draw:name="Google Shape;272;p41" presentation:style-name="pr13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ervices – trade-offs</text:span></text:p>
          </draw:text-box>
        </draw:frame>
        <draw:frame draw:name="Google Shape;273;p41" presentation:style-name="pr14" draw:text-style-name="P24" draw:layer="layout" svg:width="22.221cm" svg:height="18.122cm" svg:x="1.732cm" svg:y="6.403cm" presentation:class="outline" presentation:user-transformed="true">
          <draw:text-box>
            <text:p text:style-name="P22"><text:span text:style-name="T17">Services fit large projects with several teams</text:span></text:p>
            <text:p text:style-name="P17"><text:span text:style-name="T17">The subdomains may vary in technologies and scaling</text:span></text:p>
            <text:p text:style-name="P18"><text:span text:style-name="T17">A degree of fault tolerance is achieved with loosely coupled services</text:span></text:p>
          </draw:text-box>
        </draw:frame>
        <draw:frame draw:name="Google Shape;274;p41" presentation:style-name="pr15" draw:text-style-name="P24" draw:layer="layout" svg:width="22.221cm" svg:height="18.122cm" svg:x="26.847cm" svg:y="6.403cm" presentation:class="outline" presentation:user-transformed="true">
          <draw:text-box>
            <text:p text:style-name="P22"><text:span text:style-name="T18">Use cases that involve multiple subdomains become slow and complicated</text:span></text:p>
            <text:p text:style-name="P17"><text:span text:style-name="T18">It is hard to synchronize the states of the services</text:span></text:p>
            <text:p text:style-name="P17"><text:span text:style-name="T18">Subdomains boundaries should never change</text:span></text:p>
            <text:p text:style-name="P18"><text:span text:style-name="T18">There is operational complexity</text:span></text:p>
          </draw:text-box>
        </draw:frame>
        <presentation:notes draw:style-name="dp2">
          <draw:page-thumbnail draw:name="Google Shape;269;g3ad72b8a13e_0_13:notes" draw:style-name="gr1" draw:layer="layout" svg:width="16.932cm" svg:height="9.524cm" svg:x="1.059cm" svg:y="1.905cm" draw:page-number="29" presentation:class="page"/>
          <draw:frame draw:name="Google Shape;270;g3ad72b8a13e_0_13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isolation" draw:style-name="dp1" draw:master-page-name="TITLE_5f_AND_5f_TWO_5f_COLUMNS" presentation:presentation-page-layout-name="AL3T3">
        <draw:frame draw:name="Google Shape;279;p42" presentation:style-name="pr13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ervices – isolation</text:span></text:p>
          </draw:text-box>
        </draw:frame>
        <draw:frame draw:name="Google Shape;280;p42" draw:style-name="standard" draw:layer="layout" svg:width="43.5cm" svg:height="18.578cm" svg:x="3.649cm" svg:y="6.601cm">
          <table:table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25"><text:span text:style-name="T11">Isolation</text:span></text:p>
              </table:table-cell>
              <table:table-cell>
                <text:p text:style-name="P25"><text:span text:style-name="T11">Benefits</text:span></text:p>
              </table:table-cell>
              <table:table-cell>
                <text:p text:style-name="P25"><text:span text:style-name="T11">Drawbacks</text:span></text:p>
              </table:table-cell>
            </table:table-row>
            <table:table-row table:style-name="ro6" table:default-cell-style-name="ce1">
              <table:table-cell>
                <text:p text:style-name="P26"><text:span text:style-name="T20">Synchronous modules</text:span></text:p>
              </table:table-cell>
              <table:table-cell>
                <text:p text:style-name="P26"><text:span text:style-name="T17">Multi-team development</text:span></text:p>
              </table:table-cell>
              <table:table-cell>
                <text:p text:style-name="P26"><text:span text:style-name="T18">Subdomain boundaries are frozen</text:span></text:p>
              </table:table-cell>
            </table:table-row>
            <table:table-row table:style-name="ro6" table:default-cell-style-name="ce1">
              <table:table-cell>
                <text:p text:style-name="P26"><text:span text:style-name="T20">Asynchronous modules</text:span></text:p>
              </table:table-cell>
              <table:table-cell>
                <text:p text:style-name="P26"><text:span text:style-name="T17">Event replay</text:span></text:p>
              </table:table-cell>
              <table:table-cell>
                <text:p text:style-name="P26"><text:span text:style-name="T18">Hard to share data or debug across services</text:span></text:p>
              </table:table-cell>
            </table:table-row>
            <table:table-row table:style-name="ro6" table:default-cell-style-name="ce1">
              <table:table-cell>
                <text:p text:style-name="P26"><text:span text:style-name="T20">Multiple processes</text:span></text:p>
              </table:table-cell>
              <table:table-cell>
                <text:p text:style-name="P26"><text:span text:style-name="T17">Independent technologies and scalability</text:span></text:p>
              </table:table-cell>
              <table:table-cell>
                <text:p text:style-name="P26"><text:span text:style-name="T18">Inconsistent state after errors</text:span></text:p>
              </table:table-cell>
            </table:table-row>
            <table:table-row table:style-name="ro5" table:default-cell-style-name="ce1">
              <table:table-cell>
                <text:p text:style-name="P26"><text:span text:style-name="T20">Distributed services</text:span></text:p>
              </table:table-cell>
              <table:table-cell>
                <text:p text:style-name="P26"><text:span text:style-name="T17">Granular scalability</text:span></text:p>
                <text:p text:style-name="P26"><text:span text:style-name="T17">Good fault isolation</text:span></text:p>
              </table:table-cell>
              <table:table-cell>
                <text:p text:style-name="P26"><text:span text:style-name="T18">High communication overhead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276;g3ad72b8a13e_0_19:notes" draw:style-name="gr1" draw:layer="layout" svg:width="16.932cm" svg:height="9.524cm" svg:x="1.059cm" svg:y="1.905cm" draw:page-number="30" presentation:class="page"/>
          <draw:frame draw:name="Google Shape;277;g3ad72b8a13e_0_19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size" draw:style-name="dp1" draw:master-page-name="TITLE_5f_AND_5f_TWO_5f_COLUMNS" presentation:presentation-page-layout-name="AL3T3">
        <draw:frame draw:name="Google Shape;285;p43" presentation:style-name="pr13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ervices – size</text:span></text:p>
          </draw:text-box>
        </draw:frame>
        <draw:frame draw:name="Google Shape;286;p43" draw:style-name="standard" draw:layer="layout" svg:width="43.5cm" svg:height="15.028cm" svg:x="3.649cm" svg:y="6.601cm">
          <table:table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>
                <text:p text:style-name="P25"><text:span text:style-name="T11">Size</text:span></text:p>
              </table:table-cell>
              <table:table-cell>
                <text:p text:style-name="P25"><text:span text:style-name="T11">Architecture</text:span></text:p>
              </table:table-cell>
              <table:table-cell>
                <text:p text:style-name="P25"><text:span text:style-name="T11">Traits</text:span></text:p>
              </table:table-cell>
            </table:table-row>
            <table:table-row table:style-name="ro6" table:default-cell-style-name="ce1">
              <table:table-cell>
                <text:p text:style-name="P26"><text:span text:style-name="T11">Whole subdomain</text:span></text:p>
              </table:table-cell>
              <table:table-cell>
                <text:p text:style-name="P26"><text:span text:style-name="T20">Service-Based Architecture</text:span></text:p>
              </table:table-cell>
              <table:table-cell>
                <text:p text:style-name="P26"><text:span text:style-name="T11">Easy to design and implement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11">Part of a subdomain</text:span></text:p>
              </table:table-cell>
              <table:table-cell>
                <text:p text:style-name="P26"><text:span text:style-name="T20">Microservices</text:span></text:p>
              </table:table-cell>
              <table:table-cell>
                <text:p text:style-name="P26"><text:span text:style-name="T11">Fine-grained scalability</text:span></text:p>
              </table:table-cell>
            </table:table-row>
            <table:table-row table:style-name="ro6" table:default-cell-style-name="ce1">
              <table:table-cell>
                <text:p text:style-name="P26"><text:span text:style-name="T11">Class-like</text:span></text:p>
              </table:table-cell>
              <table:table-cell>
                <text:p text:style-name="P26"><text:span text:style-name="T20">Actors</text:span></text:p>
              </table:table-cell>
              <table:table-cell>
                <text:p text:style-name="P26"><text:span text:style-name="T11">Real-time latency and low resource consumption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11">Single function</text:span></text:p>
              </table:table-cell>
              <table:table-cell>
                <text:p text:style-name="P26"><text:span text:style-name="T20">Nanoservices</text:span></text:p>
              </table:table-cell>
              <table:table-cell>
                <text:p text:style-name="P26"><text:span text:style-name="T11">Reusable components?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Google Shape;282;g3ad72b8a13e_0_31:notes" draw:style-name="gr1" draw:layer="layout" svg:width="16.932cm" svg:height="9.524cm" svg:x="1.059cm" svg:y="1.905cm" draw:page-number="31" presentation:class="page"/>
          <draw:frame draw:name="Google Shape;283;g3ad72b8a13e_0_31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internals" draw:style-name="dp1" draw:master-page-name="TITLE_5f_AND_5f_TWO_5f_COLUMNS" presentation:presentation-page-layout-name="AL3T3">
        <draw:frame draw:name="Google Shape;291;p44" presentation:style-name="pr13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ervices – internals</text:span></text:p>
          </draw:text-box>
        </draw:frame>
        <draw:frame draw:name="Google Shape;292;p44" draw:style-name="standard" draw:layer="layout" svg:width="44.961cm" svg:height="15.485cm" svg:x="2.919cm" svg:y="6.711cm">
          <table:table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7" table:default-cell-style-name="ce3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4">
              <table:table-cell>
                <text:p text:style-name="P1"><text:span text:style-name="T24">Monolithic service</text:span></text:p>
              </table:table-cell>
              <table:table-cell>
                <text:p text:style-name="P1"><text:span text:style-name="T24">Scaled service</text:span></text:p>
              </table:table-cell>
              <table:table-cell>
                <text:p text:style-name="P1"><text:span text:style-name="T24">Layered service</text:span></text:p>
              </table:table-cell>
              <table:table-cell>
                <text:p text:style-name="P1"><text:span text:style-name="T24">Cell</text:span></text:p>
              </table:table-cell>
              <table:table-cell>
                <text:p text:style-name="P1"><text:span text:style-name="T24">Hexagonal servic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oogle Shape;293;p44" draw:style-name="gr2" draw:text-style-name="P13" draw:layer="layout" svg:width="8.048cm" svg:height="10.745cm" svg:x="3.417cm" svg:y="7.077cm">
          <draw:image xlink:href="Pictures/100002010000025E000003295ECB7B90938A9C2F.png" xlink:type="simple" xlink:show="embed" xlink:actuate="onLoad">
            <text:p/>
          </draw:image>
        </draw:frame>
        <draw:frame draw:name="Google Shape;294;p44" draw:style-name="gr2" draw:text-style-name="P13" draw:layer="layout" svg:width="8.048cm" svg:height="10.758cm" svg:x="12.344cm" svg:y="7.077cm">
          <draw:image xlink:href="Pictures/100002010000025E0000032A8E6CEF1EEA9F663D.png" xlink:type="simple" xlink:show="embed" xlink:actuate="onLoad">
            <text:p/>
          </draw:image>
        </draw:frame>
        <draw:frame draw:name="Google Shape;295;p44" draw:style-name="gr2" draw:text-style-name="P13" draw:layer="layout" svg:width="8.048cm" svg:height="10.745cm" svg:x="21.375cm" svg:y="7.083cm">
          <draw:image xlink:href="Pictures/100002010000025E000003295759957F8FDE4685.png" xlink:type="simple" xlink:show="embed" xlink:actuate="onLoad">
            <text:p/>
          </draw:image>
        </draw:frame>
        <draw:frame draw:name="Google Shape;296;p44" draw:style-name="gr2" draw:text-style-name="P13" draw:layer="layout" svg:width="8.048cm" svg:height="10.745cm" svg:x="30.407cm" svg:y="7.076cm">
          <draw:image xlink:href="Pictures/100002010000025E00000329223FA742B5A7595C.png" xlink:type="simple" xlink:show="embed" xlink:actuate="onLoad">
            <text:p/>
          </draw:image>
        </draw:frame>
        <draw:frame draw:name="Google Shape;297;p44" draw:style-name="gr2" draw:text-style-name="P13" draw:layer="layout" svg:width="8.048cm" svg:height="10.745cm" svg:x="39.334cm" svg:y="7.083cm">
          <draw:image xlink:href="Pictures/100002010000025E00000329C304F0A24A7EF952.png" xlink:type="simple" xlink:show="embed" xlink:actuate="onLoad">
            <text:p/>
          </draw:image>
        </draw:frame>
        <presentation:notes draw:style-name="dp2">
          <draw:page-thumbnail draw:name="Google Shape;288;g3ad72b8a13e_0_36:notes" draw:style-name="gr1" draw:layer="layout" svg:width="16.932cm" svg:height="9.524cm" svg:x="1.059cm" svg:y="1.905cm" draw:page-number="32" presentation:class="page"/>
          <draw:frame draw:name="Google Shape;289;g3ad72b8a13e_0_36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examples" draw:style-name="dp1" draw:master-page-name="TITLE_5f_AND_5f_BODY" presentation:presentation-page-layout-name="AL2T1">
        <draw:frame draw:name="Google Shape;302;p45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ervices – examples</text:span></text:p>
          </draw:text-box>
        </draw:frame>
        <draw:frame draw:name="Google Shape;303;p45" presentation:style-name="pr11" draw:text-style-name="P7" draw:layer="layout" svg:width="28.491cm" svg:height="14.454cm" svg:x="20.577cm" svg:y="7.383cm" presentation:class="outline" presentation:user-transformed="true">
          <draw:text-box>
            <text:p text:style-name="P16"><text:span text:style-name="T12">Service-Based Architecture</text:span><text:span text:style-name="T11"> (</text:span><text:span text:style-name="T12">SBA</text:span><text:span text:style-name="T11">) is made of coarse-grained subdomain services.</text:span></text:p>
            <text:p text:style-name="P17"><text:span text:style-name="T11">Some or all of them may share a database. They may not be independently deployable.</text:span></text:p>
            <text:p text:style-name="P17"><text:span text:style-name="T11">Being pragmatic, </text:span><text:span text:style-name="T12">SBA</text:span><text:span text:style-name="T11"> violates best practices in favor of simplicity.</text:span></text:p>
            <text:p text:style-name="P18"><text:span text:style-name="T25"/></text:p>
          </draw:text-box>
        </draw:frame>
        <draw:custom-shape draw:name="Google Shape;304;p45" draw:style-name="gr3" draw:text-style-name="P21" draw:layer="layout" svg:width="14.977cm" svg:height="4.065cm" svg:x="3.269cm" svg:y="18.835cm">
          <text:p text:style-name="P1"><text:span text:style-name="T16">Service-Based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5;p45" draw:style-name="gr2" draw:text-style-name="P13" draw:layer="layout" svg:width="14.977cm" svg:height="10.026cm" svg:x="3.269cm" svg:y="8.426cm">
          <draw:image xlink:href="Pictures/10000201000002D6000001E6F0F0FA15FCC0D519.png" xlink:type="simple" xlink:show="embed" xlink:actuate="onLoad">
            <text:p/>
          </draw:image>
        </draw:frame>
        <presentation:notes draw:style-name="dp2">
          <draw:page-thumbnail draw:name="Google Shape;299;g3ad72b8a13e_0_24:notes" draw:style-name="gr1" draw:layer="layout" svg:width="16.932cm" svg:height="9.524cm" svg:x="1.059cm" svg:y="1.905cm" draw:page-number="33" presentation:class="page"/>
          <draw:frame draw:name="Google Shape;300;g3ad72b8a13e_0_24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examples" draw:style-name="dp1" draw:master-page-name="TITLE_5f_AND_5f_BODY" presentation:presentation-page-layout-name="AL2T1">
        <draw:frame draw:name="Google Shape;310;p46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ervices – examples</text:span></text:p>
          </draw:text-box>
        </draw:frame>
        <draw:frame draw:name="Google Shape;311;p46" presentation:style-name="pr11" draw:text-style-name="P7" draw:layer="layout" svg:width="28.491cm" svg:height="16.312cm" svg:x="20.577cm" svg:y="7.383cm" presentation:class="outline" presentation:user-transformed="true">
          <draw:text-box>
            <text:p text:style-name="P16"><text:span text:style-name="T12">Microservices</text:span><text:span text:style-name="T11"> follow best practices:</text:span></text:p>
            <text:list text:style-name="L11">
              <text:list-item>
                <text:p text:style-name="P17"><text:span text:style-name="T11">Private code and databases.</text:span></text:p>
              </text:list-item>
              <text:list-item>
                <text:p text:style-name="P16"><text:span text:style-name="T11">Independent scaling and deployment with a </text:span><text:span text:style-name="T12">Service Mesh</text:span><text:span text:style-name="T11">.</text:span></text:p>
              </text:list-item>
              <text:list-item>
                <text:p text:style-name="P16"><text:span text:style-name="T11">Mostly asynchronous communication.</text:span></text:p>
              </text:list-item>
              <text:list-item>
                <text:p text:style-name="P16"><text:span text:style-name="T11">Fine-grained responsibilities.</text:span></text:p>
              </text:list-item>
            </text:list>
            <text:p text:style-name="P17"><text:span text:style-name="T11">Shared libraries are placed into </text:span><text:span text:style-name="T12">Sidecars</text:span><text:span text:style-name="T11">.</text:span></text:p>
            <text:p text:style-name="P18"><text:span text:style-name="T25"/></text:p>
          </draw:text-box>
        </draw:frame>
        <draw:custom-shape draw:name="Google Shape;312;p46" draw:style-name="gr3" draw:text-style-name="P21" draw:layer="layout" svg:width="15.919cm" svg:height="2.541cm" svg:x="2.939cm" svg:y="19.2cm">
          <text:p text:style-name="P1"><text:span text:style-name="T16">Micro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3;p46" draw:style-name="gr2" draw:text-style-name="P13" draw:layer="layout" svg:width="16.951cm" svg:height="10.461cm" svg:x="2.423cm" svg:y="8.356cm">
          <draw:image xlink:href="Pictures/10000201000005560000034BF747893BDCD98BE1.png" xlink:type="simple" xlink:show="embed" xlink:actuate="onLoad">
            <text:p/>
          </draw:image>
        </draw:frame>
        <presentation:notes draw:style-name="dp2">
          <draw:page-thumbnail draw:name="Google Shape;307;g3ad9b71fd64_0_1:notes" draw:style-name="gr1" draw:layer="layout" svg:width="16.932cm" svg:height="9.524cm" svg:x="1.059cm" svg:y="1.905cm" draw:page-number="34" presentation:class="page"/>
          <draw:frame draw:name="Google Shape;308;g3ad9b71fd64_0_1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– examples" draw:style-name="dp1" draw:master-page-name="TITLE_5f_AND_5f_BODY" presentation:presentation-page-layout-name="AL2T1">
        <draw:frame draw:name="Google Shape;318;p47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Services – examples</text:span></text:p>
          </draw:text-box>
        </draw:frame>
        <draw:frame draw:name="Google Shape;319;p47" presentation:style-name="pr11" draw:text-style-name="P7" draw:layer="layout" svg:width="28.491cm" svg:height="16.312cm" svg:x="20.577cm" svg:y="7.383cm" presentation:class="outline" presentation:user-transformed="true">
          <draw:text-box>
            <text:p text:style-name="P16"><text:span text:style-name="T12">Actors</text:span><text:span text:style-name="T11"> are asynchronous objects.</text:span></text:p>
            <text:p text:style-name="P17"><text:span text:style-name="T11">Each actor represents a physical or logical entity, such as a bank client or chat participant.</text:span></text:p>
            <text:p text:style-name="P17"><text:span text:style-name="T11">An </text:span><text:span text:style-name="T12">Actor Framework</text:span><text:span text:style-name="T11"> runs millions of interconnected actors.</text:span></text:p>
            <text:p text:style-name="P18"><text:span text:style-name="T25"/></text:p>
          </draw:text-box>
        </draw:frame>
        <draw:custom-shape draw:name="Google Shape;320;p47" draw:style-name="gr3" draw:text-style-name="P21" draw:layer="layout" svg:width="10.347cm" svg:height="2.541cm" svg:x="4.761cm" svg:y="18.703cm">
          <text:p text:style-name="P1"><text:span text:style-name="T16">Ac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1;p47" draw:style-name="gr2" draw:text-style-name="P13" draw:layer="layout" svg:width="10.347cm" svg:height="9.495cm" svg:x="4.762cm" svg:y="8.525cm">
          <draw:image xlink:href="Pictures/10000201000001E6000001BEFD31F459833BF22C.png" xlink:type="simple" xlink:show="embed" xlink:actuate="onLoad">
            <text:p/>
          </draw:image>
        </draw:frame>
        <presentation:notes draw:style-name="dp2">
          <draw:page-thumbnail draw:name="Google Shape;315;g3ad9b71fd64_0_9:notes" draw:style-name="gr1" draw:layer="layout" svg:width="16.932cm" svg:height="9.524cm" svg:x="1.059cm" svg:y="1.905cm" draw:page-number="35" presentation:class="page"/>
          <draw:frame draw:name="Google Shape;316;g3ad9b71fd64_0_9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" draw:style-name="dp1" draw:master-page-name="SECTION_5f_HEADER">
        <draw:frame draw:name="Google Shape;326;p48" presentation:style-name="pr8" draw:text-style-name="P14" draw:layer="layout" svg:width="47.336cm" svg:height="4.676cm" svg:x="1.732cm" svg:y="9.611cm" presentation:class="title" presentation:user-transformed="true">
          <draw:text-box>
            <text:p text:style-name="P1"><text:span text:style-name="T9">Pipeline</text:span></text:p>
          </draw:text-box>
        </draw:frame>
        <draw:frame draw:name="Google Shape;327;p48" presentation:style-name="pr9" draw:text-style-name="P15" draw:layer="layout" svg:width="47.336cm" svg:height="4.402cm" svg:x="1.732cm" svg:y="14.288cm" presentation:class="subtitle" presentation:user-transformed="true">
          <draw:text-box>
            <text:p text:style-name="P12"><text:span text:style-name="T10">A component per step of data processing</text:span></text:p>
          </draw:text-box>
        </draw:frame>
        <presentation:notes draw:style-name="dp2">
          <draw:page-thumbnail draw:name="Google Shape;323;g3ada4842c12_0_0:notes" draw:style-name="gr1" draw:layer="layout" svg:width="16.932cm" svg:height="9.524cm" svg:x="1.059cm" svg:y="1.905cm" draw:page-number="36" presentation:class="page"/>
          <draw:frame draw:name="Google Shape;324;g3ada4842c12_0_0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– overview" draw:style-name="dp1" draw:master-page-name="TITLE_5f_AND_5f_BODY" presentation:presentation-page-layout-name="AL2T1">
        <draw:frame draw:name="Google Shape;332;p49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ipeline – overview</text:span></text:p>
          </draw:text-box>
        </draw:frame>
        <draw:frame draw:name="Google Shape;333;p49" presentation:style-name="pr11" draw:text-style-name="P7" draw:layer="layout" svg:width="31.977cm" svg:height="13.807cm" svg:x="17.092cm" svg:y="6.403cm" presentation:class="outline" presentation:user-transformed="true">
          <draw:text-box>
            <text:p text:style-name="P16"><text:span text:style-name="T11">A </text:span><text:span text:style-name="T12">Pipeline</text:span><text:span text:style-name="T11"> passes a stream of data through a chain of components that transform it or react to it.</text:span></text:p>
            <text:p text:style-name="P17"><text:span text:style-name="T11">As each component has well-defined input(s) and output(s), it is easy to test in isolation or replace.</text:span></text:p>
            <text:p text:style-name="P18"><text:span text:style-name="T12">Pipeline</text:span><text:span text:style-name="T11"> is a kind of </text:span><text:span text:style-name="T12">Services</text:span><text:span text:style-name="T11"> with unidirectional data flow.</text:span></text:p>
          </draw:text-box>
        </draw:frame>
        <draw:frame draw:name="Google Shape;334;p49" presentation:style-name="pr4" draw:text-style-name="P7" draw:layer="layout" svg:width="47.336cm" svg:height="6.002cm" svg:x="1.732cm" svg:y="21.144cm" presentation:class="outline" presentation:user-transformed="true">
          <draw:text-box>
            <text:p text:style-name="P19"><text:span text:style-name="T13">Pipeline</text:span><text:span text:style-name="T14"> fits simple data-intensive projects.</text:span></text:p>
            <text:p text:style-name="P20"><text:span text:style-name="T15">Any integration logic multiplies system components.</text:span></text:p>
          </draw:text-box>
        </draw:frame>
        <draw:custom-shape draw:name="Google Shape;335;p49" draw:style-name="gr3" draw:text-style-name="P21" draw:layer="layout" svg:width="11.641cm" svg:height="2.541cm" svg:x="3.324cm" svg:y="14.583cm">
          <text:p text:style-name="P1"><text:span text:style-name="T16">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6;p49" draw:style-name="gr2" draw:text-style-name="P13" draw:layer="layout" svg:width="12.553cm" svg:height="6.002cm" svg:x="2.868cm" svg:y="8.848cm">
          <draw:image xlink:href="Pictures/10000201000003510000019678C0F046B9830EDD.png" xlink:type="simple" xlink:show="embed" xlink:actuate="onLoad">
            <text:p/>
          </draw:image>
        </draw:frame>
        <presentation:notes draw:style-name="dp2">
          <draw:page-thumbnail draw:name="Google Shape;329;g3ada4842c12_0_5:notes" draw:style-name="gr1" draw:layer="layout" svg:width="16.932cm" svg:height="9.524cm" svg:x="1.059cm" svg:y="1.905cm" draw:page-number="37" presentation:class="page"/>
          <draw:frame draw:name="Google Shape;330;g3ada4842c12_0_5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– trade-offs" draw:style-name="dp1" draw:master-page-name="TITLE_5f_AND_5f_TWO_5f_COLUMNS" presentation:presentation-page-layout-name="AL3T3">
        <draw:frame draw:name="Google Shape;341;p50" presentation:style-name="pr13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ipeline – trade-offs</text:span></text:p>
          </draw:text-box>
        </draw:frame>
        <draw:frame draw:name="Google Shape;342;p50" presentation:style-name="pr14" draw:text-style-name="P24" draw:layer="layout" svg:width="22.221cm" svg:height="18.122cm" svg:x="1.732cm" svg:y="6.403cm" presentation:class="outline" presentation:user-transformed="true">
          <draw:text-box>
            <text:p text:style-name="P22"><text:span text:style-name="T17">Pipeline supports multiple development teams and technologies</text:span></text:p>
            <text:p text:style-name="P17"><text:span text:style-name="T17">The components are easy to add, remove, replace, and can be tested in isolation</text:span></text:p>
            <text:p text:style-name="P18"><text:span text:style-name="T17">The system is highly scalable</text:span></text:p>
          </draw:text-box>
        </draw:frame>
        <draw:frame draw:name="Google Shape;343;p50" presentation:style-name="pr15" draw:text-style-name="P24" draw:layer="layout" svg:width="22.221cm" svg:height="18.122cm" svg:x="26.847cm" svg:y="6.403cm" presentation:class="outline" presentation:user-transformed="true">
          <draw:text-box>
            <text:p text:style-name="P22"><text:span text:style-name="T18">Pipeline supports only a few simple use cases with rudimentary error handling</text:span></text:p>
            <text:p text:style-name="P17"><text:span text:style-name="T18">The latency is high</text:span></text:p>
            <text:p text:style-name="P18"><text:span text:style-name="T18">Not every domain can be represented as a Pipeline</text:span></text:p>
          </draw:text-box>
        </draw:frame>
        <presentation:notes draw:style-name="dp2">
          <draw:page-thumbnail draw:name="Google Shape;338;g3ada4842c12_0_13:notes" draw:style-name="gr1" draw:layer="layout" svg:width="16.932cm" svg:height="9.524cm" svg:x="1.059cm" svg:y="1.905cm" draw:page-number="38" presentation:class="page"/>
          <draw:frame draw:name="Google Shape;339;g3ada4842c12_0_13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– examples" draw:style-name="dp1" draw:master-page-name="TITLE_5f_AND_5f_BODY" presentation:presentation-page-layout-name="AL2T1">
        <draw:frame draw:name="Google Shape;348;p51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ipeline – examples</text:span></text:p>
          </draw:text-box>
        </draw:frame>
        <draw:frame draw:name="Google Shape;349;p51" presentation:style-name="pr11" draw:text-style-name="P7" draw:layer="layout" svg:width="28.491cm" svg:height="14.454cm" svg:x="20.577cm" svg:y="7.383cm" presentation:class="outline" presentation:user-transformed="true">
          <draw:text-box>
            <text:p text:style-name="P16"><text:span text:style-name="T12">Pipes and Filters</text:span><text:span text:style-name="T11"> is the simplest kind of </text:span><text:span text:style-name="T12">Pipeline</text:span><text:span text:style-name="T11">. It is often run locally.</text:span></text:p>
            <text:p text:style-name="P17"><text:span text:style-name="T11">A </text:span><text:span text:style-name="T12">filter</text:span><text:span text:style-name="T11"> receives an input, transforms it, and produces an output.</text:span></text:p>
            <text:p text:style-name="P17"><text:span text:style-name="T11">A </text:span><text:span text:style-name="T12">pipe</text:span><text:span text:style-name="T11"> connects the output of a filter to the input of another filter.</text:span></text:p>
            <text:p text:style-name="P18"><text:span text:style-name="T25"/></text:p>
          </draw:text-box>
        </draw:frame>
        <draw:custom-shape draw:name="Google Shape;350;p51" draw:style-name="gr3" draw:text-style-name="P21" draw:layer="layout" svg:width="16.344cm" svg:height="2.541cm" svg:x="3.269cm" svg:y="17.201cm">
          <text:p text:style-name="P1"><text:span text:style-name="T16">Pipes and Fil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1;p51" draw:style-name="gr2" draw:text-style-name="P13" draw:layer="layout" svg:width="16.343cm" svg:height="7.787cm" svg:x="3.269cm" svg:y="9.413cm">
          <draw:image xlink:href="Pictures/1000020100000354000001963CBCF7601171781C.png" xlink:type="simple" xlink:show="embed" xlink:actuate="onLoad">
            <text:p/>
          </draw:image>
        </draw:frame>
        <presentation:notes draw:style-name="dp2">
          <draw:page-thumbnail draw:name="Google Shape;345;g3ada4842c12_0_19:notes" draw:style-name="gr1" draw:layer="layout" svg:width="16.932cm" svg:height="9.524cm" svg:x="1.059cm" svg:y="1.905cm" draw:page-number="39" presentation:class="page"/>
          <draw:frame draw:name="Google Shape;346;g3ada4842c12_0_19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– examples" draw:style-name="dp1" draw:master-page-name="TITLE_5f_AND_5f_BODY" presentation:presentation-page-layout-name="AL2T1">
        <draw:frame draw:name="Google Shape;356;p52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ipeline – examples</text:span></text:p>
          </draw:text-box>
        </draw:frame>
        <draw:frame draw:name="Google Shape;357;p52" presentation:style-name="pr11" draw:text-style-name="P7" draw:layer="layout" svg:width="28.491cm" svg:height="14.454cm" svg:x="20.577cm" svg:y="7.383cm" presentation:class="outline" presentation:user-transformed="true">
          <draw:text-box>
            <text:p text:style-name="P16"><text:span text:style-name="T12">Event-Driven Architecture</text:span><text:span text:style-name="T11"> (</text:span><text:span text:style-name="T12">EDA</text:span><text:span text:style-name="T11">) is a tree of subdomain services which subscribe to each other’s events.</text:span></text:p>
            <text:p text:style-name="P17"><text:span text:style-name="T11">It is easy to extend with new services.</text:span></text:p>
            <text:p text:style-name="P18"><text:span text:style-name="T25"/></text:p>
          </draw:text-box>
        </draw:frame>
        <draw:custom-shape draw:name="Google Shape;358;p52" draw:style-name="gr3" draw:text-style-name="P21" draw:layer="layout" svg:width="15.954cm" svg:height="4.065cm" svg:x="3.269cm" svg:y="16.352cm">
          <text:p text:style-name="P1"><text:span text:style-name="T16">Choreographed Event-Driven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9;p52" draw:style-name="gr2" draw:text-style-name="P13" draw:layer="layout" svg:width="15.954cm" svg:height="7.882cm" svg:x="3.269cm" svg:y="8.469cm">
          <draw:image xlink:href="Pictures/100002010000034E000001A28C9BEF15358C3914.png" xlink:type="simple" xlink:show="embed" xlink:actuate="onLoad">
            <text:p/>
          </draw:image>
        </draw:frame>
        <presentation:notes draw:style-name="dp2">
          <draw:page-thumbnail draw:name="Google Shape;353;g3ada4842c12_0_28:notes" draw:style-name="gr1" draw:layer="layout" svg:width="16.932cm" svg:height="9.524cm" svg:x="1.059cm" svg:y="1.905cm" draw:page-number="40" presentation:class="page"/>
          <draw:frame draw:name="Google Shape;354;g3ada4842c12_0_28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– examples" draw:style-name="dp1" draw:master-page-name="TITLE_5f_AND_5f_BODY" presentation:presentation-page-layout-name="AL2T1">
        <draw:frame draw:name="Google Shape;364;p53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Pipeline – examples</text:span></text:p>
          </draw:text-box>
        </draw:frame>
        <draw:frame draw:name="Google Shape;365;p53" presentation:style-name="pr11" draw:text-style-name="P7" draw:layer="layout" svg:width="28.491cm" svg:height="14.454cm" svg:x="20.577cm" svg:y="7.383cm" presentation:class="outline" presentation:user-transformed="true">
          <draw:text-box>
            <text:p text:style-name="P16"><text:span text:style-name="T12">Data Mesh</text:span><text:span text:style-name="T11"> is a graph of streams of analytical information. Its nodes are called </text:span><text:span text:style-name="T12">Data Product Quanta</text:span><text:span text:style-name="T11"> (</text:span><text:span text:style-name="T12">DPQ</text:span><text:span text:style-name="T11">).</text:span></text:p>
            <text:p text:style-name="P17"><text:span text:style-name="T11">It extends any kind of distributed system, extracting its data analytics aspect into an overlapping set of services and databases.</text:span></text:p>
            <text:p text:style-name="P18"><text:span text:style-name="T25"/></text:p>
          </draw:text-box>
        </draw:frame>
        <draw:custom-shape draw:name="Google Shape;366;p53" draw:style-name="gr3" draw:text-style-name="P21" draw:layer="layout" svg:width="16.771cm" svg:height="2.541cm" svg:x="2.643cm" svg:y="18.105cm">
          <text:p text:style-name="P1"><text:span text:style-name="T16">Data M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7;p53" draw:style-name="gr2" draw:text-style-name="P13" draw:layer="layout" svg:width="16.771cm" svg:height="7.858cm" svg:x="2.643cm" svg:y="9.399cm">
          <draw:image xlink:href="Pictures/100002010000046900000211C439E9E71429E954.png" xlink:type="simple" xlink:show="embed" xlink:actuate="onLoad">
            <text:p/>
          </draw:image>
        </draw:frame>
        <presentation:notes draw:style-name="dp2">
          <draw:page-thumbnail draw:name="Google Shape;361;g3ada4842c12_0_35:notes" draw:style-name="gr1" draw:layer="layout" svg:width="16.932cm" svg:height="9.524cm" svg:x="1.059cm" svg:y="1.905cm" draw:page-number="41" presentation:class="page"/>
          <draw:frame draw:name="Google Shape;362;g3ada4842c12_0_35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SECTION_5f_HEADER">
        <draw:frame draw:name="Google Shape;372;p54" presentation:style-name="pr8" draw:text-style-name="P14" draw:layer="layout" svg:width="47.336cm" svg:height="4.676cm" svg:x="1.732cm" svg:y="11.949cm" presentation:class="title" presentation:user-transformed="true">
          <draw:text-box>
            <text:p text:style-name="P1"><text:span text:style-name="T9">Conclusion</text:span></text:p>
          </draw:text-box>
        </draw:frame>
        <presentation:notes draw:style-name="dp2">
          <draw:page-thumbnail draw:name="Google Shape;369;g39ecdd5df51_0_44:notes" draw:style-name="gr1" draw:layer="layout" svg:width="16.932cm" svg:height="9.524cm" svg:x="1.059cm" svg:y="1.905cm" draw:page-number="42" presentation:class="page"/>
          <draw:frame draw:name="Google Shape;370;g39ecdd5df51_0_44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complex architectures" draw:style-name="dp1" draw:master-page-name="TITLE_5f_AND_5f_BODY" presentation:presentation-page-layout-name="AL2T1">
        <draw:frame draw:name="Google Shape;377;p55" presentation:style-name="pr34" draw:text-style-name="P7" draw:layer="layout" svg:width="24.502cm" svg:height="15.192cm" svg:x="13.058cm" svg:y="7.873cm" presentation:class="outline" presentation:user-transformed="true">
          <draw:text-box>
            <text:p text:style-name="P16"><text:span text:style-name="T12">Shards</text:span><text:span text:style-name="T11">, </text:span><text:span text:style-name="T12">Layers</text:span><text:span text:style-name="T11"> and </text:span><text:span text:style-name="T12">Services</text:span><text:span text:style-name="T11"> can be combined, often recursively, for example:</text:span></text:p>
            <text:list text:style-name="L11">
              <text:list-item>
                <text:p text:style-name="P17"><text:span text:style-name="T11">A single </text:span><text:span text:style-name="T12">integration layer</text:span><text:span text:style-name="T11"> over </text:span><text:span text:style-name="T12">services</text:span><text:span text:style-name="T11"> makes </text:span><text:span text:style-name="T12">Orchestrated Services</text:span><text:span text:style-name="T11">.</text:span></text:p>
              </text:list-item>
              <text:list-item>
                <text:p text:style-name="P23"><text:span text:style-name="T12">Layers</text:span><text:span text:style-name="T11">, divided into </text:span><text:span text:style-name="T12">Services</text:span><text:span text:style-name="T11">, make </text:span><text:span text:style-name="T12">Service-Oriented Architecture</text:span><text:span text:style-name="T11">.</text:span></text:p>
              </text:list-item>
            </text:list>
          </draw:text-box>
        </draw:frame>
        <draw:custom-shape draw:name="Google Shape;378;p55" draw:style-name="gr3" draw:text-style-name="P21" draw:layer="layout" svg:width="9.439cm" svg:height="4.065cm" svg:x="1.997cm" svg:y="17.993cm">
          <text:p text:style-name="P1"><text:span text:style-name="T20">Orchestrated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55" draw:style-name="gr3" draw:text-style-name="P21" draw:layer="layout" svg:width="10.702cm" svg:height="4.065cm" svg:x="38.366cm" svg:y="17.993cm">
          <text:p text:style-name="P1"><text:span text:style-name="T20">Service-Oriented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55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Building complex architectures</text:span></text:p>
          </draw:text-box>
        </draw:frame>
        <draw:frame draw:name="Google Shape;381;p55" draw:style-name="gr2" draw:text-style-name="P13" draw:layer="layout" svg:width="9.288cm" svg:height="8.698cm" svg:x="2.073cm" svg:y="9.056cm">
          <draw:image xlink:href="Pictures/10000201000002860000025DE7D050F41E874375.png" xlink:type="simple" xlink:show="embed" xlink:actuate="onLoad">
            <text:p/>
          </draw:image>
        </draw:frame>
        <draw:frame draw:name="Google Shape;382;p55" draw:style-name="gr2" draw:text-style-name="P13" draw:layer="layout" svg:width="9.288cm" svg:height="9.703cm" svg:x="39.073cm" svg:y="8.554cm">
          <draw:image xlink:href="Pictures/10000201000003260000034AB8769B9E9F892171.png" xlink:type="simple" xlink:show="embed" xlink:actuate="onLoad">
            <text:p/>
          </draw:image>
        </draw:frame>
        <presentation:notes draw:style-name="dp2">
          <draw:page-thumbnail draw:name="Google Shape;374;g3ada4842c12_0_46:notes" draw:style-name="gr1" draw:layer="layout" svg:width="16.932cm" svg:height="9.524cm" svg:x="1.059cm" svg:y="1.905cm" draw:page-number="43" presentation:class="page"/>
          <draw:frame draw:name="Google Shape;375;g3ada4842c12_0_46:notes" presentation:style-name="pr35" draw:text-style-name="P29" draw:layer="layout" svg:width="15.239cm" svg:height="11.429cm" svg:x="1.905cm" svg:y="12.065cm" presentation:class="notes" presentation:user-transformed="true">
            <draw:text-box>
              <text:p text:style-name="P28"><text:span text:style-name="T23"><text:a xlink:href="https://metapatterns.io/basic-metapatterns/layers/" xlink:type="simple">https://metapatterns.io/basic-metapatterns/layers/</text:a></text:span></text:p>
            </draw:text-box>
          </draw:frame>
        </presentation:notes>
      </draw:page>
      <draw:page draw:name="Links" draw:style-name="dp1" draw:master-page-name="TITLE_5f_AND_5f_BODY" presentation:presentation-page-layout-name="AL2T1">
        <draw:frame draw:name="Google Shape;387;p56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Links</text:span></text:p>
          </draw:text-box>
        </draw:frame>
        <draw:frame draw:name="Google Shape;388;p56" presentation:style-name="pr34" draw:text-style-name="P7" draw:layer="layout" svg:width="47.336cm" svg:height="11.087cm" svg:x="1.732cm" svg:y="6.403cm" presentation:class="outline" presentation:user-transformed="true">
          <draw:text-box>
            <text:p text:style-name="P16"><text:span text:style-name="T11">All of this and much more can be found in my book </text:span><text:span text:style-name="T12">Architectural Metapatterns</text:span><text:span text:style-name="T11">:</text:span></text:p>
            <text:p text:style-name="P17"><text:span text:style-name="T11">– </text:span><text:span text:style-name="T11">read online at </text:span><text:span text:style-name="T26"><text:a xlink:href="https://metapatterns.io/" xlink:type="simple">metapatterns.io</text:a></text:span></text:p>
            <text:p text:style-name="P17"><text:span text:style-name="T11">– </text:span><text:span text:style-name="T11">download from </text:span><text:span text:style-name="T26"><text:a xlink:href="https://leanpub.com/metapatterns" xlink:type="simple">leanpub.com/metapatterns</text:a></text:span></text:p>
            <text:p text:style-name="P18"><text:span text:style-name="T11">The diagrams and the ODT source file are available under the CC BY license.</text:span></text:p>
          </draw:text-box>
        </draw:frame>
        <draw:frame draw:name="Google Shape;389;p56" presentation:style-name="pr4" draw:text-style-name="P7" draw:layer="layout" svg:width="47.336cm" svg:height="8.362cm" svg:x="1.732cm" svg:y="17.491cm" presentation:class="outline" presentation:user-transformed="true">
          <draw:text-box>
            <text:p text:style-name="P19"><text:span text:style-name="T5">The book is free. </text:span></text:p>
            <text:p text:style-name="P19"><text:span text:style-name="T5">No strings attached.</text:span></text:p>
          </draw:text-box>
        </draw:frame>
        <presentation:notes draw:style-name="dp2">
          <draw:page-thumbnail draw:name="Google Shape;384;g39ecdd5df51_0_53:notes" draw:style-name="gr1" draw:layer="layout" svg:width="16.932cm" svg:height="9.524cm" svg:x="1.059cm" svg:y="1.905cm" draw:page-number="44" presentation:class="page"/>
          <draw:frame draw:name="Google Shape;385;g39ecdd5df51_0_53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47.336cm" svg:height="11.402cm" svg:x="1.732cm" svg:y="4.13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47.336cm" svg:height="18.979cm" svg:x="1.732cm" svg:y="6.403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2cm" svg:height="9.524cm" svg:x="1.058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47.336cm" svg:height="4.676cm" svg:x="1.732cm" svg:y="11.949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2cm" svg:height="9.524cm" svg:x="1.058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22.221cm" svg:height="18.979cm" svg:x="1.732cm" svg:y="6.403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22.221cm" svg:height="18.979cm" svg:x="26.847cm" svg:y="6.403cm" presentation:class="outline" presentation:placeholder="true" presentation:user-transformed="true">
        <draw:text-box/>
      </draw:frame>
      <draw:frame draw:name="Google Shape;24;p5" presentation:style-name="Mpr10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2cm" svg:height="9.524cm" svg:x="1.058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9"/>
    <meta:generator>LibreOfficeDev/6.0.5.2$Linux_X86_64 LibreOffice_project/</meta:generator>
  </office:meta>
</office:document-meta>
</file>